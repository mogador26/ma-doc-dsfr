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10000019A5D556E43.png" manifest:media-type="image/png"/>
  <manifest:file-entry manifest:full-path="Pictures/100000010000007C0000005ABAA0C0E4.png" manifest:media-type="image/png"/>
  <manifest:file-entry manifest:full-path="Pictures/10000001000006B9000005A1D93ACC48.png" manifest:media-type="image/png"/>
  <manifest:file-entry manifest:full-path="Pictures/100000010000017700000393A8A35542.png" manifest:media-type="image/png"/>
  <manifest:file-entry manifest:full-path="Pictures/100000000000050D000001F17B112235.png" manifest:media-type="image/png"/>
  <manifest:file-entry manifest:full-path="Pictures/100000010000075A000004FD9BF9ABC0.png" manifest:media-type="image/png"/>
  <manifest:file-entry manifest:full-path="Pictures/10000000000002720000016AEB9AF3C2.png" manifest:media-type="image/png"/>
  <manifest:file-entry manifest:full-path="Pictures/1000000100000522000002836FC8437E.png" manifest:media-type="image/png"/>
  <manifest:file-entry manifest:full-path="Pictures/1000000000000A7B0000061ACC8D3189.png" manifest:media-type="image/png"/>
  <manifest:file-entry manifest:full-path="Pictures/10000001000002A800000195FC8860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Courier New" svg:font-family="'Courier New'" style:font-family-generic="modern" style:font-pitch="fixed"/>
    <style:font-face style:name="Marianne" svg:font-family="Marianne" style:font-family-generic="modern"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7.582cm" fo:margin-left="0cm" table:align="left"/>
    </style:style>
    <style:style style:name="Tableau1.A" style:family="table-column">
      <style:table-column-properties style:column-width="4.396cm"/>
    </style:style>
    <style:style style:name="Tableau1.A1" style:family="table-cell">
      <style:table-cell-properties fo:padding-left="0.191cm" fo:padding-right="0.191cm" fo:padding-top="0cm" fo:padding-bottom="0cm" fo:border="0.5pt solid #404040" style:writing-mode="lr-tb"/>
    </style:style>
    <style:style style:name="Tableau2" style:family="table">
      <style:table-properties style:width="17.582cm" fo:margin-left="0cm" table:align="left"/>
    </style:style>
    <style:style style:name="Tableau2.A" style:family="table-column">
      <style:table-column-properties style:column-width="4.396cm"/>
    </style:style>
    <style:style style:name="Tableau2.A1" style:family="table-cell">
      <style:table-cell-properties fo:padding-left="0.191cm" fo:padding-right="0.191cm" fo:padding-top="0cm" fo:padding-bottom="0cm" fo:border="0.5pt solid #404040" style:writing-mode="lr-tb"/>
    </style:style>
    <style:style style:name="Tableau3" style:family="table">
      <style:table-properties style:width="17.6cm" style:rel-width="100%" fo:margin-left="0cm" table:align="left"/>
    </style:style>
    <style:style style:name="Tableau3.A" style:family="table-column">
      <style:table-column-properties style:column-width="5.868cm" style:rel-column-width="3324*"/>
    </style:style>
    <style:style style:name="Tableau3.B" style:family="table-column">
      <style:table-column-properties style:column-width="5.867cm" style:rel-column-width="3323*"/>
    </style:style>
    <style:style style:name="Tableau3.C" style:family="table-column">
      <style:table-column-properties style:column-width="5.863cm" style:rel-column-width="3321*"/>
    </style:style>
    <style:style style:name="Tableau3.A1" style:family="table-cell">
      <style:table-cell-properties fo:padding-left="0.191cm" fo:padding-right="0.191cm" fo:padding-top="0cm" fo:padding-bottom="0cm" fo:border="0.5pt solid #404040" style:writing-mode="lr-tb"/>
    </style:style>
    <style:style style:name="Tableau4" style:family="table">
      <style:table-properties style:width="17.6cm" style:rel-width="100%" fo:margin-left="0cm" table:align="left"/>
    </style:style>
    <style:style style:name="Tableau4.A" style:family="table-column">
      <style:table-column-properties style:column-width="8.8cm" style:rel-column-width="4984*"/>
    </style:style>
    <style:style style:name="Tableau4.A1" style:family="table-cell">
      <style:table-cell-properties fo:padding-left="0.191cm" fo:padding-right="0.191cm" fo:padding-top="0cm" fo:padding-bottom="0cm" fo:border="0.5pt solid #404040" style:writing-mode="lr-tb"/>
    </style:style>
    <style:style style:name="Tableau5" style:family="table">
      <style:table-properties style:width="17.6cm" style:rel-width="100%" fo:margin-left="0cm" table:align="left"/>
    </style:style>
    <style:style style:name="Tableau5.A" style:family="table-column">
      <style:table-column-properties style:column-width="5.868cm" style:rel-column-width="3324*"/>
    </style:style>
    <style:style style:name="Tableau5.B" style:family="table-column">
      <style:table-column-properties style:column-width="5.867cm" style:rel-column-width="3323*"/>
    </style:style>
    <style:style style:name="Tableau5.C" style:family="table-column">
      <style:table-column-properties style:column-width="5.863cm" style:rel-column-width="3321*"/>
    </style:style>
    <style:style style:name="Tableau5.A1" style:family="table-cell">
      <style:table-cell-properties fo:padding-left="0.191cm" fo:padding-right="0.191cm" fo:padding-top="0cm" fo:padding-bottom="0cm" fo:border="0.5pt solid #404040" style:writing-mode="lr-tb"/>
    </style:style>
    <style:style style:name="Tableau6" style:family="table">
      <style:table-properties style:width="17.6cm" style:rel-width="100%" fo:margin-left="0cm" table:align="left"/>
    </style:style>
    <style:style style:name="Tableau6.A" style:family="table-column">
      <style:table-column-properties style:column-width="8.8cm" style:rel-column-width="4984*"/>
    </style:style>
    <style:style style:name="Tableau6.A1" style:family="table-cell">
      <style:table-cell-properties fo:padding-left="0.191cm" fo:padding-right="0.191cm" fo:padding-top="0cm" fo:padding-bottom="0cm" fo:border="0.5pt solid #404040" style:writing-mode="lr-tb"/>
    </style:style>
    <style:style style:name="Tableau7" style:family="table">
      <style:table-properties style:width="17.582cm" fo:margin-left="0cm" table:align="left"/>
    </style:style>
    <style:style style:name="Tableau7.A" style:family="table-column">
      <style:table-column-properties style:column-width="4.396cm"/>
    </style:style>
    <style:style style:name="Tableau7.A1" style:family="table-cell">
      <style:table-cell-properties fo:padding-left="0.191cm" fo:padding-right="0.191cm" fo:padding-top="0cm" fo:padding-bottom="0cm" fo:border="0.5pt solid #404040" style:writing-mode="lr-tb"/>
    </style:style>
    <style:style style:name="Tableau8" style:family="table">
      <style:table-properties style:width="17.6cm" style:rel-width="100%" fo:margin-left="0cm" table:align="left"/>
    </style:style>
    <style:style style:name="Tableau8.A" style:family="table-column">
      <style:table-column-properties style:column-width="5.248cm" style:rel-column-width="2972*"/>
    </style:style>
    <style:style style:name="Tableau8.B" style:family="table-column">
      <style:table-column-properties style:column-width="6.757cm" style:rel-column-width="3827*"/>
    </style:style>
    <style:style style:name="Tableau8.C" style:family="table-column">
      <style:table-column-properties style:column-width="5.595cm" style:rel-column-width="3169*"/>
    </style:style>
    <style:style style:name="Tableau8.A1" style:family="table-cell">
      <style:table-cell-properties fo:padding-left="0.191cm" fo:padding-right="0.191cm" fo:padding-top="0cm" fo:padding-bottom="0cm" fo:border="0.5pt solid #404040" style:writing-mode="lr-tb"/>
    </style:style>
    <style:style style:name="Tableau9" style:family="table">
      <style:table-properties style:width="17.6cm" style:rel-width="100%" fo:margin-left="0cm" table:align="left"/>
    </style:style>
    <style:style style:name="Tableau9.A" style:family="table-column">
      <style:table-column-properties style:column-width="5.248cm" style:rel-column-width="2972*"/>
    </style:style>
    <style:style style:name="Tableau9.B" style:family="table-column">
      <style:table-column-properties style:column-width="6.757cm" style:rel-column-width="3827*"/>
    </style:style>
    <style:style style:name="Tableau9.C" style:family="table-column">
      <style:table-column-properties style:column-width="5.595cm" style:rel-column-width="3169*"/>
    </style:style>
    <style:style style:name="Tableau9.A1" style:family="table-cell">
      <style:table-cell-properties fo:padding-left="0.191cm" fo:padding-right="0.191cm" fo:padding-top="0cm" fo:padding-bottom="0cm" fo:border="0.5pt solid #404040" style:writing-mode="lr-tb"/>
    </style:style>
    <style:style style:name="Tableau10" style:family="table">
      <style:table-properties style:width="17.582cm" fo:margin-left="0cm" table:align="left"/>
    </style:style>
    <style:style style:name="Tableau10.A" style:family="table-column">
      <style:table-column-properties style:column-width="4.396cm"/>
    </style:style>
    <style:style style:name="Tableau10.A1" style:family="table-cell">
      <style:table-cell-properties fo:padding-left="0.191cm" fo:padding-right="0.191cm" fo:padding-top="0cm" fo:padding-bottom="0cm" fo:border="0.5pt solid #404040" style:writing-mode="lr-tb"/>
    </style:style>
    <style:style style:name="Tableau11" style:family="table">
      <style:table-properties style:width="17.6cm" style:rel-width="100%" fo:margin-left="0cm" table:align="left"/>
    </style:style>
    <style:style style:name="Tableau11.A" style:family="table-column">
      <style:table-column-properties style:column-width="8.8cm" style:rel-column-width="4984*"/>
    </style:style>
    <style:style style:name="Tableau11.A1" style:family="table-cell">
      <style:table-cell-properties fo:padding-left="0.191cm" fo:padding-right="0.191cm" fo:padding-top="0cm" fo:padding-bottom="0cm" fo:border="0.5pt solid #404040" style:writing-mode="lr-tb"/>
    </style:style>
    <style:style style:name="Tableau11.8" style:family="table-row">
      <style:table-row-properties style:min-row-height="0.347cm" style:use-optimal-row-height="false"/>
    </style:style>
    <style:style style:name="Tableau12" style:family="table">
      <style:table-properties style:width="17.6cm" style:rel-width="100%" fo:margin-left="0cm" table:align="left"/>
    </style:style>
    <style:style style:name="Tableau12.A" style:family="table-column">
      <style:table-column-properties style:column-width="8.8cm" style:rel-column-width="4984*"/>
    </style:style>
    <style:style style:name="Tableau12.A1" style:family="table-cell">
      <style:table-cell-properties fo:padding-left="0.191cm" fo:padding-right="0.191cm" fo:padding-top="0cm" fo:padding-bottom="0cm" fo:border="0.5pt solid #404040" style:writing-mode="lr-tb"/>
    </style:style>
    <style:style style:name="Tableau13" style:family="table">
      <style:table-properties style:width="17.6cm" style:rel-width="100%" fo:margin-left="0cm" table:align="left"/>
    </style:style>
    <style:style style:name="Tableau13.A" style:family="table-column">
      <style:table-column-properties style:column-width="8.8cm" style:rel-column-width="4984*"/>
    </style:style>
    <style:style style:name="Tableau13.A1" style:family="table-cell">
      <style:table-cell-properties fo:padding-left="0.191cm" fo:padding-right="0.191cm" fo:padding-top="0cm" fo:padding-bottom="0cm" fo:border="0.5pt solid #404040" style:writing-mode="lr-tb"/>
    </style:style>
    <style:style style:name="Tableau14" style:family="table">
      <style:table-properties style:width="17.6cm" style:rel-width="100%" fo:margin-left="0cm" table:align="left"/>
    </style:style>
    <style:style style:name="Tableau14.A" style:family="table-column">
      <style:table-column-properties style:column-width="8.8cm" style:rel-column-width="4984*"/>
    </style:style>
    <style:style style:name="Tableau14.A1" style:family="table-cell">
      <style:table-cell-properties fo:padding-left="0.191cm" fo:padding-right="0.191cm" fo:padding-top="0cm" fo:padding-bottom="0cm" fo:border="0.5pt solid #404040" style:writing-mode="lr-tb"/>
    </style:style>
    <style:style style:name="Tableau15" style:family="table">
      <style:table-properties style:width="17.6cm" style:rel-width="100%" fo:margin-left="0cm" table:align="left"/>
    </style:style>
    <style:style style:name="Tableau15.A" style:family="table-column">
      <style:table-column-properties style:column-width="8.8cm" style:rel-column-width="4984*"/>
    </style:style>
    <style:style style:name="Tableau15.A1" style:family="table-cell">
      <style:table-cell-properties fo:padding-left="0.191cm" fo:padding-right="0.191cm" fo:padding-top="0cm" fo:padding-bottom="0cm" fo:border="0.5pt solid #404040" style:writing-mode="lr-tb"/>
    </style:style>
    <style:style style:name="Tableau16" style:family="table">
      <style:table-properties style:width="17.6cm" style:rel-width="100%" fo:margin-left="0cm" table:align="left"/>
    </style:style>
    <style:style style:name="Tableau16.A" style:family="table-column">
      <style:table-column-properties style:column-width="8.8cm" style:rel-column-width="4984*"/>
    </style:style>
    <style:style style:name="Tableau16.A1" style:family="table-cell">
      <style:table-cell-properties fo:padding-left="0.191cm" fo:padding-right="0.191cm" fo:padding-top="0cm" fo:padding-bottom="0cm" fo:border="0.5pt solid #404040" style:writing-mode="lr-tb"/>
    </style:style>
    <style:style style:name="Tableau17" style:family="table">
      <style:table-properties style:width="17.6cm" style:rel-width="100%" fo:margin-left="0cm" table:align="left"/>
    </style:style>
    <style:style style:name="Tableau17.A" style:family="table-column">
      <style:table-column-properties style:column-width="8.8cm" style:rel-column-width="4984*"/>
    </style:style>
    <style:style style:name="Tableau17.A1" style:family="table-cell">
      <style:table-cell-properties fo:padding-left="0.191cm" fo:padding-right="0.191cm" fo:padding-top="0cm" fo:padding-bottom="0cm" fo:border="0.5pt solid #404040" style:writing-mode="lr-tb"/>
    </style:style>
    <style:style style:name="Tableau18" style:family="table">
      <style:table-properties style:width="17.6cm" style:rel-width="100%" fo:margin-left="0cm" table:align="left"/>
    </style:style>
    <style:style style:name="Tableau18.A" style:family="table-column">
      <style:table-column-properties style:column-width="8.8cm" style:rel-column-width="4984*"/>
    </style:style>
    <style:style style:name="Tableau18.A1" style:family="table-cell">
      <style:table-cell-properties fo:padding-left="0.191cm" fo:padding-right="0.191cm" fo:padding-top="0cm" fo:padding-bottom="0cm" fo:border="0.5pt solid #404040" style:writing-mode="lr-tb"/>
    </style:style>
    <style:style style:name="Tableau19" style:family="table">
      <style:table-properties style:width="17.6cm" style:rel-width="100%" fo:margin-left="0cm" table:align="left"/>
    </style:style>
    <style:style style:name="Tableau19.A" style:family="table-column">
      <style:table-column-properties style:column-width="5.248cm" style:rel-column-width="2972*"/>
    </style:style>
    <style:style style:name="Tableau19.B" style:family="table-column">
      <style:table-column-properties style:column-width="6.757cm" style:rel-column-width="3827*"/>
    </style:style>
    <style:style style:name="Tableau19.C" style:family="table-column">
      <style:table-column-properties style:column-width="5.595cm" style:rel-column-width="3169*"/>
    </style:style>
    <style:style style:name="Tableau19.A1" style:family="table-cell">
      <style:table-cell-properties fo:padding-left="0.191cm" fo:padding-right="0.191cm" fo:padding-top="0cm" fo:padding-bottom="0cm" fo:border="0.5pt solid #404040" style:writing-mode="lr-tb"/>
    </style:style>
    <style:style style:name="Tableau20" style:family="table">
      <style:table-properties style:width="17.582cm" fo:margin-left="0cm" table:align="left"/>
    </style:style>
    <style:style style:name="Tableau20.A" style:family="table-column">
      <style:table-column-properties style:column-width="3.515cm"/>
    </style:style>
    <style:style style:name="Tableau20.C" style:family="table-column">
      <style:table-column-properties style:column-width="3.517cm"/>
    </style:style>
    <style:style style:name="Tableau20.A1" style:family="table-cell">
      <style:table-cell-properties fo:padding-left="0.191cm" fo:padding-right="0.191cm" fo:padding-top="0cm" fo:padding-bottom="0cm" fo:border="0.5pt solid #000000" style:writing-mode="lr-tb"/>
    </style:style>
    <style:style style:name="Tableau21" style:family="table">
      <style:table-properties style:width="17.6cm" style:rel-width="100%" fo:margin-left="0cm" table:align="left"/>
    </style:style>
    <style:style style:name="Tableau21.A" style:family="table-column">
      <style:table-column-properties style:column-width="8.8cm" style:rel-column-width="4984*"/>
    </style:style>
    <style:style style:name="Tableau21.A1" style:family="table-cell">
      <style:table-cell-properties fo:padding-left="0.191cm" fo:padding-right="0.191cm" fo:padding-top="0cm" fo:padding-bottom="0cm" fo:border="0.5pt solid #404040" style:writing-mode="lr-tb"/>
    </style:style>
    <style:style style:name="Tableau22" style:family="table">
      <style:table-properties style:width="17.6cm" style:rel-width="100%" fo:margin-left="0cm" table:align="left"/>
    </style:style>
    <style:style style:name="Tableau22.A" style:family="table-column">
      <style:table-column-properties style:column-width="8.8cm" style:rel-column-width="4984*"/>
    </style:style>
    <style:style style:name="Tableau22.A1" style:family="table-cell">
      <style:table-cell-properties fo:padding-left="0.191cm" fo:padding-right="0.191cm" fo:padding-top="0cm" fo:padding-bottom="0cm" fo:border="0.5pt solid #404040" style:writing-mode="lr-tb"/>
    </style:style>
    <style:style style:name="Tableau23" style:family="table">
      <style:table-properties style:width="17.582cm" fo:margin-left="0cm" table:align="left"/>
    </style:style>
    <style:style style:name="Tableau23.A" style:family="table-column">
      <style:table-column-properties style:column-width="8.791cm"/>
    </style:style>
    <style:style style:name="Tableau23.A1" style:family="table-cell">
      <style:table-cell-properties fo:padding-left="0.191cm" fo:padding-right="0.191cm" fo:padding-top="0cm" fo:padding-bottom="0cm" fo:border="0.5pt solid #000000" style:writing-mode="lr-tb"/>
    </style:style>
    <style:style style:name="Tableau24" style:family="table">
      <style:table-properties style:width="17.582cm" fo:margin-left="0cm" table:align="left"/>
    </style:style>
    <style:style style:name="Tableau24.A" style:family="table-column">
      <style:table-column-properties style:column-width="2.79cm"/>
    </style:style>
    <style:style style:name="Tableau24.B" style:family="table-column">
      <style:table-column-properties style:column-width="2.731cm"/>
    </style:style>
    <style:style style:name="Tableau24.C" style:family="table-column">
      <style:table-column-properties style:column-width="3.194cm"/>
    </style:style>
    <style:style style:name="Tableau24.E" style:family="table-column">
      <style:table-column-properties style:column-width="2.362cm"/>
    </style:style>
    <style:style style:name="Tableau24.F" style:family="table-column">
      <style:table-column-properties style:column-width="3.775cm"/>
    </style:style>
    <style:style style:name="Tableau24.A1" style:family="table-cell">
      <style:table-cell-properties fo:padding-left="0.191cm" fo:padding-right="0.191cm" fo:padding-top="0cm" fo:padding-bottom="0cm" fo:border="0.5pt solid #000000" style:writing-mode="lr-tb"/>
    </style:style>
    <style:style style:name="Tableau25" style:family="table">
      <style:table-properties style:width="17.582cm" fo:margin-left="0cm" table:align="left"/>
    </style:style>
    <style:style style:name="Tableau25.A" style:family="table-column">
      <style:table-column-properties style:column-width="5.86cm"/>
    </style:style>
    <style:style style:name="Tableau25.B" style:family="table-column">
      <style:table-column-properties style:column-width="5.861cm"/>
    </style:style>
    <style:style style:name="Tableau25.A1" style:family="table-cell">
      <style:table-cell-properties fo:padding-left="0.191cm" fo:padding-right="0.191cm" fo:padding-top="0cm" fo:padding-bottom="0cm" fo:border="0.5pt solid #000000" style:writing-mode="lr-tb"/>
    </style:style>
    <style:style style:name="Tableau26" style:family="table">
      <style:table-properties style:width="17.582cm" fo:margin-left="0cm" table:align="left"/>
    </style:style>
    <style:style style:name="Tableau26.A" style:family="table-column">
      <style:table-column-properties style:column-width="5.86cm"/>
    </style:style>
    <style:style style:name="Tableau26.B" style:family="table-column">
      <style:table-column-properties style:column-width="5.861cm"/>
    </style:style>
    <style:style style:name="Tableau26.A1" style:family="table-cell">
      <style:table-cell-properties fo:padding-left="0.191cm" fo:padding-right="0.191cm" fo:padding-top="0cm" fo:padding-bottom="0cm" fo:border="0.5pt solid #000000" style:writing-mode="lr-tb"/>
    </style:style>
    <style:style style:name="Tableau27" style:family="table">
      <style:table-properties style:width="17.582cm" fo:margin-left="0cm" table:align="left"/>
    </style:style>
    <style:style style:name="Tableau27.A" style:family="table-column">
      <style:table-column-properties style:column-width="5.86cm"/>
    </style:style>
    <style:style style:name="Tableau27.B" style:family="table-column">
      <style:table-column-properties style:column-width="5.861cm"/>
    </style:style>
    <style:style style:name="Tableau27.A1" style:family="table-cell">
      <style:table-cell-properties fo:padding-left="0.191cm" fo:padding-right="0.191cm" fo:padding-top="0cm" fo:padding-bottom="0cm" fo:border="0.5pt solid #000000" style:writing-mode="lr-tb"/>
    </style:style>
    <style:style style:name="Tableau28" style:family="table">
      <style:table-properties style:width="17.582cm" fo:margin-left="0cm" table:align="left"/>
    </style:style>
    <style:style style:name="Tableau28.A" style:family="table-column">
      <style:table-column-properties style:column-width="5.86cm"/>
    </style:style>
    <style:style style:name="Tableau28.B" style:family="table-column">
      <style:table-column-properties style:column-width="4.383cm"/>
    </style:style>
    <style:style style:name="Tableau28.C" style:family="table-column">
      <style:table-column-properties style:column-width="7.34cm"/>
    </style:style>
    <style:style style:name="Tableau28.A1" style:family="table-cell">
      <style:table-cell-properties fo:padding-left="0.191cm" fo:padding-right="0.191cm" fo:padding-top="0cm" fo:padding-bottom="0cm" fo:border="0.5pt solid #000000" style:writing-mode="lr-tb"/>
    </style:style>
    <style:style style:name="Tableau29" style:family="table">
      <style:table-properties style:width="17.6cm" style:rel-width="100%" fo:margin-left="0cm" table:align="left"/>
    </style:style>
    <style:style style:name="Tableau29.A" style:family="table-column">
      <style:table-column-properties style:column-width="8.8cm" style:rel-column-width="4984*"/>
    </style:style>
    <style:style style:name="Tableau29.A1" style:family="table-cell">
      <style:table-cell-properties fo:padding-left="0.191cm" fo:padding-right="0.191cm" fo:padding-top="0cm" fo:padding-bottom="0cm" fo:border="0.5pt solid #404040" style:writing-mode="lr-tb"/>
    </style:style>
    <style:style style:name="Tableau29.A4" style:family="table-cell">
      <style:table-cell-properties fo:padding-left="0.191cm" fo:padding-right="0.191cm" fo:padding-top="0cm" fo:padding-bottom="0cm" fo:border-left="0.5pt solid #404040" fo:border-right="0.5pt solid #404040" fo:border-top="none" fo:border-bottom="0.5pt solid #404040" style:writing-mode="lr-tb"/>
    </style:style>
    <style:style style:name="Tableau30" style:family="table">
      <style:table-properties style:width="17.582cm" fo:margin-left="0cm" table:align="left"/>
    </style:style>
    <style:style style:name="Tableau30.A" style:family="table-column">
      <style:table-column-properties style:column-width="4.396cm"/>
    </style:style>
    <style:style style:name="Tableau30.A1" style:family="table-cell">
      <style:table-cell-properties fo:padding-left="0.191cm" fo:padding-right="0.191cm" fo:padding-top="0cm" fo:padding-bottom="0cm" fo:border="0.5pt solid #404040" style:writing-mode="lr-tb"/>
    </style:style>
    <style:style style:name="Tableau31" style:family="table">
      <style:table-properties style:width="17.582cm" fo:margin-left="0cm" table:align="left"/>
    </style:style>
    <style:style style:name="Tableau31.A" style:family="table-column">
      <style:table-column-properties style:column-width="3.515cm"/>
    </style:style>
    <style:style style:name="Tableau31.C" style:family="table-column">
      <style:table-column-properties style:column-width="3.517cm"/>
    </style:style>
    <style:style style:name="Tableau31.A1" style:family="table-cell">
      <style:table-cell-properties fo:padding-left="0.191cm" fo:padding-right="0.191cm" fo:padding-top="0cm" fo:padding-bottom="0cm" fo:border="0.5pt solid #000000" style:writing-mode="lr-tb"/>
    </style:style>
    <style:style style:name="Tableau32" style:family="table">
      <style:table-properties style:width="17.6cm" style:rel-width="100%" fo:margin-left="0cm" table:align="left"/>
    </style:style>
    <style:style style:name="Tableau32.A" style:family="table-column">
      <style:table-column-properties style:column-width="8.8cm" style:rel-column-width="4984*"/>
    </style:style>
    <style:style style:name="Tableau32.A1" style:family="table-cell">
      <style:table-cell-properties fo:padding-left="0.191cm" fo:padding-right="0.191cm" fo:padding-top="0cm" fo:padding-bottom="0cm" fo:border="0.5pt solid #404040" style:writing-mode="lr-tb"/>
    </style:style>
    <style:style style:name="Tableau33" style:family="table">
      <style:table-properties style:width="17.582cm" fo:margin-left="0cm" table:align="left"/>
    </style:style>
    <style:style style:name="Tableau33.A" style:family="table-column">
      <style:table-column-properties style:column-width="4.396cm"/>
    </style:style>
    <style:style style:name="Tableau33.A1" style:family="table-cell">
      <style:table-cell-properties fo:padding-left="0.191cm" fo:padding-right="0.191cm" fo:padding-top="0cm" fo:padding-bottom="0cm" fo:border="0.5pt solid #404040" style:writing-mode="lr-tb"/>
    </style:style>
    <style:style style:name="Tableau34" style:family="table">
      <style:table-properties style:width="17.582cm" fo:margin-left="0cm" table:align="left"/>
    </style:style>
    <style:style style:name="Tableau34.A" style:family="table-column">
      <style:table-column-properties style:column-width="5.86cm"/>
    </style:style>
    <style:style style:name="Tableau34.B" style:family="table-column">
      <style:table-column-properties style:column-width="5.861cm"/>
    </style:style>
    <style:style style:name="Tableau34.A1" style:family="table-cell">
      <style:table-cell-properties fo:padding-left="0.191cm" fo:padding-right="0.191cm" fo:padding-top="0cm" fo:padding-bottom="0cm" fo:border="0.5pt solid #000000" style:writing-mode="lr-tb"/>
    </style:style>
    <style:style style:name="Tableau35" style:family="table">
      <style:table-properties style:width="17.582cm" fo:margin-left="0cm" table:align="left"/>
    </style:style>
    <style:style style:name="Tableau35.A" style:family="table-column">
      <style:table-column-properties style:column-width="5.86cm"/>
    </style:style>
    <style:style style:name="Tableau35.B" style:family="table-column">
      <style:table-column-properties style:column-width="5.861cm"/>
    </style:style>
    <style:style style:name="Tableau35.A1" style:family="table-cell">
      <style:table-cell-properties fo:padding-left="0.191cm" fo:padding-right="0.191cm" fo:padding-top="0cm" fo:padding-bottom="0cm" fo:border="0.5pt solid #000000" style:writing-mode="lr-tb"/>
    </style:style>
    <style:style style:name="Tableau36" style:family="table">
      <style:table-properties style:width="17.582cm" fo:margin-left="0cm" table:align="left"/>
    </style:style>
    <style:style style:name="Tableau36.A" style:family="table-column">
      <style:table-column-properties style:column-width="8.791cm"/>
    </style:style>
    <style:style style:name="Tableau36.A1" style:family="table-cell">
      <style:table-cell-properties fo:padding-left="0.191cm" fo:padding-right="0.191cm" fo:padding-top="0cm" fo:padding-bottom="0cm" fo:border="0.5pt solid #000000" style:writing-mode="lr-tb"/>
    </style:style>
    <style:style style:name="Tableau36.9" style:family="table-row">
      <style:table-row-properties style:min-row-height="0.441cm" style:use-optimal-row-height="false"/>
    </style:style>
    <style:style style:name="Tableau37" style:family="table">
      <style:table-properties style:width="17.582cm" fo:margin-left="0cm" table:align="left"/>
    </style:style>
    <style:style style:name="Tableau37.A" style:family="table-column">
      <style:table-column-properties style:column-width="5.86cm"/>
    </style:style>
    <style:style style:name="Tableau37.B" style:family="table-column">
      <style:table-column-properties style:column-width="5.861cm"/>
    </style:style>
    <style:style style:name="Tableau37.A1" style:family="table-cell">
      <style:table-cell-properties fo:padding-left="0.191cm" fo:padding-right="0.191cm" fo:padding-top="0cm" fo:padding-bottom="0cm" fo:border="0.5pt solid #000000" style:writing-mode="lr-tb"/>
    </style:style>
    <style:style style:name="Tableau38" style:family="table">
      <style:table-properties style:width="17.582cm" fo:margin-left="0cm" table:align="left"/>
    </style:style>
    <style:style style:name="Tableau38.A" style:family="table-column">
      <style:table-column-properties style:column-width="5.86cm"/>
    </style:style>
    <style:style style:name="Tableau38.B" style:family="table-column">
      <style:table-column-properties style:column-width="5.861cm"/>
    </style:style>
    <style:style style:name="Tableau38.A1" style:family="table-cell">
      <style:table-cell-properties fo:padding-left="0.191cm" fo:padding-right="0.191cm" fo:padding-top="0cm" fo:padding-bottom="0cm" fo:border="0.5pt solid #000000" style:writing-mode="lr-tb"/>
    </style:style>
    <style:style style:name="Tableau39" style:family="table">
      <style:table-properties style:width="17.582cm" fo:margin-left="0cm" table:align="left"/>
    </style:style>
    <style:style style:name="Tableau39.A" style:family="table-column">
      <style:table-column-properties style:column-width="5.86cm"/>
    </style:style>
    <style:style style:name="Tableau39.B" style:family="table-column">
      <style:table-column-properties style:column-width="5.861cm"/>
    </style:style>
    <style:style style:name="Tableau39.A1" style:family="table-cell">
      <style:table-cell-properties fo:padding-left="0.191cm" fo:padding-right="0.191cm" fo:padding-top="0cm" fo:padding-bottom="0cm" fo:border="0.5pt solid #000000" style:writing-mode="lr-tb"/>
    </style:style>
    <style:style style:name="Tableau40" style:family="table">
      <style:table-properties style:width="17.582cm" fo:margin-left="0cm" table:align="left"/>
    </style:style>
    <style:style style:name="Tableau40.A" style:family="table-column">
      <style:table-column-properties style:column-width="5.86cm"/>
    </style:style>
    <style:style style:name="Tableau40.B" style:family="table-column">
      <style:table-column-properties style:column-width="5.861cm"/>
    </style:style>
    <style:style style:name="Tableau40.A1" style:family="table-cell">
      <style:table-cell-properties fo:padding-left="0.191cm" fo:padding-right="0.191cm" fo:padding-top="0cm" fo:padding-bottom="0cm" fo:border="0.5pt solid #000000" style:writing-mode="lr-tb"/>
    </style:style>
    <style:style style:name="Tableau41" style:family="table">
      <style:table-properties style:width="17.582cm" fo:margin-left="0cm" table:align="left"/>
    </style:style>
    <style:style style:name="Tableau41.A" style:family="table-column">
      <style:table-column-properties style:column-width="5.86cm"/>
    </style:style>
    <style:style style:name="Tableau41.B" style:family="table-column">
      <style:table-column-properties style:column-width="5.861cm"/>
    </style:style>
    <style:style style:name="Tableau41.A1" style:family="table-cell">
      <style:table-cell-properties fo:padding-left="0.191cm" fo:padding-right="0.191cm" fo:padding-top="0cm" fo:padding-bottom="0cm" fo:border="0.5pt solid #000000" style:writing-mode="lr-tb"/>
    </style:style>
    <style:style style:name="Tableau42" style:family="table">
      <style:table-properties style:width="17.582cm" fo:margin-left="0cm" table:align="left"/>
    </style:style>
    <style:style style:name="Tableau42.A" style:family="table-column">
      <style:table-column-properties style:column-width="5.86cm"/>
    </style:style>
    <style:style style:name="Tableau42.B" style:family="table-column">
      <style:table-column-properties style:column-width="5.861cm"/>
    </style:style>
    <style:style style:name="Tableau42.A1" style:family="table-cell">
      <style:table-cell-properties fo:padding-left="0.191cm" fo:padding-right="0.191cm" fo:padding-top="0cm" fo:padding-bottom="0cm" fo:border="0.5pt solid #000000" style:writing-mode="lr-tb"/>
    </style:style>
    <style:style style:name="Tableau44" style:family="table">
      <style:table-properties style:width="17.582cm" fo:margin-left="0cm" table:align="left"/>
    </style:style>
    <style:style style:name="Tableau44.A" style:family="table-column">
      <style:table-column-properties style:column-width="5.86cm"/>
    </style:style>
    <style:style style:name="Tableau44.B" style:family="table-column">
      <style:table-column-properties style:column-width="5.861cm"/>
    </style:style>
    <style:style style:name="Tableau44.A1" style:family="table-cell">
      <style:table-cell-properties fo:padding-left="0.191cm" fo:padding-right="0.191cm" fo:padding-top="0cm" fo:padding-bottom="0cm" fo:border="0.5pt solid #000000" style:writing-mode="lr-tb"/>
    </style:style>
    <style:style style:name="Tableau45" style:family="table">
      <style:table-properties style:width="17.6cm" style:rel-width="100%" fo:margin-left="0cm" table:align="left"/>
    </style:style>
    <style:style style:name="Tableau45.A" style:family="table-column">
      <style:table-column-properties style:column-width="8.8cm" style:rel-column-width="4989*"/>
    </style:style>
    <style:style style:name="Tableau45.A1" style:family="table-cell">
      <style:table-cell-properties fo:padding="0cm" fo:border="none" style:writing-mode="lr-tb"/>
    </style:style>
    <style:style style:name="Tableau46" style:family="table">
      <style:table-properties style:width="17.6cm" style:rel-width="100%" fo:margin-left="0cm" table:align="left"/>
    </style:style>
    <style:style style:name="Tableau46.A" style:family="table-column">
      <style:table-column-properties style:column-width="17.6cm" style:rel-column-width="9978*"/>
    </style:style>
    <style:style style:name="Tableau46.A1" style:family="table-cell">
      <style:table-cell-properties fo:padding="0cm" fo:border="none" style:writing-mode="lr-tb"/>
    </style:style>
    <style:style style:name="Tableau81" style:family="table">
      <style:table-properties style:width="17.582cm" fo:margin-left="0cm" table:align="left"/>
    </style:style>
    <style:style style:name="Tableau81.A" style:family="table-column">
      <style:table-column-properties style:column-width="3.515cm"/>
    </style:style>
    <style:style style:name="Tableau81.C" style:family="table-column">
      <style:table-column-properties style:column-width="3.517cm"/>
    </style:style>
    <style:style style:name="Tableau81.A1" style:family="table-cell">
      <style:table-cell-properties fo:padding-left="0.191cm" fo:padding-right="0.191cm" fo:padding-top="0cm" fo:padding-bottom="0cm" fo:border="0.5pt solid #000000" style:writing-mode="lr-tb"/>
    </style:style>
    <style:style style:name="Tableau83" style:family="table">
      <style:table-properties style:width="17.582cm" fo:margin-left="0cm" table:align="left"/>
    </style:style>
    <style:style style:name="Tableau83.A" style:family="table-column">
      <style:table-column-properties style:column-width="3.515cm"/>
    </style:style>
    <style:style style:name="Tableau83.C" style:family="table-column">
      <style:table-column-properties style:column-width="3.517cm"/>
    </style:style>
    <style:style style:name="Tableau83.A1" style:family="table-cell">
      <style:table-cell-properties fo:padding-left="0.191cm" fo:padding-right="0.191cm" fo:padding-top="0cm" fo:padding-bottom="0cm" fo:border="0.5pt solid #000000" style:writing-mode="lr-tb"/>
    </style:style>
    <style:style style:name="Tableau47" style:family="table">
      <style:table-properties style:width="17.582cm" fo:margin-left="0cm" table:align="left"/>
    </style:style>
    <style:style style:name="Tableau47.A" style:family="table-column">
      <style:table-column-properties style:column-width="3.992cm"/>
    </style:style>
    <style:style style:name="Tableau47.B" style:family="table-column">
      <style:table-column-properties style:column-width="3.376cm"/>
    </style:style>
    <style:style style:name="Tableau47.C" style:family="table-column">
      <style:table-column-properties style:column-width="3.344cm"/>
    </style:style>
    <style:style style:name="Tableau47.D" style:family="table-column">
      <style:table-column-properties style:column-width="3.374cm"/>
    </style:style>
    <style:style style:name="Tableau47.E" style:family="table-column">
      <style:table-column-properties style:column-width="3.496cm"/>
    </style:style>
    <style:style style:name="Tableau47.A1" style:family="table-cell">
      <style:table-cell-properties fo:padding-left="0.191cm" fo:padding-right="0.191cm" fo:padding-top="0cm" fo:padding-bottom="0cm" fo:border="0.5pt solid #000000" style:writing-mode="lr-tb"/>
    </style:style>
    <style:style style:name="Tableau48" style:family="table">
      <style:table-properties style:width="17.582cm" fo:margin-left="0cm" table:align="left"/>
    </style:style>
    <style:style style:name="Tableau48.A" style:family="table-column">
      <style:table-column-properties style:column-width="2.568cm"/>
    </style:style>
    <style:style style:name="Tableau48.B" style:family="table-column">
      <style:table-column-properties style:column-width="2.505cm"/>
    </style:style>
    <style:style style:name="Tableau48.C" style:family="table-column">
      <style:table-column-properties style:column-width="2.496cm"/>
    </style:style>
    <style:style style:name="Tableau48.D" style:family="table-column">
      <style:table-column-properties style:column-width="2.494cm"/>
    </style:style>
    <style:style style:name="Tableau48.F" style:family="table-column">
      <style:table-column-properties style:column-width="2.506cm"/>
    </style:style>
    <style:style style:name="Tableau48.G" style:family="table-column">
      <style:table-column-properties style:column-width="2.508cm"/>
    </style:style>
    <style:style style:name="Tableau48.A1" style:family="table-cell">
      <style:table-cell-properties fo:padding-left="0.191cm" fo:padding-right="0.191cm" fo:padding-top="0cm" fo:padding-bottom="0cm" fo:border="0.5pt solid #000000" style:writing-mode="lr-tb"/>
    </style:style>
    <style:style style:name="Tableau43" style:family="table">
      <style:table-properties style:width="17.6cm" table:align="margins"/>
    </style:style>
    <style:style style:name="Tableau43.A" style:family="table-column">
      <style:table-column-properties style:column-width="5.867cm" style:rel-column-width="21845*"/>
    </style:style>
    <style:style style:name="Tableau43.A1" style:family="table-cell">
      <style:table-cell-properties fo:padding="0.097cm" fo:border-left="0.5pt solid #000000" fo:border-right="none" fo:border-top="0.5pt solid #000000" fo:border-bottom="0.5pt solid #000000"/>
    </style:style>
    <style:style style:name="Tableau43.C1" style:family="table-cell">
      <style:table-cell-properties fo:padding="0.097cm" fo:border="0.5pt solid #000000"/>
    </style:style>
    <style:style style:name="Tableau43.A2" style:family="table-cell">
      <style:table-cell-properties fo:padding="0.097cm" fo:border-left="0.5pt solid #000000" fo:border-right="none" fo:border-top="none" fo:border-bottom="0.5pt solid #000000"/>
    </style:style>
    <style:style style:name="Tableau43.C2" style:family="table-cell">
      <style:table-cell-properties fo:padding="0.097cm" fo:border-left="0.5pt solid #000000" fo:border-right="0.5pt solid #000000" fo:border-top="none" fo:border-bottom="0.5pt solid #000000"/>
    </style:style>
    <style:style style:name="Tableau49" style:family="table">
      <style:table-properties style:width="17.582cm" fo:margin-left="0cm" table:align="left"/>
    </style:style>
    <style:style style:name="Tableau49.A" style:family="table-column">
      <style:table-column-properties style:column-width="2.058cm"/>
    </style:style>
    <style:style style:name="Tableau49.B" style:family="table-column">
      <style:table-column-properties style:column-width="3.854cm"/>
    </style:style>
    <style:style style:name="Tableau49.C" style:family="table-column">
      <style:table-column-properties style:column-width="1.439cm"/>
    </style:style>
    <style:style style:name="Tableau49.D" style:family="table-column">
      <style:table-column-properties style:column-width="4.103cm"/>
    </style:style>
    <style:style style:name="Tableau49.F" style:family="table-column">
      <style:table-column-properties style:column-width="3.249cm"/>
    </style:style>
    <style:style style:name="Tableau49.A1" style:family="table-cell">
      <style:table-cell-properties fo:padding-left="0.191cm" fo:padding-right="0.191cm" fo:padding-top="0cm" fo:padding-bottom="0cm" fo:border="0.5pt solid #000000" style:writing-mode="lr-tb"/>
    </style:style>
    <style:style style:name="Tableau50" style:family="table">
      <style:table-properties style:width="17.582cm" fo:margin-left="0cm" table:align="left"/>
    </style:style>
    <style:style style:name="Tableau50.A" style:family="table-column">
      <style:table-column-properties style:column-width="2.623cm"/>
    </style:style>
    <style:style style:name="Tableau50.B" style:family="table-column">
      <style:table-column-properties style:column-width="2.572cm"/>
    </style:style>
    <style:style style:name="Tableau50.C" style:family="table-column">
      <style:table-column-properties style:column-width="2.152cm"/>
    </style:style>
    <style:style style:name="Tableau50.D" style:family="table-column">
      <style:table-column-properties style:column-width="2.397cm"/>
    </style:style>
    <style:style style:name="Tableau50.E" style:family="table-column">
      <style:table-column-properties style:column-width="1.879cm"/>
    </style:style>
    <style:style style:name="Tableau50.F" style:family="table-column">
      <style:table-column-properties style:column-width="1.903cm"/>
    </style:style>
    <style:style style:name="Tableau50.G" style:family="table-column">
      <style:table-column-properties style:column-width="1.436cm"/>
    </style:style>
    <style:style style:name="Tableau50.H" style:family="table-column">
      <style:table-column-properties style:column-width="2.621cm"/>
    </style:style>
    <style:style style:name="Tableau50.A1" style:family="table-cell">
      <style:table-cell-properties fo:padding-left="0.191cm" fo:padding-right="0.191cm" fo:padding-top="0cm" fo:padding-bottom="0cm" fo:border="0.5pt solid #000000" style:writing-mode="lr-tb"/>
    </style:style>
    <style:style style:name="Tableau51" style:family="table">
      <style:table-properties style:width="17.582cm" fo:margin-left="0cm" table:align="left"/>
    </style:style>
    <style:style style:name="Tableau51.A" style:family="table-column">
      <style:table-column-properties style:column-width="3.743cm"/>
    </style:style>
    <style:style style:name="Tableau51.B" style:family="table-column">
      <style:table-column-properties style:column-width="2.75cm"/>
    </style:style>
    <style:style style:name="Tableau51.C" style:family="table-column">
      <style:table-column-properties style:column-width="1.75cm"/>
    </style:style>
    <style:style style:name="Tableau51.E" style:family="table-column">
      <style:table-column-properties style:column-width="2cm"/>
    </style:style>
    <style:style style:name="Tableau51.F" style:family="table-column">
      <style:table-column-properties style:column-width="1.501cm"/>
    </style:style>
    <style:style style:name="Tableau51.G" style:family="table-column">
      <style:table-column-properties style:column-width="1.436cm"/>
    </style:style>
    <style:style style:name="Tableau51.H" style:family="table-column">
      <style:table-column-properties style:column-width="2.653cm"/>
    </style:style>
    <style:style style:name="Tableau51.A1" style:family="table-cell">
      <style:table-cell-properties fo:padding-left="0.191cm" fo:padding-right="0.191cm" fo:padding-top="0cm" fo:padding-bottom="0cm" fo:border="0.5pt solid #000000" style:writing-mode="lr-tb"/>
    </style:style>
    <style:style style:name="Tableau52" style:family="table">
      <style:table-properties style:width="17.582cm" fo:margin-left="0cm" table:align="left"/>
    </style:style>
    <style:style style:name="Tableau52.A" style:family="table-column">
      <style:table-column-properties style:column-width="5.86cm"/>
    </style:style>
    <style:style style:name="Tableau52.B" style:family="table-column">
      <style:table-column-properties style:column-width="5.861cm"/>
    </style:style>
    <style:style style:name="Tableau52.A1" style:family="table-cell">
      <style:table-cell-properties fo:padding-left="0.191cm" fo:padding-right="0.191cm" fo:padding-top="0cm" fo:padding-bottom="0cm" fo:border="0.5pt solid #000000" style:writing-mode="lr-tb"/>
    </style:style>
    <style:style style:name="Tableau53" style:family="table">
      <style:table-properties style:width="17.582cm" fo:margin-left="0cm" table:align="left"/>
    </style:style>
    <style:style style:name="Tableau53.A" style:family="table-column">
      <style:table-column-properties style:column-width="8.791cm"/>
    </style:style>
    <style:style style:name="Tableau53.A1" style:family="table-cell">
      <style:table-cell-properties fo:padding-left="0.191cm" fo:padding-right="0.191cm" fo:padding-top="0cm" fo:padding-bottom="0cm" fo:border="0.5pt solid #000000" style:writing-mode="lr-tb"/>
    </style:style>
    <style:style style:name="Tableau54" style:family="table">
      <style:table-properties style:width="17.582cm" fo:margin-left="0cm" table:align="left"/>
    </style:style>
    <style:style style:name="Tableau54.A" style:family="table-column">
      <style:table-column-properties style:column-width="8.791cm"/>
    </style:style>
    <style:style style:name="Tableau54.A1" style:family="table-cell">
      <style:table-cell-properties fo:padding-left="0.191cm" fo:padding-right="0.191cm" fo:padding-top="0cm" fo:padding-bottom="0cm" fo:border="0.5pt solid #000000" style:writing-mode="lr-tb"/>
    </style:style>
    <style:style style:name="Tableau55" style:family="table">
      <style:table-properties style:width="17.6cm" style:rel-width="100%" fo:margin-left="0cm" table:align="left"/>
    </style:style>
    <style:style style:name="Tableau55.A" style:family="table-column">
      <style:table-column-properties style:column-width="8.8cm" style:rel-column-width="4989*"/>
    </style:style>
    <style:style style:name="Tableau55.A1" style:family="table-cell">
      <style:table-cell-properties fo:padding="0cm" fo:border="none" style:writing-mode="lr-tb"/>
    </style:style>
    <style:style style:name="Tableau56" style:family="table">
      <style:table-properties style:width="17.582cm" fo:margin-left="0cm" table:align="left"/>
    </style:style>
    <style:style style:name="Tableau56.A" style:family="table-column">
      <style:table-column-properties style:column-width="5.86cm"/>
    </style:style>
    <style:style style:name="Tableau56.B" style:family="table-column">
      <style:table-column-properties style:column-width="5.861cm"/>
    </style:style>
    <style:style style:name="Tableau56.A1" style:family="table-cell">
      <style:table-cell-properties fo:padding-left="0.191cm" fo:padding-right="0.191cm" fo:padding-top="0cm" fo:padding-bottom="0cm" fo:border="0.5pt solid #000000" style:writing-mode="lr-tb"/>
    </style:style>
    <style:style style:name="Tableau57" style:family="table">
      <style:table-properties style:width="17.582cm" fo:margin-left="0cm" table:align="left"/>
    </style:style>
    <style:style style:name="Tableau57.A" style:family="table-column">
      <style:table-column-properties style:column-width="5.86cm"/>
    </style:style>
    <style:style style:name="Tableau57.B" style:family="table-column">
      <style:table-column-properties style:column-width="5.861cm"/>
    </style:style>
    <style:style style:name="Tableau57.A1" style:family="table-cell">
      <style:table-cell-properties fo:padding-left="0.191cm" fo:padding-right="0.191cm" fo:padding-top="0cm" fo:padding-bottom="0cm" fo:border="0.5pt solid #000000" style:writing-mode="lr-tb"/>
    </style:style>
    <style:style style:name="Tableau58" style:family="table">
      <style:table-properties style:width="17.582cm" fo:margin-left="0cm" table:align="left"/>
    </style:style>
    <style:style style:name="Tableau58.A" style:family="table-column">
      <style:table-column-properties style:column-width="5.86cm"/>
    </style:style>
    <style:style style:name="Tableau58.B" style:family="table-column">
      <style:table-column-properties style:column-width="5.861cm"/>
    </style:style>
    <style:style style:name="Tableau58.A1" style:family="table-cell">
      <style:table-cell-properties fo:padding-left="0.191cm" fo:padding-right="0.191cm" fo:padding-top="0cm" fo:padding-bottom="0cm" fo:border="0.5pt solid #000000" style:writing-mode="lr-tb"/>
    </style:style>
    <style:style style:name="Tableau59" style:family="table">
      <style:table-properties style:width="17.582cm" fo:margin-left="0cm" table:align="left"/>
    </style:style>
    <style:style style:name="Tableau59.A" style:family="table-column">
      <style:table-column-properties style:column-width="5.86cm"/>
    </style:style>
    <style:style style:name="Tableau59.B" style:family="table-column">
      <style:table-column-properties style:column-width="5.861cm"/>
    </style:style>
    <style:style style:name="Tableau59.A1" style:family="table-cell">
      <style:table-cell-properties fo:padding-left="0.191cm" fo:padding-right="0.191cm" fo:padding-top="0cm" fo:padding-bottom="0cm" fo:border="0.5pt solid #000000" style:writing-mode="lr-tb"/>
    </style:style>
    <style:style style:name="Tableau60" style:family="table">
      <style:table-properties style:width="17.582cm" fo:margin-left="0cm" table:align="left"/>
    </style:style>
    <style:style style:name="Tableau60.A" style:family="table-column">
      <style:table-column-properties style:column-width="5.86cm"/>
    </style:style>
    <style:style style:name="Tableau60.B" style:family="table-column">
      <style:table-column-properties style:column-width="5.861cm"/>
    </style:style>
    <style:style style:name="Tableau60.A1" style:family="table-cell">
      <style:table-cell-properties fo:padding-left="0.191cm" fo:padding-right="0.191cm" fo:padding-top="0cm" fo:padding-bottom="0cm" fo:border="0.5pt solid #000000" style:writing-mode="lr-tb"/>
    </style:style>
    <style:style style:name="Tableau61" style:family="table">
      <style:table-properties style:width="17.582cm" fo:margin-left="0cm" table:align="left"/>
    </style:style>
    <style:style style:name="Tableau61.A" style:family="table-column">
      <style:table-column-properties style:column-width="8.791cm"/>
    </style:style>
    <style:style style:name="Tableau61.A1" style:family="table-cell">
      <style:table-cell-properties fo:padding-left="0.191cm" fo:padding-right="0.191cm" fo:padding-top="0cm" fo:padding-bottom="0cm" fo:border="0.5pt solid #000000" style:writing-mode="lr-tb"/>
    </style:style>
    <style:style style:name="Tableau62" style:family="table">
      <style:table-properties style:width="17.582cm" fo:margin-left="0cm" table:align="left"/>
    </style:style>
    <style:style style:name="Tableau62.A" style:family="table-column">
      <style:table-column-properties style:column-width="5.86cm"/>
    </style:style>
    <style:style style:name="Tableau62.B" style:family="table-column">
      <style:table-column-properties style:column-width="5.861cm"/>
    </style:style>
    <style:style style:name="Tableau62.A1" style:family="table-cell">
      <style:table-cell-properties fo:padding-left="0.191cm" fo:padding-right="0.191cm" fo:padding-top="0cm" fo:padding-bottom="0cm" fo:border="0.5pt solid #000000" style:writing-mode="lr-tb"/>
    </style:style>
    <style:style style:name="Tableau63" style:family="table">
      <style:table-properties style:width="17.582cm" fo:margin-left="0cm" table:align="left"/>
    </style:style>
    <style:style style:name="Tableau63.A" style:family="table-column">
      <style:table-column-properties style:column-width="8.791cm"/>
    </style:style>
    <style:style style:name="Tableau63.A1" style:family="table-cell">
      <style:table-cell-properties fo:padding-left="0.191cm" fo:padding-right="0.191cm" fo:padding-top="0cm" fo:padding-bottom="0cm" fo:border="0.5pt solid #000000" style:writing-mode="lr-tb"/>
    </style:style>
    <style:style style:name="Tableau64" style:family="table">
      <style:table-properties style:width="17.582cm" fo:margin-left="0cm" table:align="left"/>
    </style:style>
    <style:style style:name="Tableau64.A" style:family="table-column">
      <style:table-column-properties style:column-width="5.86cm"/>
    </style:style>
    <style:style style:name="Tableau64.B" style:family="table-column">
      <style:table-column-properties style:column-width="5.861cm"/>
    </style:style>
    <style:style style:name="Tableau64.A1" style:family="table-cell">
      <style:table-cell-properties fo:padding-left="0.191cm" fo:padding-right="0.191cm" fo:padding-top="0cm" fo:padding-bottom="0cm" fo:border="0.5pt solid #000000" style:writing-mode="lr-tb"/>
    </style:style>
    <style:style style:name="Tableau65" style:family="table">
      <style:table-properties style:width="17.582cm" fo:margin-left="0cm" table:align="left"/>
    </style:style>
    <style:style style:name="Tableau65.A" style:family="table-column">
      <style:table-column-properties style:column-width="8.791cm"/>
    </style:style>
    <style:style style:name="Tableau65.A1" style:family="table-cell">
      <style:table-cell-properties fo:padding-left="0.191cm" fo:padding-right="0.191cm" fo:padding-top="0cm" fo:padding-bottom="0cm" fo:border="0.5pt solid #000000" style:writing-mode="lr-tb"/>
    </style:style>
    <style:style style:name="Tableau66" style:family="table">
      <style:table-properties style:width="17.582cm" fo:margin-left="0cm" table:align="left"/>
    </style:style>
    <style:style style:name="Tableau66.A" style:family="table-column">
      <style:table-column-properties style:column-width="3.515cm"/>
    </style:style>
    <style:style style:name="Tableau66.C" style:family="table-column">
      <style:table-column-properties style:column-width="3.517cm"/>
    </style:style>
    <style:style style:name="Tableau66.A1" style:family="table-cell">
      <style:table-cell-properties fo:padding-left="0.191cm" fo:padding-right="0.191cm" fo:padding-top="0cm" fo:padding-bottom="0cm" fo:border="0.5pt solid #000000" style:writing-mode="lr-tb"/>
    </style:style>
    <style:style style:name="Tableau67" style:family="table">
      <style:table-properties style:width="17.582cm" fo:margin-left="0cm" table:align="left"/>
    </style:style>
    <style:style style:name="Tableau67.A" style:family="table-column">
      <style:table-column-properties style:column-width="8.791cm"/>
    </style:style>
    <style:style style:name="Tableau67.A1" style:family="table-cell">
      <style:table-cell-properties fo:padding-left="0.191cm" fo:padding-right="0.191cm" fo:padding-top="0cm" fo:padding-bottom="0cm" fo:border="0.5pt solid #000000" style:writing-mode="lr-tb"/>
    </style:style>
    <style:style style:name="Tableau68" style:family="table">
      <style:table-properties style:width="17.6cm" style:rel-width="100%" fo:margin-left="0cm" table:align="left"/>
    </style:style>
    <style:style style:name="Tableau68.A" style:family="table-column">
      <style:table-column-properties style:column-width="8.8cm" style:rel-column-width="4984*"/>
    </style:style>
    <style:style style:name="Tableau68.A1" style:family="table-cell">
      <style:table-cell-properties fo:padding="0cm" fo:border="0.5pt solid #767171" style:writing-mode="lr-tb"/>
    </style:style>
    <style:style style:name="Tableau69" style:family="table">
      <style:table-properties style:width="17.582cm" fo:margin-left="0cm" table:align="left"/>
    </style:style>
    <style:style style:name="Tableau69.A" style:family="table-column">
      <style:table-column-properties style:column-width="8.791cm"/>
    </style:style>
    <style:style style:name="Tableau69.A1" style:family="table-cell">
      <style:table-cell-properties fo:padding-left="0.191cm" fo:padding-right="0.191cm" fo:padding-top="0cm" fo:padding-bottom="0cm" fo:border="0.5pt solid #000000" style:writing-mode="lr-tb"/>
    </style:style>
    <style:style style:name="Tableau70" style:family="table">
      <style:table-properties style:width="17.582cm" fo:margin-left="0cm" table:align="left"/>
    </style:style>
    <style:style style:name="Tableau70.A" style:family="table-column">
      <style:table-column-properties style:column-width="8.791cm"/>
    </style:style>
    <style:style style:name="Tableau70.A1" style:family="table-cell">
      <style:table-cell-properties fo:padding-left="0.191cm" fo:padding-right="0.191cm" fo:padding-top="0cm" fo:padding-bottom="0cm" fo:border="0.5pt solid #000000" style:writing-mode="lr-tb"/>
    </style:style>
    <style:style style:name="Tableau71" style:family="table">
      <style:table-properties style:width="17.582cm" fo:margin-left="0cm" table:align="left"/>
    </style:style>
    <style:style style:name="Tableau71.A" style:family="table-column">
      <style:table-column-properties style:column-width="8.791cm"/>
    </style:style>
    <style:style style:name="Tableau71.A1" style:family="table-cell">
      <style:table-cell-properties fo:padding-left="0.191cm" fo:padding-right="0.191cm" fo:padding-top="0cm" fo:padding-bottom="0cm" fo:border="0.5pt solid #000000" style:writing-mode="lr-tb"/>
    </style:style>
    <style:style style:name="Tableau72" style:family="table">
      <style:table-properties style:width="17.582cm" fo:margin-left="0cm" table:align="left"/>
    </style:style>
    <style:style style:name="Tableau72.A" style:family="table-column">
      <style:table-column-properties style:column-width="8.791cm"/>
    </style:style>
    <style:style style:name="Tableau72.A1" style:family="table-cell">
      <style:table-cell-properties fo:padding-left="0.191cm" fo:padding-right="0.191cm" fo:padding-top="0cm" fo:padding-bottom="0cm" fo:border="0.5pt solid #000000" style:writing-mode="lr-tb"/>
    </style:style>
    <style:style style:name="Tableau80" style:family="table">
      <style:table-properties style:width="17.6cm" table:align="margins"/>
    </style:style>
    <style:style style:name="Tableau80.A" style:family="table-column">
      <style:table-column-properties style:column-width="8.8cm" style:rel-column-width="32767*"/>
    </style:style>
    <style:style style:name="Tableau80.B" style:family="table-column">
      <style:table-column-properties style:column-width="8.8cm" style:rel-column-width="32768*"/>
    </style:style>
    <style:style style:name="Tableau80.A1" style:family="table-cell">
      <style:table-cell-properties fo:padding="0.097cm" fo:border-left="0.5pt solid #000000" fo:border-right="none" fo:border-top="0.5pt solid #000000" fo:border-bottom="0.5pt solid #000000"/>
    </style:style>
    <style:style style:name="Tableau80.B1" style:family="table-cell">
      <style:table-cell-properties fo:padding="0.097cm" fo:border="0.5pt solid #000000"/>
    </style:style>
    <style:style style:name="Tableau80.A2" style:family="table-cell">
      <style:table-cell-properties fo:padding="0.097cm" fo:border-left="0.5pt solid #000000" fo:border-right="none" fo:border-top="none" fo:border-bottom="0.5pt solid #000000"/>
    </style:style>
    <style:style style:name="Tableau80.B2" style:family="table-cell">
      <style:table-cell-properties fo:padding="0.097cm" fo:border-left="0.5pt solid #000000" fo:border-right="0.5pt solid #000000" fo:border-top="none" fo:border-bottom="0.5pt solid #000000"/>
    </style:style>
    <style:style style:name="Tableau82" style:family="table">
      <style:table-properties style:width="17.6cm" table:align="margins"/>
    </style:style>
    <style:style style:name="Tableau82.A" style:family="table-column">
      <style:table-column-properties style:column-width="8.8cm" style:rel-column-width="32767*"/>
    </style:style>
    <style:style style:name="Tableau82.B" style:family="table-column">
      <style:table-column-properties style:column-width="8.8cm" style:rel-column-width="32768*"/>
    </style:style>
    <style:style style:name="Tableau82.A1" style:family="table-cell">
      <style:table-cell-properties fo:padding="0.097cm" fo:border-left="0.5pt solid #000000" fo:border-right="none" fo:border-top="0.5pt solid #000000" fo:border-bottom="0.5pt solid #000000"/>
    </style:style>
    <style:style style:name="Tableau82.B1" style:family="table-cell">
      <style:table-cell-properties fo:padding="0.097cm" fo:border="0.5pt solid #000000"/>
    </style:style>
    <style:style style:name="Tableau82.A2" style:family="table-cell">
      <style:table-cell-properties fo:padding="0.097cm" fo:border-left="0.5pt solid #000000" fo:border-right="none" fo:border-top="none" fo:border-bottom="0.5pt solid #000000"/>
    </style:style>
    <style:style style:name="Tableau82.B2" style:family="table-cell">
      <style:table-cell-properties fo:padding="0.097cm" fo:border-left="0.5pt solid #000000" fo:border-right="0.5pt solid #000000" fo:border-top="none" fo:border-bottom="0.5pt solid #000000"/>
    </style:style>
    <style:style style:name="Tableau74" style:family="table">
      <style:table-properties style:width="17.6cm" table:align="margins"/>
    </style:style>
    <style:style style:name="Tableau74.A" style:family="table-column">
      <style:table-column-properties style:column-width="8.8cm" style:rel-column-width="32767*"/>
    </style:style>
    <style:style style:name="Tableau74.B" style:family="table-column">
      <style:table-column-properties style:column-width="8.8cm" style:rel-column-width="32768*"/>
    </style:style>
    <style:style style:name="Tableau74.A1" style:family="table-cell">
      <style:table-cell-properties fo:padding="0.097cm" fo:border-left="0.5pt solid #000000" fo:border-right="none" fo:border-top="0.5pt solid #000000" fo:border-bottom="0.5pt solid #000000"/>
    </style:style>
    <style:style style:name="Tableau74.B1" style:family="table-cell">
      <style:table-cell-properties fo:padding="0.097cm" fo:border="0.5pt solid #000000"/>
    </style:style>
    <style:style style:name="Tableau74.A2" style:family="table-cell">
      <style:table-cell-properties fo:padding="0.097cm" fo:border-left="0.5pt solid #000000" fo:border-right="none" fo:border-top="none" fo:border-bottom="0.5pt solid #000000"/>
    </style:style>
    <style:style style:name="Tableau74.B2" style:family="table-cell">
      <style:table-cell-properties fo:padding="0.097cm" fo:border-left="0.5pt solid #000000" fo:border-right="0.5pt solid #000000" fo:border-top="none" fo:border-bottom="0.5pt solid #000000"/>
    </style:style>
    <style:style style:name="Tableau73" style:family="table">
      <style:table-properties style:width="17.582cm" fo:margin-left="0cm" table:align="left"/>
    </style:style>
    <style:style style:name="Tableau73.A" style:family="table-column">
      <style:table-column-properties style:column-width="2.233cm"/>
    </style:style>
    <style:style style:name="Tableau73.B" style:family="table-column">
      <style:table-column-properties style:column-width="3.323cm"/>
    </style:style>
    <style:style style:name="Tableau73.C" style:family="table-column">
      <style:table-column-properties style:column-width="6.188cm"/>
    </style:style>
    <style:style style:name="Tableau73.D" style:family="table-column">
      <style:table-column-properties style:column-width="5.838cm"/>
    </style:style>
    <style:style style:name="Tableau73.A1" style:family="table-cell">
      <style:table-cell-properties fo:padding-left="0.191cm" fo:padding-right="0.191cm" fo:padding-top="0cm" fo:padding-bottom="0cm" fo:border="0.5pt solid #000000" style:writing-mode="lr-tb"/>
    </style:style>
    <style:style style:name="Tableau75" style:family="table">
      <style:table-properties style:width="17.582cm" fo:margin-left="0cm" table:align="left"/>
    </style:style>
    <style:style style:name="Tableau75.A" style:family="table-column">
      <style:table-column-properties style:column-width="3.242cm"/>
    </style:style>
    <style:style style:name="Tableau75.B" style:family="table-column">
      <style:table-column-properties style:column-width="5.251cm"/>
    </style:style>
    <style:style style:name="Tableau75.C" style:family="table-column">
      <style:table-column-properties style:column-width="9.089cm"/>
    </style:style>
    <style:style style:name="Tableau75.A1" style:family="table-cell">
      <style:table-cell-properties fo:padding-left="0.191cm" fo:padding-right="0.191cm" fo:padding-top="0cm" fo:padding-bottom="0cm" fo:border="0.5pt solid #000000" style:writing-mode="lr-tb"/>
    </style:style>
    <style:style style:name="Tableau76" style:family="table">
      <style:table-properties style:width="17.582cm" fo:margin-left="0cm" table:align="left"/>
    </style:style>
    <style:style style:name="Tableau76.A" style:family="table-column">
      <style:table-column-properties style:column-width="3.743cm"/>
    </style:style>
    <style:style style:name="Tableau76.B" style:family="table-column">
      <style:table-column-properties style:column-width="13.839cm"/>
    </style:style>
    <style:style style:name="Tableau76.A1" style:family="table-cell">
      <style:table-cell-properties fo:padding-left="0.191cm" fo:padding-right="0.191cm" fo:padding-top="0cm" fo:padding-bottom="0cm" fo:border="0.5pt solid #000000" style:writing-mode="lr-tb"/>
    </style:style>
    <style:style style:name="Tableau77" style:family="table">
      <style:table-properties style:width="17.582cm" fo:margin-left="0cm" table:align="left"/>
    </style:style>
    <style:style style:name="Tableau77.A" style:family="table-column">
      <style:table-column-properties style:column-width="4.493cm"/>
    </style:style>
    <style:style style:name="Tableau77.B" style:family="table-column">
      <style:table-column-properties style:column-width="13.09cm"/>
    </style:style>
    <style:style style:name="Tableau77.A1" style:family="table-cell">
      <style:table-cell-properties fo:padding-left="0.191cm" fo:padding-right="0.191cm" fo:padding-top="0cm" fo:padding-bottom="0cm" fo:border="0.5pt solid #000000" style:writing-mode="lr-tb"/>
    </style:style>
    <style:style style:name="Tableau78" style:family="table">
      <style:table-properties style:width="17.582cm" fo:margin-left="0cm" table:align="left"/>
    </style:style>
    <style:style style:name="Tableau78.A" style:family="table-column">
      <style:table-column-properties style:column-width="4.396cm"/>
    </style:style>
    <style:style style:name="Tableau78.A1" style:family="table-cell">
      <style:table-cell-properties fo:padding-left="0.191cm" fo:padding-right="0.191cm" fo:padding-top="0cm" fo:padding-bottom="0cm" fo:border="0.5pt solid #000000" style:writing-mode="lr-tb"/>
    </style:style>
    <style:style style:name="Tableau79" style:family="table">
      <style:table-properties style:width="17.582cm" fo:margin-left="0cm" table:align="left"/>
    </style:style>
    <style:style style:name="Tableau79.A" style:family="table-column">
      <style:table-column-properties style:column-width="8.791cm"/>
    </style:style>
    <style:style style:name="Tableau79.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text-properties fo:font-size="2pt" style:font-size-asian="2pt"/>
    </style:style>
    <style:style style:name="P4" style:family="paragraph" style:parent-style-name="first-paragraph">
      <style:text-properties fo:font-size="7pt" style:font-size-asian="7pt"/>
    </style:style>
    <style:style style:name="P5" style:family="paragraph" style:parent-style-name="Normal">
      <style:paragraph-properties fo:margin-left="1.249cm" fo:margin-right="0cm" fo:text-indent="0cm" style:auto-text-indent="false">
        <style:tab-stops/>
      </style:paragraph-properties>
    </style:style>
    <style:style style:name="P6" style:family="paragraph" style:parent-style-name="Normal_20__28_Web_29_">
      <style:paragraph-properties fo:margin-left="1.27cm" fo:margin-right="0cm" fo:text-indent="0cm" style:auto-text-indent="false">
        <style:tab-stops/>
      </style:paragraph-properties>
    </style:style>
    <style:style style:name="P7" style:family="paragraph" style:parent-style-name="Normal">
      <style:paragraph-properties fo:margin-left="1.27cm" fo:margin-right="0cm" fo:margin-top="0.15cm" fo:margin-bottom="0.15cm" style:contextual-spacing="false" fo:text-indent="0cm" style:auto-text-indent="false" style:vertical-align="auto">
        <style:tab-stops/>
      </style:paragraph-properties>
    </style:style>
    <style:style style:name="P8" style:family="paragraph" style:parent-style-name="Normal">
      <style:paragraph-properties fo:margin-top="0.15cm" fo:margin-bottom="0.15cm" style:contextual-spacing="false"/>
      <style:text-properties fo:color="#000000" loext:opacity="100%" style:font-name-asian="Times New Roman" style:language-asian="fr" style:country-asian="FR"/>
    </style:style>
    <style:style style:name="P9" style:family="paragraph" style:parent-style-name="Normal">
      <style:paragraph-properties fo:margin-top="0.15cm" fo:margin-bottom="0.15cm" style:contextual-spacing="false" style:vertical-align="auto"/>
      <style:text-properties fo:color="#000000" loext:opacity="100%" style:font-name-asian="Times New Roman" style:language-asian="fr" style:country-asian="FR"/>
    </style:style>
    <style:style style:name="P10" style:family="paragraph" style:parent-style-name="Normal">
      <style:paragraph-properties fo:margin-top="0cm" fo:margin-bottom="0cm" style:contextual-spacing="false" style:vertical-align="auto"/>
      <style:text-properties fo:color="#000000" loext:opacity="100%" style:font-name-asian="Times New Roman" style:language-asian="fr" style:country-asian="FR"/>
    </style:style>
    <style:style style:name="P11" style:family="paragraph" style:parent-style-name="Normal">
      <style:paragraph-properties fo:margin-top="0.15cm" fo:margin-bottom="0.15cm" style:contextual-spacing="false" style:vertical-align="auto"/>
      <style:text-properties fo:color="#000000" loext:opacity="100%" style:font-name="Times New Roman" fo:font-size="12pt" style:font-name-asian="Times New Roman" style:font-size-asian="12pt" style:language-asian="fr" style:country-asian="FR" style:font-size-complex="12pt"/>
    </style:style>
    <style:style style:name="P12" style:family="paragraph" style:parent-style-name="Normal">
      <style:paragraph-properties fo:margin-left="1.27cm" fo:margin-right="0cm" fo:margin-top="0cm" fo:margin-bottom="0cm" style:contextual-spacing="false" fo:text-indent="0cm" style:auto-text-indent="false" style:vertical-align="auto">
        <style:tab-stops/>
      </style:paragraph-properties>
      <style:text-properties fo:color="#000000" loext:opacity="100%" style:font-name="Times New Roman" fo:font-size="12pt" style:font-name-asian="Times New Roman" style:font-size-asian="12pt" style:language-asian="fr" style:country-asian="FR" style:font-size-complex="12pt"/>
    </style:style>
    <style:style style:name="P13" style:family="paragraph" style:parent-style-name="Normal">
      <style:paragraph-properties fo:margin-top="0cm" fo:margin-bottom="0cm" style:contextual-spacing="false" style:vertical-align="auto"/>
      <style:text-properties fo:color="#000000" loext:opacity="100%" fo:font-size="12pt" style:font-name-asian="Times New Roman" style:font-size-asian="12pt" style:language-asian="fr" style:country-asian="FR" style:font-size-complex="12pt"/>
    </style:style>
    <style:style style:name="P14" style:family="paragraph" style:parent-style-name="Normal">
      <style:paragraph-properties fo:margin-top="0.15cm" fo:margin-bottom="0.15cm" style:contextual-spacing="false" style:vertical-align="auto"/>
      <style:text-properties fo:color="#000000" loext:opacity="100%" fo:font-style="italic" fo:background-color="#ffff00" style:font-name-asian="Times New Roman" style:language-asian="fr" style:country-asian="FR" style:font-style-asian="italic" style:font-style-complex="italic"/>
    </style:style>
    <style:style style:name="P15" style:family="paragraph" style:parent-style-name="Normal">
      <style:paragraph-properties fo:margin-top="0.15cm" fo:margin-bottom="0.15cm" style:contextual-spacing="false" style:vertical-align="auto"/>
      <style:text-properties fo:color="#000000" loext:opacity="100%" style:font-name="Arial" fo:font-size="11pt" fo:font-style="italic" fo:background-color="#ffff00" style:font-name-asian="Times New Roman" style:font-size-asian="11pt" style:language-asian="fr" style:country-asian="FR" style:font-style-asian="italic" style:font-size-complex="11pt" style:font-style-complex="italic"/>
    </style:style>
    <style:style style:name="P16" style:family="paragraph" style:parent-style-name="Normal">
      <style:paragraph-properties fo:margin-top="0.15cm" fo:margin-bottom="0.15cm" style:contextual-spacing="false" style:vertical-align="auto"/>
      <style:text-properties fo:color="#000000" loext:opacity="100%" style:font-name="Arial" fo:font-size="12pt" style:font-name-asian="Times New Roman" style:font-size-asian="12pt" style:language-asian="fr" style:country-asian="FR" style:font-size-complex="12pt"/>
    </style:style>
    <style:style style:name="P17" style:family="paragraph" style:parent-style-name="Normal">
      <style:paragraph-properties fo:margin-top="0cm" fo:margin-bottom="0cm" style:contextual-spacing="false"/>
      <style:text-properties fo:font-size="12pt" fo:font-weight="bold" style:font-size-asian="12pt" style:font-weight-asian="bold" style:font-size-complex="12pt"/>
    </style:style>
    <style:style style:name="P18" style:family="paragraph" style:parent-style-name="Normal">
      <style:paragraph-properties fo:margin-top="0cm" fo:margin-bottom="0cm" style:contextual-spacing="false"/>
      <style:text-properties fo:font-size="12pt" style:font-size-asian="12pt" style:font-size-complex="12pt"/>
    </style:style>
    <style:style style:name="P19" style:family="paragraph" style:parent-style-name="Sans_20_interligne">
      <style:text-properties fo:font-size="12pt" style:font-size-asian="12pt"/>
    </style:style>
    <style:style style:name="P20" style:family="paragraph" style:parent-style-name="Normal">
      <style:paragraph-properties fo:margin-top="0cm" fo:margin-bottom="0cm" style:contextual-spacing="false"/>
    </style:style>
    <style:style style:name="P21" style:family="paragraph" style:parent-style-name="western">
      <style:paragraph-properties fo:margin-top="0cm" fo:margin-bottom="0cm" style:contextual-spacing="false"/>
    </style:style>
    <style:style style:name="P22" style:family="paragraph" style:parent-style-name="Normal">
      <style:paragraph-properties fo:margin-top="0cm" fo:margin-bottom="0cm" style:contextual-spacing="false"/>
      <style:text-properties style:font-size-complex="12pt"/>
    </style:style>
    <style:style style:name="P23" style:family="paragraph" style:parent-style-name="Normal">
      <style:paragraph-properties fo:margin-top="0cm" fo:margin-bottom="0cm" style:contextual-spacing="false"/>
      <style:text-properties officeooo:rsid="002b9ab6" officeooo:paragraph-rsid="002b9ab6" style:font-size-complex="12pt"/>
    </style:style>
    <style:style style:name="P24" style:family="paragraph" style:parent-style-name="Normal">
      <style:paragraph-properties fo:margin-top="0cm" fo:margin-bottom="0cm" style:contextual-spacing="false"/>
      <style:text-properties officeooo:paragraph-rsid="002b9ab6" style:font-size-complex="12pt"/>
    </style:style>
    <style:style style:name="P25" style:family="paragraph" style:parent-style-name="Normal">
      <style:paragraph-properties fo:margin-top="0cm" fo:margin-bottom="0cm" style:contextual-spacing="false"/>
      <style:text-properties officeooo:rsid="002c9d76" officeooo:paragraph-rsid="002c9d76" style:font-size-complex="12pt"/>
    </style:style>
    <style:style style:name="P26" style:family="paragraph" style:parent-style-name="Normal">
      <style:paragraph-properties fo:margin-top="0cm" fo:margin-bottom="0cm" style:contextual-spacing="false"/>
      <style:text-properties officeooo:paragraph-rsid="002c9d76" style:font-size-complex="12pt"/>
    </style:style>
    <style:style style:name="P27" style:family="paragraph" style:parent-style-name="Normal">
      <style:paragraph-properties fo:margin-top="0cm" fo:margin-bottom="0cm" style:contextual-spacing="false"/>
      <style:text-properties officeooo:paragraph-rsid="00985f7c" style:font-size-complex="12pt"/>
    </style:style>
    <style:style style:name="P28" style:family="paragraph" style:parent-style-name="Normal">
      <style:text-properties fo:font-size="5pt" style:font-size-asian="5pt"/>
    </style:style>
    <style:style style:name="P29" style:family="paragraph" style:parent-style-name="western1">
      <style:text-properties style:use-window-font-color="true" loext:opacity="0%" fo:font-weight="normal" style:font-weight-asian="normal"/>
    </style:style>
    <style:style style:name="P30" style:family="paragraph" style:parent-style-name="western1">
      <style:paragraph-properties fo:text-align="center" style:justify-single-word="false"/>
      <style:text-properties style:use-window-font-color="true" loext:opacity="0%" fo:font-weight="normal" style:font-weight-asian="normal"/>
    </style:style>
    <style:style style:name="P31" style:family="paragraph" style:parent-style-name="western1">
      <style:text-properties style:use-window-font-color="true" loext:opacity="0%" fo:font-weight="normal" officeooo:paragraph-rsid="00086d25" style:font-weight-asian="normal"/>
    </style:style>
    <style:style style:name="P32" style:family="paragraph" style:parent-style-name="western1">
      <style:text-properties style:use-window-font-color="true" loext:opacity="0%" fo:font-weight="normal" officeooo:rsid="003f68cb" officeooo:paragraph-rsid="003f68cb" style:font-weight-asian="normal"/>
    </style:style>
    <style:style style:name="P33" style:family="paragraph" style:parent-style-name="western1">
      <style:text-properties style:use-window-font-color="true" loext:opacity="0%" fo:font-weight="normal" officeooo:paragraph-rsid="0041f486" style:font-weight-asian="normal"/>
    </style:style>
    <style:style style:name="P34" style:family="paragraph" style:parent-style-name="western1">
      <style:paragraph-properties fo:margin-top="0cm" fo:margin-bottom="0.282cm" style:contextual-spacing="false"/>
      <style:text-properties style:use-window-font-color="true" loext:opacity="0%" fo:font-weight="normal" officeooo:rsid="00bec521" officeooo:paragraph-rsid="00bec521" style:font-weight-asian="normal"/>
    </style:style>
    <style:style style:name="P35" style:family="paragraph" style:parent-style-name="western1">
      <style:text-properties style:use-window-font-color="true" loext:opacity="0%"/>
    </style:style>
    <style:style style:name="P36" style:family="paragraph" style:parent-style-name="western2">
      <style:text-properties style:use-window-font-color="true" loext:opacity="0%"/>
    </style:style>
    <style:style style:name="P37" style:family="paragraph" style:parent-style-name="western2">
      <style:paragraph-properties fo:margin-top="0cm" fo:margin-bottom="0.282cm" style:contextual-spacing="false"/>
      <style:text-properties style:use-window-font-color="true" loext:opacity="0%"/>
    </style:style>
    <style:style style:name="P38" style:family="paragraph" style:parent-style-name="western2">
      <style:paragraph-properties fo:margin-top="0cm" fo:margin-bottom="0.282cm" style:contextual-spacing="false"/>
      <style:text-properties style:use-window-font-color="true" loext:opacity="0%" fo:font-size="10pt" style:font-size-asian="10pt" style:font-size-complex="10pt"/>
    </style:style>
    <style:style style:name="P39" style:family="paragraph" style:parent-style-name="western2">
      <style:text-properties style:use-window-font-color="true" loext:opacity="0%" fo:font-size="10pt" style:font-size-asian="10pt" style:font-size-complex="10pt"/>
    </style:style>
    <style:style style:name="P40" style:family="paragraph" style:parent-style-name="western1">
      <style:text-properties style:use-window-font-color="true" loext:opacity="0%" fo:font-size="10pt" style:font-size-asian="10pt" style:font-size-complex="10pt"/>
    </style:style>
    <style:style style:name="P41" style:family="paragraph" style:parent-style-name="western2">
      <style:text-properties style:use-window-font-color="true" loext:opacity="0%" fo:font-size="9pt" style:font-size-asian="9pt" style:font-size-complex="9pt"/>
    </style:style>
    <style:style style:name="P42" style:family="paragraph" style:parent-style-name="western2">
      <style:paragraph-properties fo:margin-top="0cm" fo:margin-bottom="0.282cm" style:contextual-spacing="false"/>
      <style:text-properties style:use-window-font-color="true" loext:opacity="0%" fo:font-size="9pt" style:font-size-asian="9pt" style:font-size-complex="9pt"/>
    </style:style>
    <style:style style:name="P43" style:family="paragraph" style:parent-style-name="western2">
      <style:text-properties style:use-window-font-color="true" loext:opacity="0%" officeooo:rsid="0015692b" officeooo:paragraph-rsid="0015692b"/>
    </style:style>
    <style:style style:name="P44" style:family="paragraph" style:parent-style-name="western2">
      <style:text-properties style:use-window-font-color="true" loext:opacity="0%" officeooo:paragraph-rsid="004691cc"/>
    </style:style>
    <style:style style:name="P45" style:family="paragraph" style:parent-style-name="western2">
      <style:text-properties style:use-window-font-color="true" loext:opacity="0%" officeooo:paragraph-rsid="00486895"/>
    </style:style>
    <style:style style:name="P46" style:family="paragraph" style:parent-style-name="western2">
      <style:text-properties style:use-window-font-color="true" loext:opacity="0%" officeooo:paragraph-rsid="004a220d"/>
    </style:style>
    <style:style style:name="P47" style:family="paragraph" style:parent-style-name="western2">
      <style:text-properties style:use-window-font-color="true" loext:opacity="0%" officeooo:paragraph-rsid="004c1c36"/>
    </style:style>
    <style:style style:name="P48" style:family="paragraph" style:parent-style-name="western1">
      <style:text-properties style:use-window-font-color="true" loext:opacity="0%" officeooo:paragraph-rsid="00a3b4a9"/>
    </style:style>
    <style:style style:name="P49" style:family="paragraph" style:parent-style-name="western1">
      <style:text-properties style:use-window-font-color="true" loext:opacity="0%" officeooo:paragraph-rsid="00a9a63b"/>
    </style:style>
    <style:style style:name="P50" style:family="paragraph" style:parent-style-name="western2">
      <style:paragraph-properties fo:margin-top="0cm" fo:margin-bottom="0.282cm" style:contextual-spacing="false"/>
      <style:text-properties style:use-window-font-color="true" loext:opacity="0%" officeooo:paragraph-rsid="00a9a63b"/>
    </style:style>
    <style:style style:name="P51" style:family="paragraph" style:parent-style-name="western2">
      <style:text-properties style:use-window-font-color="true" loext:opacity="0%" officeooo:paragraph-rsid="00a9a63b"/>
    </style:style>
    <style:style style:name="P52" style:family="paragraph" style:parent-style-name="western2">
      <style:text-properties style:use-window-font-color="true" loext:opacity="0%" fo:font-style="italic" style:font-style-asian="italic" style:font-style-complex="italic"/>
    </style:style>
    <style:style style:name="P53" style:family="paragraph" style:parent-style-name="western2">
      <style:text-properties style:use-window-font-color="true" loext:opacity="0%" officeooo:paragraph-rsid="00b0f871"/>
    </style:style>
    <style:style style:name="P54" style:family="paragraph" style:parent-style-name="Normal">
      <style:paragraph-properties fo:margin-top="0.15cm" fo:margin-bottom="0.15cm" style:contextual-spacing="false" style:vertical-align="auto"/>
    </style:style>
    <style:style style:name="P55" style:family="paragraph" style:parent-style-name="Normal">
      <style:paragraph-properties fo:margin-top="0cm" fo:margin-bottom="0cm" style:contextual-spacing="false" style:vertical-align="auto"/>
    </style:style>
    <style:style style:name="P56" style:family="paragraph" style:parent-style-name="Normal">
      <style:paragraph-properties fo:margin-top="0.15cm" fo:margin-bottom="0.15cm" style:contextual-spacing="false" style:vertical-align="auto"/>
      <style:text-properties officeooo:paragraph-rsid="00086d25"/>
    </style:style>
    <style:style style:name="P57" style:family="paragraph" style:parent-style-name="Normal">
      <style:text-properties style:language-asian="fr" style:country-asian="FR"/>
    </style:style>
    <style:style style:name="P58" style:family="paragraph" style:parent-style-name="Normal">
      <style:text-properties officeooo:paragraph-rsid="004cf1f0" style:language-asian="fr" style:country-asian="FR"/>
    </style:style>
    <style:style style:name="P59" style:family="paragraph" style:parent-style-name="Normal">
      <style:text-properties officeooo:paragraph-rsid="0053041c" style:language-asian="fr" style:country-asian="FR"/>
    </style:style>
    <style:style style:name="P60" style:family="paragraph" style:parent-style-name="Normal">
      <style:text-properties officeooo:paragraph-rsid="005422cf" style:language-asian="fr" style:country-asian="FR"/>
    </style:style>
    <style:style style:name="P61" style:family="paragraph" style:parent-style-name="Normal">
      <style:text-properties officeooo:paragraph-rsid="0055cb41" style:language-asian="fr" style:country-asian="FR"/>
    </style:style>
    <style:style style:name="P62" style:family="paragraph" style:parent-style-name="Normal">
      <style:text-properties officeooo:paragraph-rsid="005b62a1" style:language-asian="fr" style:country-asian="FR"/>
    </style:style>
    <style:style style:name="P63" style:family="paragraph" style:parent-style-name="Normal">
      <style:text-properties officeooo:paragraph-rsid="005c3a7a" style:language-asian="fr" style:country-asian="FR"/>
    </style:style>
    <style:style style:name="P64" style:family="paragraph" style:parent-style-name="Normal">
      <style:text-properties officeooo:paragraph-rsid="005d3c48" style:language-asian="fr" style:country-asian="FR"/>
    </style:style>
    <style:style style:name="P65" style:family="paragraph" style:parent-style-name="Normal">
      <style:text-properties officeooo:paragraph-rsid="0061e2c3" style:language-asian="fr" style:country-asian="FR"/>
    </style:style>
    <style:style style:name="P66" style:family="paragraph" style:parent-style-name="Normal">
      <style:text-properties officeooo:paragraph-rsid="00628cfc" style:language-asian="fr" style:country-asian="FR"/>
    </style:style>
    <style:style style:name="P67" style:family="paragraph" style:parent-style-name="Normal">
      <style:text-properties officeooo:paragraph-rsid="00635a29" style:language-asian="fr" style:country-asian="FR"/>
    </style:style>
    <style:style style:name="P68" style:family="paragraph" style:parent-style-name="Normal">
      <style:text-properties officeooo:rsid="00635a29" officeooo:paragraph-rsid="00635a29" style:language-asian="fr" style:country-asian="FR"/>
    </style:style>
    <style:style style:name="P69" style:family="paragraph" style:parent-style-name="Normal">
      <style:text-properties officeooo:paragraph-rsid="00641891" style:language-asian="fr" style:country-asian="FR"/>
    </style:style>
    <style:style style:name="P70" style:family="paragraph" style:parent-style-name="Normal">
      <style:text-properties officeooo:paragraph-rsid="00661811" style:language-asian="fr" style:country-asian="FR"/>
    </style:style>
    <style:style style:name="P71" style:family="paragraph" style:parent-style-name="Normal">
      <style:text-properties fo:font-size="3pt" style:font-size-asian="3pt"/>
    </style:style>
    <style:style style:name="P72" style:family="paragraph" style:parent-style-name="Normal">
      <style:text-properties fo:font-size="4pt" style:font-size-asian="4pt"/>
    </style:style>
    <style:style style:name="P73" style:family="paragraph" style:parent-style-name="western2">
      <style:paragraph-properties fo:margin-top="0cm" fo:margin-bottom="0.282cm" style:contextual-spacing="false"/>
    </style:style>
    <style:style style:name="P74" style:family="paragraph" style:parent-style-name="Sans_20_interligne">
      <style:text-properties fo:font-weight="bold" style:font-weight-asian="bold"/>
    </style:style>
    <style:style style:name="P75" style:family="paragraph" style:parent-style-name="Normal">
      <style:paragraph-properties fo:margin-left="0.079cm" fo:margin-right="0.079cm" fo:margin-top="0.15cm" fo:margin-bottom="0.15cm" style:contextual-spacing="false" fo:text-indent="0cm" style:auto-text-indent="false" style:vertical-align="auto">
        <style:tab-stops/>
      </style:paragraph-properties>
      <style:text-properties fo:color="#172b4d" loext:opacity="100%" style:font-name-asian="Times New Roman" style:language-asian="fr" style:country-asian="FR"/>
    </style:style>
    <style:style style:name="P76" style:family="paragraph" style:parent-style-name="Table_20_Contents">
      <style:text-properties officeooo:rsid="000c64c1" officeooo:paragraph-rsid="000c64c1"/>
    </style:style>
    <style:style style:name="P77" style:family="paragraph" style:parent-style-name="Text_20_body">
      <style:text-properties officeooo:rsid="000c64c1" officeooo:paragraph-rsid="000c64c1"/>
    </style:style>
    <style:style style:name="P78" style:family="paragraph" style:parent-style-name="Text_20_body">
      <style:text-properties officeooo:paragraph-rsid="000a8769"/>
    </style:style>
    <style:style style:name="P79" style:family="paragraph" style:parent-style-name="Text_20_body">
      <style:text-properties officeooo:paragraph-rsid="000c64c1"/>
    </style:style>
    <style:style style:name="P80" style:family="paragraph" style:parent-style-name="western">
      <style:text-properties fo:font-style="italic" officeooo:rsid="0007a077" officeooo:paragraph-rsid="0007a077" fo:background-color="#ffff00" style:font-style-asian="italic" style:font-style-complex="italic"/>
    </style:style>
    <style:style style:name="P81" style:family="paragraph" style:parent-style-name="western">
      <style:text-properties fo:font-style="italic" officeooo:rsid="0007a077" officeooo:paragraph-rsid="0032885d" fo:background-color="#ffff00" style:font-style-asian="italic" style:font-style-complex="italic"/>
    </style:style>
    <style:style style:name="P82" style:family="paragraph" style:parent-style-name="western">
      <style:text-properties fo:font-style="italic" officeooo:rsid="0007a077" officeooo:paragraph-rsid="00373745" fo:background-color="#ffff00" style:font-style-asian="italic" style:font-style-complex="italic"/>
    </style:style>
    <style:style style:name="P83" style:family="paragraph" style:parent-style-name="western">
      <style:text-properties fo:font-style="italic" officeooo:rsid="0007a077" officeooo:paragraph-rsid="0037bd6e" fo:background-color="#ffff00" style:font-style-asian="italic" style:font-style-complex="italic"/>
    </style:style>
    <style:style style:name="P84" style:family="paragraph" style:parent-style-name="Standard">
      <style:text-properties fo:font-style="italic" officeooo:rsid="0007a077" officeooo:paragraph-rsid="00a9a63b" fo:background-color="#ffff00" style:font-style-asian="italic" style:font-style-complex="italic"/>
    </style:style>
    <style:style style:name="P85" style:family="paragraph" style:parent-style-name="western">
      <style:text-properties fo:font-style="italic" officeooo:rsid="0007a077" officeooo:paragraph-rsid="00a9a63b" fo:background-color="#ffff00" style:font-style-asian="italic" style:font-style-complex="italic"/>
    </style:style>
    <style:style style:name="P86" style:family="paragraph" style:parent-style-name="western">
      <style:text-properties fo:font-style="italic" officeooo:rsid="0007a077" officeooo:paragraph-rsid="00a04ce1" fo:background-color="#ffff00" style:font-style-asian="italic" style:font-style-complex="italic"/>
    </style:style>
    <style:style style:name="P87" style:family="paragraph" style:parent-style-name="western">
      <style:text-properties fo:font-style="italic" officeooo:rsid="0007a077" officeooo:paragraph-rsid="00a6b0dc" fo:background-color="#ffff00" style:font-style-asian="italic" style:font-style-complex="italic"/>
    </style:style>
    <style:style style:name="P88" style:family="paragraph" style:parent-style-name="western">
      <style:text-properties fo:font-style="italic" officeooo:rsid="0007a077" officeooo:paragraph-rsid="0034bd90" fo:background-color="#ffff00" style:font-style-asian="italic" style:font-style-complex="italic"/>
    </style:style>
    <style:style style:name="P89" style:family="paragraph" style:parent-style-name="Standard">
      <style:text-properties fo:font-style="italic" officeooo:rsid="004cf1f0" officeooo:paragraph-rsid="00635a29" fo:background-color="#ffff00" style:font-style-asian="italic" style:font-style-complex="italic"/>
    </style:style>
    <style:style style:name="P90" style:family="paragraph" style:parent-style-name="Normal">
      <style:text-properties fo:font-style="italic" officeooo:rsid="004cf1f0" officeooo:paragraph-rsid="00635a29" fo:background-color="#ffff00" style:font-style-asian="italic" style:font-style-complex="italic"/>
    </style:style>
    <style:style style:name="P91" style:family="paragraph" style:parent-style-name="Normal">
      <style:text-properties fo:font-style="italic" officeooo:rsid="0075ff7e" officeooo:paragraph-rsid="0075ff7e" fo:background-color="#ffff00" style:font-style-asian="italic" style:font-style-complex="italic"/>
    </style:style>
    <style:style style:name="P92" style:family="paragraph" style:parent-style-name="Normal">
      <style:text-properties fo:font-style="italic" officeooo:rsid="00791bdb" officeooo:paragraph-rsid="00791bdb" fo:background-color="#ffff00" style:font-style-asian="italic" style:font-style-complex="italic"/>
    </style:style>
    <style:style style:name="P93" style:family="paragraph" style:parent-style-name="Normal">
      <style:text-properties fo:font-style="italic" officeooo:rsid="00845c49" officeooo:paragraph-rsid="00845c49" fo:background-color="#ffff00" style:font-style-asian="italic" style:font-style-complex="italic"/>
    </style:style>
    <style:style style:name="P94" style:family="paragraph" style:parent-style-name="Normal">
      <style:text-properties fo:font-style="italic" officeooo:rsid="0085b181" officeooo:paragraph-rsid="0085b181" fo:background-color="#ffff00" style:font-style-asian="italic" style:font-style-complex="italic"/>
    </style:style>
    <style:style style:name="P95" style:family="paragraph" style:parent-style-name="Normal">
      <style:paragraph-properties fo:margin-top="0.15cm" fo:margin-bottom="0.15cm" style:contextual-spacing="false" style:vertical-align="auto"/>
      <style:text-properties fo:font-style="italic" officeooo:rsid="008d6357" officeooo:paragraph-rsid="008d6357" fo:background-color="#ffff00" style:font-style-asian="italic" style:font-style-complex="italic"/>
    </style:style>
    <style:style style:name="P96" style:family="paragraph" style:parent-style-name="Normal">
      <style:text-properties fo:font-style="italic" officeooo:rsid="00a2c584" officeooo:paragraph-rsid="00a2c584" fo:background-color="#ffff00" style:font-style-asian="italic" style:font-style-complex="italic"/>
    </style:style>
    <style:style style:name="P97" style:family="paragraph" style:parent-style-name="Normal">
      <style:text-properties fo:font-style="italic" officeooo:rsid="00aba4ad" officeooo:paragraph-rsid="00aba4ad" fo:background-color="#ffff00" style:font-style-asian="italic" style:font-style-complex="italic"/>
    </style:style>
    <style:style style:name="P98" style:family="paragraph" style:parent-style-name="Normal">
      <style:text-properties fo:font-style="italic" officeooo:rsid="00abde1a" officeooo:paragraph-rsid="00abde1a" fo:background-color="#ffff00" style:font-style-asian="italic" style:font-style-complex="italic"/>
    </style:style>
    <style:style style:name="P99" style:family="paragraph" style:parent-style-name="Normal">
      <style:text-properties fo:font-style="italic" officeooo:rsid="00b10be1" officeooo:paragraph-rsid="00b10be1" fo:background-color="#ffff00" style:font-style-asian="italic" style:font-style-complex="italic"/>
    </style:style>
    <style:style style:name="P100" style:family="paragraph" style:parent-style-name="Normal">
      <style:text-properties fo:font-style="italic" officeooo:rsid="00b10be1" officeooo:paragraph-rsid="00b48ae1" fo:background-color="#ffff00" style:font-style-asian="italic" style:font-style-complex="italic"/>
    </style:style>
    <style:style style:name="P101" style:family="paragraph" style:parent-style-name="Normal">
      <style:text-properties fo:font-style="italic" officeooo:rsid="00b39c85" officeooo:paragraph-rsid="00b39c85" fo:background-color="#ffff00" style:font-style-asian="italic" style:font-style-complex="italic"/>
    </style:style>
    <style:style style:name="P102" style:family="paragraph" style:parent-style-name="Normal">
      <style:text-properties fo:font-style="italic" officeooo:rsid="00bb0e07" officeooo:paragraph-rsid="00bb0e07" fo:background-color="#ffff00" style:font-style-asian="italic" style:font-style-complex="italic"/>
    </style:style>
    <style:style style:name="P103" style:family="paragraph" style:parent-style-name="Normal">
      <style:text-properties fo:font-style="italic" officeooo:rsid="00c1629d" officeooo:paragraph-rsid="00c1629d" fo:background-color="#ffff00" style:font-style-asian="italic" style:font-style-complex="italic"/>
    </style:style>
    <style:style style:name="P104" style:family="paragraph" style:parent-style-name="Normal">
      <style:text-properties fo:font-style="italic" style:text-underline-style="none" officeooo:rsid="00c04a22" officeooo:paragraph-rsid="00c04a22" fo:background-color="#ffff00" style:font-style-asian="italic" style:font-style-complex="italic"/>
    </style:style>
    <style:style style:name="P105" style:family="paragraph" style:parent-style-name="Normal">
      <style:paragraph-properties fo:margin-top="0.15cm" fo:margin-bottom="0.15cm" style:contextual-spacing="false" style:vertical-align="auto"/>
      <style:text-properties officeooo:rsid="003d6526" officeooo:paragraph-rsid="003d6526"/>
    </style:style>
    <style:style style:name="P106" style:family="paragraph" style:parent-style-name="first-paragraph">
      <style:text-properties officeooo:paragraph-rsid="0032885d"/>
    </style:style>
    <style:style style:name="P107" style:family="paragraph" style:parent-style-name="Normal">
      <style:text-properties officeooo:paragraph-rsid="00845c49"/>
    </style:style>
    <style:style style:name="P108" style:family="paragraph" style:parent-style-name="Normal">
      <style:text-properties style:font-name="Arial" fo:font-size="11pt" fo:font-style="italic" fo:background-color="#ffff00" style:font-size-asian="11pt" style:font-style-asian="italic" style:font-size-complex="11pt" style:font-style-complex="italic"/>
    </style:style>
    <style:style style:name="P109" style:family="paragraph" style:parent-style-name="Table_20_Contents">
      <style:text-properties style:font-name="Arial" officeooo:rsid="004cf1f0" officeooo:paragraph-rsid="00635a29" style:font-name-asian="Arial" style:font-name-complex="Arial"/>
    </style:style>
    <style:style style:name="P110" style:family="paragraph" style:parent-style-name="Table_20_Contents">
      <style:text-properties officeooo:paragraph-rsid="005570c9"/>
    </style:style>
    <style:style style:name="P111" style:family="paragraph" style:parent-style-name="Table_20_Contents">
      <style:text-properties officeooo:paragraph-rsid="005a0897"/>
    </style:style>
    <style:style style:name="P112" style:family="paragraph" style:parent-style-name="Table_20_Contents">
      <style:text-properties officeooo:rsid="00661811" officeooo:paragraph-rsid="00661811"/>
    </style:style>
    <style:style style:name="P113" style:family="paragraph" style:parent-style-name="first-paragraph">
      <style:text-properties officeooo:paragraph-rsid="008abe85"/>
    </style:style>
    <style:style style:name="P114" style:family="paragraph" style:parent-style-name="first-paragraph">
      <style:text-properties officeooo:paragraph-rsid="009b75b7"/>
    </style:style>
    <style:style style:name="P115" style:family="paragraph" style:parent-style-name="Normal">
      <style:text-properties officeooo:rsid="00abde1a" officeooo:paragraph-rsid="00abde1a"/>
    </style:style>
    <style:style style:name="P116" style:family="paragraph" style:parent-style-name="Normal">
      <style:text-properties officeooo:rsid="00bb0e07" officeooo:paragraph-rsid="00bb0e07"/>
    </style:style>
    <style:style style:name="P117" style:family="paragraph" style:parent-style-name="Standard">
      <style:text-properties officeooo:rsid="007bc674" officeooo:paragraph-rsid="00abde1a"/>
    </style:style>
    <style:style style:name="P118" style:family="paragraph" style:parent-style-name="TM_20_1">
      <style:paragraph-properties>
        <style:tab-stops>
          <style:tab-stop style:position="17.6cm" style:type="right" style:leader-style="dotted" style:leader-text="."/>
        </style:tab-stops>
      </style:paragraph-properties>
    </style:style>
    <style:style style:name="P119" style:family="paragraph" style:parent-style-name="TM_20_2">
      <style:paragraph-properties>
        <style:tab-stops>
          <style:tab-stop style:position="17.212cm" style:type="right" style:leader-style="dotted" style:leader-text="."/>
        </style:tab-stops>
      </style:paragraph-properties>
    </style:style>
    <style:style style:name="P120" style:family="paragraph" style:parent-style-name="TM_20_3">
      <style:paragraph-properties>
        <style:tab-stops>
          <style:tab-stop style:position="16.824cm" style:type="right" style:leader-style="dotted" style:leader-text="."/>
        </style:tab-stops>
      </style:paragraph-properties>
    </style:style>
    <style:style style:name="P121" style:family="paragraph" style:parent-style-name="Table_20_Contents">
      <style:text-properties style:font-name="Marianne" fo:font-size="12pt" officeooo:rsid="0088b909" officeooo:paragraph-rsid="00abde1a" style:font-size-asian="12pt" style:font-size-complex="12pt"/>
    </style:style>
    <style:style style:name="P122" style:family="paragraph" style:parent-style-name="Table_20_Contents">
      <style:text-properties style:font-name="Marianne" fo:font-size="12pt" officeooo:rsid="00905ae6" officeooo:paragraph-rsid="00abde1a" style:font-size-asian="12pt" style:font-size-complex="12pt"/>
    </style:style>
    <style:style style:name="P123" style:family="paragraph" style:parent-style-name="Table_20_Contents">
      <style:text-properties fo:color="#c9211e" loext:opacity="100%" style:font-name="Marianne" fo:font-size="12pt" fo:font-style="italic" fo:font-weight="bold" officeooo:rsid="0088b909" officeooo:paragraph-rsid="00abde1a" fo:background-color="#ffffff" style:font-size-asian="12pt" style:font-style-asian="italic" style:font-weight-asian="bold" style:font-size-complex="12pt" style:font-style-complex="italic" style:font-weight-complex="bold"/>
    </style:style>
    <style:style style:name="P124" style:family="paragraph" style:parent-style-name="Text_20_body">
      <style:text-properties officeooo:rsid="00ad92d9" officeooo:paragraph-rsid="00ad92d9"/>
    </style:style>
    <style:style style:name="P125" style:family="paragraph" style:parent-style-name="Text_20_body">
      <style:text-properties officeooo:rsid="0062c44d" officeooo:paragraph-rsid="00b48ae1"/>
    </style:style>
    <style:style style:name="P126" style:family="paragraph" style:parent-style-name="Text_20_body">
      <style:text-properties officeooo:rsid="0075ce45" officeooo:paragraph-rsid="00bb0e07"/>
    </style:style>
    <style:style style:name="P127" style:family="paragraph" style:parent-style-name="Text_20_body">
      <style:text-properties officeooo:rsid="00c4411e" officeooo:paragraph-rsid="00c4411e"/>
    </style:style>
    <style:style style:name="P128" style:family="paragraph" style:parent-style-name="first-paragraph">
      <style:text-properties officeooo:paragraph-rsid="00c7d7b4"/>
    </style:style>
    <style:style style:name="P129" style:family="paragraph" style:parent-style-name="En-tête_20_de_20_table_20_des_20_matières">
      <style:paragraph-properties fo:margin-left="0.762cm" fo:margin-right="0cm" fo:text-indent="-0.762cm" style:auto-text-indent="false">
        <style:tab-stops/>
      </style:paragraph-properties>
    </style:style>
    <style:style style:name="P130" style:family="paragraph" style:parent-style-name="Heading_20_2">
      <style:text-properties officeooo:rsid="00b48ae1" officeooo:paragraph-rsid="00b48ae1"/>
    </style:style>
    <style:style style:name="P131" style:family="paragraph" style:parent-style-name="Heading_20_2">
      <style:text-properties officeooo:paragraph-rsid="00a9a63b"/>
    </style:style>
    <style:style style:name="P132" style:family="paragraph" style:parent-style-name="Heading_20_2">
      <style:text-properties officeooo:paragraph-rsid="00635a29"/>
    </style:style>
    <style:style style:name="P133" style:family="paragraph" style:parent-style-name="Normal" style:master-page-name="MP0">
      <style:paragraph-properties style:page-number="auto" fo:break-before="page"/>
    </style:style>
    <style:style style:name="P134" style:family="paragraph" style:parent-style-name="Normal" style:list-style-name="L2">
      <style:paragraph-properties fo:margin-top="0.15cm" fo:margin-bottom="0.15cm" style:contextual-spacing="false"/>
      <style:text-properties fo:color="#000000" loext:opacity="100%" style:font-name-asian="Times New Roman" style:language-asian="fr" style:country-asian="FR"/>
    </style:style>
    <style:style style:name="P135" style:family="paragraph" style:parent-style-name="Normal" style:list-style-name="L3">
      <style:paragraph-properties fo:margin-top="0.15cm" fo:margin-bottom="0.15cm" style:contextual-spacing="false"/>
      <style:text-properties fo:color="#000000" loext:opacity="100%" style:font-name-asian="Times New Roman" style:language-asian="fr" style:country-asian="FR"/>
    </style:style>
    <style:style style:name="P136" style:family="paragraph" style:parent-style-name="Normal" style:list-style-name="L6">
      <style:paragraph-properties fo:margin-top="0.15cm" fo:margin-bottom="0.15cm" style:contextual-spacing="false" style:vertical-align="auto"/>
      <style:text-properties fo:color="#000000" loext:opacity="100%" style:font-name-asian="Times New Roman" style:language-asian="fr" style:country-asian="FR"/>
    </style:style>
    <style:style style:name="P137" style:family="paragraph" style:parent-style-name="Normal" style:list-style-name="L13">
      <style:paragraph-properties fo:margin-top="0.15cm" fo:margin-bottom="0.15cm" style:contextual-spacing="false" style:vertical-align="auto"/>
      <style:text-properties fo:color="#000000" loext:opacity="100%" style:font-name-asian="Times New Roman" style:language-asian="fr" style:country-asian="FR"/>
    </style:style>
    <style:style style:name="P138" style:family="paragraph" style:parent-style-name="Normal" style:list-style-name="L16">
      <style:paragraph-properties fo:margin-top="0.15cm" fo:margin-bottom="0.15cm" style:contextual-spacing="false" style:vertical-align="auto"/>
      <style:text-properties fo:color="#000000" loext:opacity="100%" style:font-name-asian="Times New Roman" style:language-asian="fr" style:country-asian="FR"/>
    </style:style>
    <style:style style:name="P139" style:family="paragraph" style:parent-style-name="Normal" style:list-style-name="L19">
      <style:paragraph-properties fo:margin-top="0.15cm" fo:margin-bottom="0.15cm" style:contextual-spacing="false" style:vertical-align="auto"/>
      <style:text-properties fo:color="#000000" loext:opacity="100%" style:font-name-asian="Times New Roman" style:language-asian="fr" style:country-asian="FR"/>
    </style:style>
    <style:style style:name="P140" style:family="paragraph" style:parent-style-name="Normal" style:list-style-name="L17">
      <style:text-properties fo:color="#000000" loext:opacity="100%" style:font-name="Arial" fo:font-size="11pt" fo:font-style="italic" fo:background-color="#ffff00" style:font-size-asian="11pt" style:font-style-asian="italic" style:font-size-complex="11pt" style:font-style-complex="italic"/>
    </style:style>
    <style:style style:name="P141" style:family="paragraph" style:parent-style-name="Normal">
      <style:paragraph-properties fo:margin-top="0.15cm" fo:margin-bottom="0.15cm" style:contextual-spacing="false" style:vertical-align="auto"/>
      <style:text-properties fo:color="#000000" loext:opacity="100%" fo:font-style="italic" officeooo:paragraph-rsid="00d9856f" fo:background-color="#ffff00" style:font-name-asian="Times New Roman" style:language-asian="fr" style:country-asian="FR" style:font-style-asian="italic" style:font-style-complex="italic"/>
    </style:style>
    <style:style style:name="P142" style:family="paragraph" style:parent-style-name="Normal" style:list-style-name="L4"/>
    <style:style style:name="P143" style:family="paragraph" style:parent-style-name="Normal" style:list-style-name="L7"/>
    <style:style style:name="P144" style:family="paragraph" style:parent-style-name="Normal" style:list-style-name="L8"/>
    <style:style style:name="P145" style:family="paragraph" style:parent-style-name="Normal" style:list-style-name="L10"/>
    <style:style style:name="P146" style:family="paragraph" style:parent-style-name="Normal" style:list-style-name="L11"/>
    <style:style style:name="P147" style:family="paragraph" style:parent-style-name="Normal" style:list-style-name="L14"/>
    <style:style style:name="P148" style:family="paragraph" style:parent-style-name="Normal" style:list-style-name="L15"/>
    <style:style style:name="P149" style:family="paragraph" style:parent-style-name="Paragraphe_20_de_20_liste" style:list-style-name="L1">
      <style:paragraph-properties fo:margin-left="0cm" fo:margin-right="0cm" fo:margin-top="0cm" fo:margin-bottom="0cm" style:contextual-spacing="false" fo:text-indent="0cm" style:auto-text-indent="false"/>
      <style:text-properties style:font-size-complex="12pt"/>
    </style:style>
    <style:style style:name="P150" style:family="paragraph" style:parent-style-name="TM_20_1">
      <style:paragraph-properties>
        <style:tab-stops>
          <style:tab-stop style:position="17.6cm" style:type="right" style:leader-style="dotted" style:leader-text="."/>
        </style:tab-stops>
      </style:paragraph-properties>
    </style:style>
    <style:style style:name="P151" style:family="paragraph" style:parent-style-name="TM_20_2">
      <style:paragraph-properties>
        <style:tab-stops>
          <style:tab-stop style:position="17.212cm" style:type="right" style:leader-style="dotted" style:leader-text="."/>
        </style:tab-stops>
      </style:paragraph-properties>
    </style:style>
    <style:style style:name="P152" style:family="paragraph" style:parent-style-name="TM_20_3">
      <style:paragraph-properties>
        <style:tab-stops>
          <style:tab-stop style:position="16.824cm" style:type="right" style:leader-style="dotted" style:leader-text="."/>
        </style:tab-stops>
      </style:paragraph-properties>
    </style:style>
    <style:style style:name="P153" style:family="paragraph" style:parent-style-name="western" style:list-style-name="L5">
      <style:paragraph-properties fo:hyphenation-ladder-count="no-limit" style:vertical-align="auto"/>
      <style:text-properties fo:hyphenate="true" loext:hyphenation-no-caps="false" loext:hyphenation-no-last-word="false" loext:hyphenation-word-char-count="no-limit" loext:hyphenation-zone="no-limit"/>
    </style:style>
    <style:style style:name="P154" style:family="paragraph" style:parent-style-name="western" style:list-style-name="L9">
      <style:paragraph-properties fo:hyphenation-ladder-count="no-limit" style:vertical-align="auto"/>
      <style:text-properties fo:hyphenate="true" loext:hyphenation-no-caps="false" loext:hyphenation-no-last-word="false" loext:hyphenation-word-char-count="no-limit" loext:hyphenation-zone="no-limit"/>
    </style:style>
    <style:style style:name="P155" style:family="paragraph" style:parent-style-name="western" style:list-style-name="L9">
      <style:paragraph-properties fo:hyphenation-ladder-count="no-limit" style:vertical-align="auto"/>
      <style:text-properties officeooo:paragraph-rsid="003933e5" fo:hyphenate="true" loext:hyphenation-no-caps="false" loext:hyphenation-no-last-word="false" loext:hyphenation-word-char-count="no-limit" loext:hyphenation-zone="no-limit"/>
    </style:style>
    <style:style style:name="P156" style:family="paragraph" style:parent-style-name="western" style:list-style-name="L12">
      <style:paragraph-properties fo:hyphenation-ladder-count="no-limit" style:vertical-align="auto"/>
      <style:text-properties fo:hyphenate="true" loext:hyphenation-no-caps="false" loext:hyphenation-no-last-word="false" loext:hyphenation-word-char-count="no-limit" loext:hyphenation-zone="no-limit"/>
    </style:style>
    <style:style style:name="P157" style:family="paragraph" style:parent-style-name="western" style:list-style-name="L18">
      <style:paragraph-properties fo:hyphenation-ladder-count="no-limit" style:vertical-align="auto"/>
      <style:text-properties fo:hyphenate="true" loext:hyphenation-no-caps="false" loext:hyphenation-no-last-word="false" loext:hyphenation-word-char-count="no-limit" loext:hyphenation-zone="no-limit"/>
    </style:style>
    <style:style style:name="T1" style:family="text">
      <style:text-properties style:language-asian="fr" style:country-asian="F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cfb4c" style:font-style-asian="italic" style:font-style-complex="italic"/>
    </style:style>
    <style:style style:name="T5" style:family="text">
      <style:text-properties fo:font-style="italic" officeooo:rsid="003933e5" style:font-style-asian="italic" style:font-style-complex="italic"/>
    </style:style>
    <style:style style:name="T6" style:family="text">
      <style:text-properties fo:font-style="italic" officeooo:rsid="00abde1a" style:font-style-asian="italic" style:font-style-complex="italic"/>
    </style:style>
    <style:style style:name="T7" style:family="text">
      <style:text-properties fo:font-style="italic" style:font-style-asian="italic" style:font-size-complex="11pt"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fo:font-style="italic" officeooo:rsid="0084b6e8" fo:background-color="#ffff00" loext:char-shading-value="0" style:font-style-asian="italic" style:font-style-complex="italic"/>
    </style:style>
    <style:style style:name="T10" style:family="text">
      <style:text-properties fo:color="#417dc4" loext:opacity="100%" fo:font-style="italic" style:font-name-asian="Times New Roman" style:language-asian="fr" style:country-asian="FR" style:font-style-asian="italic" style:font-style-complex="italic"/>
    </style:style>
    <style:style style:name="T11" style:family="text">
      <style:text-properties fo:color="#417dc4" loext:opacity="100%" fo:font-style="italic" officeooo:rsid="00086d25" style:font-name-asian="Times New Roman" style:language-asian="fr" style:country-asian="FR" style:font-style-asian="italic" style:font-style-complex="italic"/>
    </style:style>
    <style:style style:name="T12" style:family="text">
      <style:text-properties fo:color="#417dc4" loext:opacity="100%" style:font-name-asian="Times New Roman" style:language-asian="fr" style:country-asian="FR"/>
    </style:style>
    <style:style style:name="T13" style:family="text">
      <style:text-properties fo:color="#000000" loext:opacity="100%"/>
    </style:style>
    <style:style style:name="T14" style:family="text">
      <style:text-properties fo:color="#000000" loext:opacity="100%" fo:font-size="12pt" style:font-name-asian="Times New Roman" style:font-size-asian="12pt" style:language-asian="fr" style:country-asian="FR" style:font-size-complex="12pt"/>
    </style:style>
    <style:style style:name="T15" style:family="text">
      <style:text-properties fo:color="#000000" loext:opacity="100%" style:font-name-asian="Times New Roman" style:language-asian="fr" style:country-asian="FR"/>
    </style:style>
    <style:style style:name="T16" style:family="text">
      <style:text-properties fo:color="#000000" loext:opacity="100%" officeooo:rsid="007379fa" style:font-name-asian="Times New Roman" style:language-asian="fr" style:country-asian="FR"/>
    </style:style>
    <style:style style:name="T17" style:family="text">
      <style:text-properties fo:color="#000000" loext:opacity="100%" style:font-name="Times New Roman" fo:font-size="12pt" fo:font-weight="bold" style:font-name-asian="Times New Roman" style:font-size-asian="12pt" style:language-asian="fr" style:country-asian="FR" style:font-weight-asian="bold" style:font-size-complex="12pt" style:font-weight-complex="bold"/>
    </style:style>
    <style:style style:name="T18" style:family="text">
      <style:text-properties fo:color="#000000" loext:opacity="100%" officeooo:rsid="0032885d"/>
    </style:style>
    <style:style style:name="T19" style:family="text">
      <style:text-properties fo:color="#000000" loext:opacity="100%" fo:font-style="italic" officeooo:rsid="0032885d" fo:background-color="#ffff00" loext:char-shading-value="0" style:font-style-asian="italic" style:font-size-complex="11pt" style:font-style-complex="italic"/>
    </style:style>
    <style:style style:name="T20" style:family="text">
      <style:text-properties fo:color="#000000" loext:opacity="100%" fo:font-style="italic" officeooo:rsid="009b75b7" fo:background-color="#ffff00" loext:char-shading-value="0" style:font-style-asian="italic" style:font-size-complex="11pt" style:font-style-complex="italic"/>
    </style:style>
    <style:style style:name="T21" style:family="text">
      <style:text-properties fo:color="#000000" loext:opacity="100%" fo:font-style="italic" officeooo:rsid="00c7d7b4" fo:background-color="#ffff00" loext:char-shading-value="0" style:font-style-asian="italic" style:font-size-complex="11pt" style:font-style-complex="italic"/>
    </style:style>
    <style:style style:name="T22" style:family="text">
      <style:text-properties style:use-window-font-color="true" loext:opacity="0%"/>
    </style:style>
    <style:style style:name="T23" style:family="text">
      <style:text-properties style:use-window-font-color="true" loext:opacity="0%" fo:font-style="italic" style:font-style-asian="italic" style:font-style-complex="italic"/>
    </style:style>
    <style:style style:name="T24" style:family="text">
      <style:text-properties fo:font-size="12pt" style:font-size-asian="12pt" style:font-size-complex="12pt"/>
    </style:style>
    <style:style style:name="T25" style:family="text">
      <style:text-properties fo:font-weight="bold" style:font-weight-asian="bold" style:font-weight-complex="bold"/>
    </style:style>
    <style:style style:name="T26" style:family="text">
      <style:text-properties style:font-name="Arial" fo:font-size="11pt" fo:font-style="italic" style:font-size-asian="11pt" style:font-style-asian="italic" style:font-name-complex="Arial" style:font-size-complex="11pt" style:font-style-complex="italic"/>
    </style:style>
    <style:style style:name="T27" style:family="text">
      <style:text-properties officeooo:rsid="00086d25"/>
    </style:style>
    <style:style style:name="T28" style:family="text">
      <style:text-properties officeooo:rsid="000942c1"/>
    </style:style>
    <style:style style:name="T29" style:family="text">
      <style:text-properties officeooo:rsid="000e94d8"/>
    </style:style>
    <style:style style:name="T30" style:family="text">
      <style:text-properties officeooo:rsid="00110e48"/>
    </style:style>
    <style:style style:name="T31" style:family="text">
      <style:text-properties officeooo:rsid="0015692b"/>
    </style:style>
    <style:style style:name="T32" style:family="text">
      <style:text-properties officeooo:rsid="0018db1d" fo:background-color="#ffff00" loext:char-shading-value="0"/>
    </style:style>
    <style:style style:name="T33" style:family="text">
      <style:text-properties officeooo:rsid="001aaadd"/>
    </style:style>
    <style:style style:name="T34" style:family="text">
      <style:text-properties officeooo:rsid="0021bd22"/>
    </style:style>
    <style:style style:name="T35" style:family="text">
      <style:text-properties officeooo:rsid="002b9ab6"/>
    </style:style>
    <style:style style:name="T36" style:family="text">
      <style:text-properties officeooo:rsid="002c9d76"/>
    </style:style>
    <style:style style:name="T37" style:family="text">
      <style:text-properties officeooo:rsid="002ff5c2"/>
    </style:style>
    <style:style style:name="T38" style:family="text">
      <style:text-properties officeooo:rsid="0034bd90"/>
    </style:style>
    <style:style style:name="T39" style:family="text">
      <style:text-properties officeooo:rsid="003b25f2"/>
    </style:style>
    <style:style style:name="T40" style:family="text">
      <style:text-properties officeooo:rsid="003b341e"/>
    </style:style>
    <style:style style:name="T41" style:family="text">
      <style:text-properties officeooo:rsid="003c78fb"/>
    </style:style>
    <style:style style:name="T42" style:family="text">
      <style:text-properties officeooo:rsid="003ed66b"/>
    </style:style>
    <style:style style:name="T43" style:family="text">
      <style:text-properties officeooo:rsid="003f68cb"/>
    </style:style>
    <style:style style:name="T44" style:family="text">
      <style:text-properties officeooo:rsid="003fa08f"/>
    </style:style>
    <style:style style:name="T45" style:family="text">
      <style:text-properties officeooo:rsid="004135ad"/>
    </style:style>
    <style:style style:name="T46" style:family="text">
      <style:text-properties officeooo:rsid="004436a7"/>
    </style:style>
    <style:style style:name="T47" style:family="text">
      <style:text-properties officeooo:rsid="0044a4fa"/>
    </style:style>
    <style:style style:name="T48" style:family="text">
      <style:text-properties officeooo:rsid="004e0d7b"/>
    </style:style>
    <style:style style:name="T49" style:family="text">
      <style:text-properties officeooo:rsid="004f637d"/>
    </style:style>
    <style:style style:name="T50" style:family="text">
      <style:text-properties officeooo:rsid="00503f18"/>
    </style:style>
    <style:style style:name="T51" style:family="text">
      <style:text-properties officeooo:rsid="0053041c"/>
    </style:style>
    <style:style style:name="T52" style:family="text">
      <style:text-properties officeooo:rsid="005570c9"/>
    </style:style>
    <style:style style:name="T53" style:family="text">
      <style:text-properties officeooo:rsid="0055cb41"/>
    </style:style>
    <style:style style:name="T54" style:family="text">
      <style:text-properties officeooo:rsid="005b62a1"/>
    </style:style>
    <style:style style:name="T55" style:family="text">
      <style:text-properties officeooo:rsid="006ca72e"/>
    </style:style>
    <style:style style:name="T56" style:family="text">
      <style:text-properties officeooo:rsid="00704aad"/>
    </style:style>
    <style:style style:name="T57" style:family="text">
      <style:text-properties officeooo:rsid="0076907c"/>
    </style:style>
    <style:style style:name="T58" style:family="text">
      <style:text-properties officeooo:rsid="0077d1e5"/>
    </style:style>
    <style:style style:name="T59" style:family="text">
      <style:text-properties officeooo:rsid="007ce9ae"/>
    </style:style>
    <style:style style:name="T60" style:family="text">
      <style:text-properties officeooo:rsid="0080800a"/>
    </style:style>
    <style:style style:name="T61" style:family="text">
      <style:text-properties officeooo:rsid="008088d0"/>
    </style:style>
    <style:style style:name="T62" style:family="text">
      <style:text-properties officeooo:rsid="00809ba7"/>
    </style:style>
    <style:style style:name="T63" style:family="text">
      <style:text-properties officeooo:rsid="0082685f"/>
    </style:style>
    <style:style style:name="T64" style:family="text">
      <style:text-properties officeooo:rsid="00845c49"/>
    </style:style>
    <style:style style:name="T65" style:family="text">
      <style:text-properties officeooo:rsid="0084b6e8"/>
    </style:style>
    <style:style style:name="T66" style:family="text">
      <style:text-properties officeooo:rsid="008abe85"/>
    </style:style>
    <style:style style:name="T67" style:family="text">
      <style:text-properties officeooo:rsid="008c0bb1"/>
    </style:style>
    <style:style style:name="T68" style:family="text">
      <style:text-properties officeooo:rsid="008d1db3"/>
    </style:style>
    <style:style style:name="T69" style:family="text">
      <style:text-properties officeooo:rsid="008d6357"/>
    </style:style>
    <style:style style:name="T70" style:family="text">
      <style:text-properties officeooo:rsid="008d6db4"/>
    </style:style>
    <style:style style:name="T71" style:family="text">
      <style:text-properties officeooo:rsid="008fc9b8"/>
    </style:style>
    <style:style style:name="T72" style:family="text">
      <style:text-properties officeooo:rsid="009c85e2"/>
    </style:style>
    <style:style style:name="T73" style:family="text">
      <style:text-properties officeooo:rsid="009f6bea"/>
    </style:style>
    <style:style style:name="T74" style:family="text">
      <style:text-properties officeooo:rsid="00a30ad6"/>
    </style:style>
    <style:style style:name="T75" style:family="text">
      <style:text-properties officeooo:rsid="00a3b4a9"/>
    </style:style>
    <style:style style:name="T76" style:family="text">
      <style:text-properties officeooo:rsid="00a6b0dc"/>
    </style:style>
    <style:style style:name="T77" style:family="text">
      <style:text-properties officeooo:rsid="00a6dbaa"/>
    </style:style>
    <style:style style:name="T78" style:family="text">
      <style:text-properties officeooo:rsid="00ac393b"/>
    </style:style>
    <style:style style:name="T79" style:family="text">
      <style:text-properties officeooo:rsid="00ac75d6"/>
    </style:style>
    <style:style style:name="T80" style:family="text">
      <style:text-properties officeooo:rsid="00b0f871"/>
    </style:style>
    <style:style style:name="T81" style:family="text">
      <style:text-properties officeooo:rsid="00b2bebc"/>
    </style:style>
    <style:style style:name="T82" style:family="text">
      <style:text-properties officeooo:rsid="00b8423c"/>
    </style:style>
    <style:style style:name="T83" style:family="text">
      <style:text-properties officeooo:rsid="00b9c5e7"/>
    </style:style>
    <style:style style:name="T84" style:family="text">
      <style:text-properties officeooo:rsid="00ed8f28"/>
    </style:style>
    <style:style style:name="T85" style:family="text">
      <style:text-properties officeooo:rsid="00bdc112"/>
    </style:style>
    <style:style style:name="T86" style:family="text">
      <style:text-properties officeooo:rsid="00c424b5"/>
    </style:style>
    <style:style style:name="T87" style:family="text">
      <style:text-properties officeooo:rsid="00c697f0"/>
    </style:style>
    <style:style style:name="T88" style:family="text">
      <style:text-properties officeooo:rsid="00c83403"/>
    </style:style>
    <style:style style:name="T89" style:family="text">
      <style:text-properties officeooo:rsid="00c94524"/>
    </style:style>
    <style:style style:name="T90" style:family="text">
      <style:text-properties officeooo:rsid="00c9b155"/>
    </style:style>
    <style:style style:name="T91" style:family="text">
      <style:text-properties officeooo:rsid="00cf5e78"/>
    </style:style>
    <style:style style:name="T92" style:family="text">
      <style:text-properties officeooo:rsid="00d1d8f3"/>
    </style:style>
    <style:style style:name="T93" style:family="text">
      <style:text-properties officeooo:rsid="00d4b03e"/>
    </style:style>
    <style:style style:name="T94" style:family="text">
      <style:text-properties officeooo:rsid="00d6e262"/>
    </style:style>
    <style:style style:name="T95" style:family="text">
      <style:text-properties officeooo:rsid="00d9e774"/>
    </style:style>
    <style:style style:name="T96" style:family="text">
      <style:text-properties officeooo:rsid="00dafa28"/>
    </style:style>
    <style:style style:name="T97" style:family="text">
      <style:text-properties officeooo:rsid="00dbef5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1" draw:name="Image1" text:anchor-type="paragraph" svg:x="1.905cm" svg:y="1.711cm" svg:width="2.187cm" svg:height="1.588cm" draw:z-index="10"><draw:image xlink:href="Pictures/100000010000007C0000005ABAA0C0E4.png" xlink:type="simple" xlink:show="embed" xlink:actuate="onLoad" draw:mime-type="image/png"/></draw:frame></text:p>
      <text:p text:style-name="Heading">DAG - Modèle</text:p>
      <text:p text:style-name="Subtitle">MI / SG / D<text:span text:style-name="T85">T</text:span>NUM</text:p>
      <text:p text:style-name="P3"/>
      <text:p text:style-name="Normal"><text:span text:style-name="Police_20_par_20_défaut"><text:span text:style-name="T1"/></text:span></text:p>
      <text:h text:style-name="Heading_20_1" text:outline-level="1"><text:bookmark-start text:name="_Toc177660658"/><text:bookmark-start text:name="_Toc177652537"/><text:bookmark-start text:name="_Toc177652073"/><text:bookmark-start text:name="__RefHeading___Toc9806_1783990655"/><text:bookmark-start text:name="_Toc177568895"/>Informations générales<text:bookmark-end text:name="_Toc177660658"/><text:bookmark-end text:name="_Toc177652537"/><text:bookmark-end text:name="_Toc177652073"/><text:bookmark-end text:name="__RefHeading___Toc9806_1783990655"/><text:bookmark-end text:name="_Toc177568895"/></text:h>
      <text:p text:style-name="first-paragraph">Le Dossier d’Architecture Générale du projet "<text:span text:style-name="Police_20_par_20_défaut"><text:span text:style-name="T2">Modèle"</text:span></text:span> définit les informations structurantes principales et offre une vision globale partagée entre les différents acteurs.</text:p>
      <text:p text:style-name="first-paragraph">Il reprend le découpage des vues de l’architecture selon le Cadre Commun d’Urbanisation de l’État (CCU).</text:p>
      <text:p text:style-name="P4"/>
      <text:p text:style-name="P5"><text:span text:style-name="Police_20_par_20_défaut"><text:span text:style-name="T1"><draw:frame draw:style-name="fr2" draw:name="Image 2" text:anchor-type="as-char" svg:y="0cm" svg:width="15.341cm" style:rel-width="scale" svg:height="12.31cm" style:rel-height="scale" draw:z-index="0"><draw:image xlink:href="Pictures/10000001000001F10000019A5D556E43.png" xlink:type="simple" xlink:show="embed" xlink:actuate="onLoad" draw:mime-type="image/png"/></draw:frame></text:span></text:span></text:p>
      <text:p text:style-name="Normal"/>
      <text:p text:style-name="P8">Les finalités du DAG sont</text:p>
      <text:list text:style-name="L2">
        <text:list-item>
          <text:p text:style-name="P134">de cadrer et faciliter le démarrage des projets</text:p>
        </text:list-item>
        <text:list-item>
          <text:p text:style-name="P134">d’être une référence de l’architecture pour les services techniques afin d’avoir une construction cohérente</text:p>
        </text:list-item>
        <text:list-item>
          <text:p text:style-name="P134">de contribuer au référentiel d’Architecture du MI</text:p>
        </text:list-item>
        <text:list-item>
          <text:p text:style-name="P134">de faciliter la transmission (nouveaux arrivants, TMA, …​)</text:p>
        </text:list-item>
      </text:list>
      <text:p text:style-name="P8"><text:soft-page-break/>Il est mis à jour tout au long de la vie de l’application et de ses évolutions.</text:p>
      <text:p text:style-name="P8">Le DAG reflète</text:p>
      <text:list text:style-name="L3">
        <text:list-item>
          <text:p text:style-name="P135">En phase de développement, la prochaine mise en production ou la première pour les nouveaux projets</text:p>
        </text:list-item>
        <text:list-item>
          <text:p text:style-name="P135">En phase de TMA, l’état actuel de l’application</text:p>
        </text:list-item>
      </text:list>
      <text:p text:style-name="Normal"/>
      <text:h text:style-name="Heading_20_2" text:outline-level="2"><text:bookmark-start text:name="_Toc177660659"/><text:bookmark-start text:name="_Toc177652538"/><text:bookmark-start text:name="_Toc177652074"/><text:bookmark-start text:name="__RefHeading___Toc9808_1783990655"/><text:bookmark-start text:name="_Toc177568896"/>Révisions<text:bookmark-end text:name="_Toc177660659"/><text:bookmark-end text:name="_Toc177652538"/><text:bookmark-end text:name="_Toc177652074"/><text:bookmark-end text:name="__RefHeading___Toc9808_1783990655"/><text:bookmark-end text:name="_Toc177568896"/></text:h>
      <table:table table:name="Tableau1" table:style-name="Tableau1">
        <table:table-column table:style-name="Tableau1.A" table:number-columns-repeated="4"/>
        <table:table-row>
          <table:table-cell table:style-name="Tableau1.A1" office:value-type="string">
            <text:p text:style-name="P17">Date</text:p>
          </table:table-cell>
          <table:table-cell table:style-name="Tableau1.A1" office:value-type="string">
            <text:p text:style-name="P17">Version</text:p>
          </table:table-cell>
          <table:table-cell table:style-name="Tableau1.A1" office:value-type="string">
            <text:p text:style-name="P17">Nature des modifications</text:p>
          </table:table-cell>
          <table:table-cell table:style-name="Tableau1.A1" office:value-type="string">
            <text:p text:style-name="P17">Rédacteur</text:p>
          </table:table-cell>
        </table:table-row>
        <table:table-row>
          <table:table-cell table:style-name="Tableau1.A1" office:value-type="string">
            <text:p text:style-name="P18"/>
          </table:table-cell>
          <table:table-cell table:style-name="Tableau1.A1" office:value-type="string">
            <text:p text:style-name="P18">0.1</text:p>
          </table:table-cell>
          <table:table-cell table:style-name="Tableau1.A1" office:value-type="string">
            <text:p text:style-name="P18"/>
          </table:table-cell>
          <table:table-cell table:style-name="Tableau1.A1" office:value-type="string">
            <text:p text:style-name="P18"/>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row>
      </table:table>
      <text:p text:style-name="Normal"/>
      <text:h text:style-name="Heading_20_2" text:outline-level="2"><text:bookmark-start text:name="_Toc177660660"/><text:bookmark-start text:name="_Toc177652539"/><text:bookmark-start text:name="_Toc177652075"/><text:bookmark-start text:name="__RefHeading___Toc9810_1783990655"/><text:bookmark-start text:name="_Toc177568897"/>Équipe<text:bookmark-end text:name="_Toc177660660"/><text:bookmark-end text:name="_Toc177652539"/><text:bookmark-end text:name="_Toc177652075"/><text:bookmark-end text:name="__RefHeading___Toc9810_1783990655"/><text:bookmark-end text:name="_Toc177568897"/></text:h>
      <table:table table:name="Tableau2" table:style-name="Tableau2">
        <table:table-column table:style-name="Tableau2.A" table:number-columns-repeated="4"/>
        <table:table-row>
          <table:table-cell table:style-name="Tableau2.A1" office:value-type="string">
            <text:p text:style-name="P17">Fonction</text:p>
          </table:table-cell>
          <table:table-cell table:style-name="Tableau2.A1" office:value-type="string">
            <text:p text:style-name="P17">Prénom</text:p>
          </table:table-cell>
          <table:table-cell table:style-name="Tableau2.A1" office:value-type="string">
            <text:p text:style-name="P17">Nom</text:p>
          </table:table-cell>
          <table:table-cell table:style-name="Tableau2.A1" office:value-type="string">
            <text:p text:style-name="P17">Entité</text:p>
          </table:table-cell>
        </table:table-row>
        <table:table-row>
          <table:table-cell table:style-name="Tableau2.A1" office:value-type="string">
            <text:p text:style-name="P20">PO</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AMOA</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Chef de Projet</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AMOE</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Architecte Applicatif</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Architecte Infra</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Représentant SSI</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Chef d'équipe technique</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UX</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Web designer</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Développeur Front</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Développeur Back</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0">Intégrateur</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
      <text:p text:style-name="Normal"/>
      <text:h text:style-name="Heading_20_2" text:outline-level="2"><text:bookmark-start text:name="_Toc177660661"/><text:bookmark-start text:name="_Toc177652540"/><text:bookmark-start text:name="_Toc177652076"/><text:bookmark-start text:name="__RefHeading___Toc9812_1783990655"/><text:bookmark-start text:name="_Toc177568898"/>Date clés du projet<text:bookmark-end text:name="_Toc177660661"/><text:bookmark-end text:name="_Toc177652540"/><text:bookmark-end text:name="_Toc177652076"/><text:bookmark-end text:name="__RefHeading___Toc9812_1783990655"/><text:bookmark-end text:name="_Toc177568898"/></text:h>
      <text:p text:style-name="Normal"/>
      <table:table table:name="Tableau3" table:style-name="Tableau3">
        <table:table-column table:style-name="Tableau3.A"/>
        <table:table-column table:style-name="Tableau3.B"/>
        <table:table-column table:style-name="Tableau3.C"/>
        <table:table-row>
          <table:table-cell table:style-name="Tableau3.A1" office:value-type="string">
            <text:p text:style-name="P17">Date</text:p>
          </table:table-cell>
          <table:table-cell table:style-name="Tableau3.A1" office:value-type="string">
            <text:p text:style-name="P17">Etape</text:p>
          </table:table-cell>
          <table:table-cell table:style-name="Tableau3.A1" office:value-type="string">
            <text:p text:style-name="P17">Livrables</text:p>
          </table:table-cell>
        </table:table-row>
        <table:table-row>
          <table:table-cell table:style-name="Tableau3.A1" office:value-type="string">
            <text:p text:style-name="P20"/>
          </table:table-cell>
          <table:table-cell table:style-name="Tableau3.A1" office:value-type="string">
            <text:p text:style-name="P20">Expression de besoin</text:p>
          </table:table-cell>
          <table:table-cell table:style-name="Tableau3.A1" office:value-type="string">
            <text:p text:style-name="P20">Spécification générales</text:p>
          </table:table-cell>
        </table:table-row>
        <table:table-row>
          <table:table-cell table:style-name="Tableau3.A1" office:value-type="string">
            <text:p text:style-name="P20"/>
          </table:table-cell>
          <table:table-cell table:style-name="Tableau3.A1" office:value-type="string">
            <text:p text:style-name="P20">Cadrage</text:p>
          </table:table-cell>
          <table:table-cell table:style-name="Tableau3.A1" office:value-type="string">
            <text:p text:style-name="P20">DAG Light</text:p>
          </table:table-cell>
        </table:table-row>
        <table:table-row>
          <table:table-cell table:style-name="Tableau3.A1" office:value-type="string">
            <text:p text:style-name="P20"/>
          </table:table-cell>
          <table:table-cell table:style-name="Tableau3.A1" office:value-type="string">
            <text:p text:style-name="P20">Appel d'offre</text:p>
          </table:table-cell>
          <table:table-cell table:style-name="Tableau3.A1" office:value-type="string">
            <text:p text:style-name="P20">CCTP</text:p>
          </table:table-cell>
        </table:table-row>
        <table:table-row>
          <table:table-cell table:style-name="Tableau3.A1" office:value-type="string">
            <text:p text:style-name="P20"/>
          </table:table-cell>
          <table:table-cell table:style-name="Tableau3.A1" office:value-type="string">
            <text:p text:style-name="P20">Développements</text:p>
          </table:table-cell>
          <table:table-cell table:style-name="Tableau3.A1" office:value-type="string">
            <text:p text:style-name="P20">Déploiement des sprints</text:p>
          </table:table-cell>
        </table:table-row>
        <table:table-row>
          <table:table-cell table:style-name="Tableau3.A1" office:value-type="string">
            <text:p text:style-name="P20"/>
          </table:table-cell>
          <table:table-cell table:style-name="Tableau3.A1" office:value-type="string">
            <text:p text:style-name="P20">Tests</text:p>
          </table:table-cell>
          <table:table-cell table:style-name="Tableau3.A1" office:value-type="string">
            <text:p text:style-name="P20"/>
          </table:table-cell>
        </table:table-row>
        <table:table-row>
          <table:table-cell table:style-name="Tableau3.A1" office:value-type="string">
            <text:p text:style-name="P20"/>
          </table:table-cell>
          <table:table-cell table:style-name="Tableau3.A1" office:value-type="string">
            <text:p text:style-name="P20">PMV (projet minimum viable)</text:p>
          </table:table-cell>
          <table:table-cell table:style-name="Tableau3.A1" office:value-type="string">
            <text:p text:style-name="P20">Source DAG</text:p>
          </table:table-cell>
        </table:table-row>
        <table:table-row>
          <table:table-cell table:style-name="Tableau3.A1" office:value-type="string">
            <text:p text:style-name="P20"/>
          </table:table-cell>
          <table:table-cell table:style-name="Tableau3.A1" office:value-type="string">
            <text:p text:style-name="P20">Homologation</text:p>
          </table:table-cell>
          <table:table-cell table:style-name="Tableau3.A1" office:value-type="string">
            <text:p text:style-name="P20"/>
          </table:table-cell>
        </table:table-row>
      </table:table>
      <text:p text:style-name="Normal"/>
      <text:h text:style-name="Heading_20_2" text:outline-level="2"><text:bookmark-start text:name="_Toc177660662"/><text:bookmark-start text:name="_Toc177652541"/><text:bookmark-start text:name="_Toc177652077"/><text:bookmark-start text:name="__RefHeading___Toc9814_1783990655"/><text:bookmark-start text:name="_Toc177568899"/>Documentation<text:bookmark-end text:name="_Toc177660662"/><text:bookmark-end text:name="_Toc177652541"/><text:bookmark-end text:name="_Toc177652077"/><text:bookmark-end text:name="__RefHeading___Toc9814_1783990655"/><text:bookmark-end text:name="_Toc177568899"/></text:h>
      <table:table table:name="Tableau4" table:style-name="Tableau4">
        <table:table-column table:style-name="Tableau4.A" table:number-columns-repeated="2"/>
        <table:table-row>
          <table:table-cell table:style-name="Tableau4.A1" office:value-type="string">
            <text:p text:style-name="P17">Date</text:p>
          </table:table-cell>
          <table:table-cell table:style-name="Tableau4.A1" office:value-type="string">
            <text:p text:style-name="P17"/>
          </table:table-cell>
        </table:table-row>
        <table:table-row>
          <table:table-cell table:style-name="Tableau4.A1" office:value-type="string">
            <text:p text:style-name="P20">Expression de besoin</text:p>
          </table:table-cell>
          <table:table-cell table:style-name="Tableau4.A1" office:value-type="string">
            <text:p text:style-name="P20"/>
          </table:table-cell>
        </table:table-row>
        <table:table-row>
          <table:table-cell table:style-name="Tableau4.A1" office:value-type="string">
            <text:p text:style-name="P20">Appel d'offre</text:p>
          </table:table-cell>
          <table:table-cell table:style-name="Tableau4.A1" office:value-type="string">
            <text:p text:style-name="P20"/>
          </table:table-cell>
        </table:table-row>
        <table:table-row>
          <table:table-cell table:style-name="Tableau4.A1" office:value-type="string">
            <text:p text:style-name="P20">Cade de réponse technique</text:p>
          </table:table-cell>
          <table:table-cell table:style-name="Tableau4.A1" office:value-type="string">
            <text:p text:style-name="P20"/>
          </table:table-cell>
        </table:table-row>
        <text:soft-page-break/>
        <table:table-row>
          <table:table-cell table:style-name="Tableau4.A1" office:value-type="string">
            <text:p text:style-name="P20">maquettes</text:p>
          </table:table-cell>
          <table:table-cell table:style-name="Tableau4.A1" office:value-type="string">
            <text:p text:style-name="P20"/>
          </table:table-cell>
        </table:table-row>
        <table:table-row>
          <table:table-cell table:style-name="Tableau4.A1" office:value-type="string">
            <text:p text:style-name="P20">User strories</text:p>
          </table:table-cell>
          <table:table-cell table:style-name="Tableau4.A1" office:value-type="string">
            <text:p text:style-name="P20"/>
          </table:table-cell>
        </table:table-row>
        <table:table-row>
          <table:table-cell table:style-name="Tableau4.A1" office:value-type="string">
            <text:p text:style-name="P20">DAG</text:p>
          </table:table-cell>
          <table:table-cell table:style-name="Tableau4.A1" office:value-type="string">
            <text:p text:style-name="P20"/>
          </table:table-cell>
        </table:table-row>
        <table:table-row>
          <table:table-cell table:style-name="Tableau4.A1" office:value-type="string">
            <text:p text:style-name="P20">Ressources complémentaires</text:p>
          </table:table-cell>
          <table:table-cell table:style-name="Tableau4.A1" office:value-type="string">
            <text:p text:style-name="P20"/>
          </table:table-cell>
        </table:table-row>
      </table:table>
      <text:p text:style-name="Normal"/>
      <text:h text:style-name="Heading_20_2" text:outline-level="2"><text:bookmark-start text:name="_Toc177660663"/><text:bookmark-start text:name="_Toc177652542"/><text:bookmark-start text:name="_Toc177652078"/><text:bookmark-start text:name="__RefHeading___Toc9816_1783990655"/><text:bookmark-start text:name="_Toc177568900"/>Codes sources<text:bookmark-end text:name="_Toc177660663"/><text:bookmark-end text:name="_Toc177652542"/><text:bookmark-end text:name="_Toc177652078"/><text:bookmark-end text:name="__RefHeading___Toc9816_1783990655"/><text:bookmark-end text:name="_Toc177568900"/></text:h>
      <table:table table:name="Tableau5" table:style-name="Tableau5">
        <table:table-column table:style-name="Tableau5.A"/>
        <table:table-column table:style-name="Tableau5.B"/>
        <table:table-column table:style-name="Tableau5.C"/>
        <table:table-row>
          <table:table-cell table:style-name="Tableau5.A1" office:value-type="string">
            <text:p text:style-name="P17">Source</text:p>
          </table:table-cell>
          <table:table-cell table:style-name="Tableau5.A1" office:value-type="string">
            <text:p text:style-name="P17">Emplacement</text:p>
          </table:table-cell>
          <table:table-cell table:style-name="Tableau5.A1" office:value-type="string">
            <text:p text:style-name="P17">Chemins</text:p>
          </table:table-cell>
        </table:table-row>
        <table:table-row>
          <table:table-cell table:style-name="Tableau5.A1" office:value-type="string">
            <text:p text:style-name="P22">Sources frontend</text:p>
          </table:table-cell>
          <table:table-cell table:style-name="Tableau5.A1" office:value-type="string">
            <text:p text:style-name="P22">Gitlab Cloud-Pi Région-1</text:p>
            <text:p text:style-name="P23">Github <text:span text:style-name="T36">(chaine primaire)</text:span></text:p>
          </table:table-cell>
          <table:table-cell table:style-name="Tableau5.A1" office:value-type="string">
            <text:p text:style-name="P22">{adresses-gitlab}</text:p>
            <text:p text:style-name="P24">{adresses-<text:span text:style-name="T35">github</text:span>}</text:p>
          </table:table-cell>
        </table:table-row>
        <table:table-row>
          <table:table-cell table:style-name="Tableau5.A1" office:value-type="string">
            <text:p text:style-name="P22">Sources backend</text:p>
          </table:table-cell>
          <table:table-cell table:style-name="Tableau5.A1" office:value-type="string">
            <text:p text:style-name="P22">Gitlab Cloud-Pi Région-1</text:p>
            <text:p text:style-name="P23">Github <text:span text:style-name="T36">(chaine primaire</text:span><text:span text:style-name="T55">)</text:span></text:p>
          </table:table-cell>
          <table:table-cell table:style-name="Tableau5.A1" office:value-type="string">
            <text:p text:style-name="P22">{adresses-gitlab}</text:p>
            <text:p text:style-name="P24">{adresses-git<text:span text:style-name="T35">hub</text:span>}</text:p>
          </table:table-cell>
        </table:table-row>
        <table:table-row>
          <table:table-cell table:style-name="Tableau5.A1" office:value-type="string">
            <text:p text:style-name="P22">Schémas de base de données<text:line-break/>(ou les sources permettant leur construction)</text:p>
          </table:table-cell>
          <table:table-cell table:style-name="Tableau5.A1" office:value-type="string">
            <text:p text:style-name="P22">Gitlab Cloud-Pi Région-1</text:p>
            <text:p text:style-name="P25">Github (chaine primaire)</text:p>
          </table:table-cell>
          <table:table-cell table:style-name="Tableau5.A1" office:value-type="string">
            <text:p text:style-name="P22">{adresses-gitlab}</text:p>
            <text:p text:style-name="P26">{adresses-git<text:span text:style-name="T37">hub</text:span>}</text:p>
          </table:table-cell>
        </table:table-row>
        <table:table-row>
          <table:table-cell table:style-name="Tableau5.A1" office:value-type="string">
            <text:p text:style-name="P22">Données initiales</text:p>
          </table:table-cell>
          <table:table-cell table:style-name="Tableau5.A1" office:value-type="string">
            <text:p text:style-name="P22">Gitlab Cloud-Pi Région-1</text:p>
          </table:table-cell>
          <table:table-cell table:style-name="Tableau5.A1" office:value-type="string">
            <text:p text:style-name="P22">{adresses-gitlab}</text:p>
          </table:table-cell>
        </table:table-row>
        <table:table-row>
          <table:table-cell table:style-name="Tableau5.A1" office:value-type="string">
            <text:p text:style-name="P22">Scripts de migration de données</text:p>
          </table:table-cell>
          <table:table-cell table:style-name="Tableau5.A1" office:value-type="string">
            <text:p text:style-name="P22">Gitlab Cloud-Pi Région-1</text:p>
          </table:table-cell>
          <table:table-cell table:style-name="Tableau5.A1" office:value-type="string">
            <text:p text:style-name="P22">{adresses-gitlab}</text:p>
          </table:table-cell>
        </table:table-row>
        <table:table-row>
          <table:table-cell table:style-name="Tableau5.A1" office:value-type="string">
            <text:p text:style-name="P22">Scripts batch</text:p>
          </table:table-cell>
          <table:table-cell table:style-name="Tableau5.A1" office:value-type="string">
            <text:p text:style-name="P22">Gitlab Cloud-Pi Région-1</text:p>
          </table:table-cell>
          <table:table-cell table:style-name="Tableau5.A1" office:value-type="string">
            <text:p text:style-name="P22">{adresses-gitlab}</text:p>
            <text:p text:style-name="P22"/>
          </table:table-cell>
        </table:table-row>
        <table:table-row>
          <table:table-cell table:style-name="Tableau5.A1" office:value-type="string">
            <text:p text:style-name="P22">Scripts d’intégration</text:p>
          </table:table-cell>
          <table:table-cell table:style-name="Tableau5.A1" office:value-type="string">
            <text:p text:style-name="P22">Gitlab Cloud-Pi Région-1</text:p>
          </table:table-cell>
          <table:table-cell table:style-name="Tableau5.A1" office:value-type="string">
            <text:p text:style-name="P22">{adresses-gitlab}</text:p>
          </table:table-cell>
        </table:table-row>
        <table:table-row>
          <table:table-cell table:style-name="Tableau5.A1" office:value-type="string">
            <text:p text:style-name="P22">Dockerfile</text:p>
          </table:table-cell>
          <table:table-cell table:style-name="Tableau5.A1" office:value-type="string">
            <text:p text:style-name="P22">Gitlab Cloud-Pi Région-1</text:p>
          </table:table-cell>
          <table:table-cell table:style-name="Tableau5.A1" office:value-type="string">
            <text:p text:style-name="P22">{adresses-gitlab}</text:p>
          </table:table-cell>
        </table:table-row>
        <table:table-row>
          <table:table-cell table:style-name="Tableau5.A1" office:value-type="string">
            <text:list text:style-name="L1">
              <text:list-item>
                <text:list>
                  <text:list-item>
                    <text:list>
                      <text:list-header>
                        <text:p text:style-name="P149">Fichiers de configuration</text:p>
                      </text:list-header>
                    </text:list>
                  </text:list-item>
                </text:list>
              </text:list-item>
            </text:list>
          </table:table-cell>
          <table:table-cell table:style-name="Tableau5.A1" office:value-type="string">
            <text:list text:continue-numbering="true" text:style-name="L1">
              <text:list-header>
                <text:p text:style-name="P149">Gitlab Cloud-Pi Région-1</text:p>
              </text:list-header>
            </text:list>
          </table:table-cell>
          <table:table-cell table:style-name="Tableau5.A1" office:value-type="string">
            <text:list text:continue-numbering="true" text:style-name="L1">
              <text:list-header>
                <text:p text:style-name="P149">{adresses-gitlab}</text:p>
              </text:list-header>
            </text:list>
          </table:table-cell>
        </table:table-row>
        <table:table-row>
          <table:table-cell table:style-name="Tableau5.A1" office:value-type="string">
            <text:p text:style-name="P22">Variables d’environnement</text:p>
          </table:table-cell>
          <table:table-cell table:style-name="Tableau5.A1" office:value-type="string">
            <text:p text:style-name="P22">Gitlab Cloud-Pi Région-1</text:p>
          </table:table-cell>
          <table:table-cell table:style-name="Tableau5.A1" office:value-type="string">
            <text:p text:style-name="P22">{adresses-gitlab}</text:p>
          </table:table-cell>
        </table:table-row>
        <table:table-row>
          <table:table-cell table:style-name="Tableau5.A1" office:value-type="string">
            <text:p text:style-name="P22">Données de production</text:p>
          </table:table-cell>
          <table:table-cell table:style-name="Tableau5.A1" office:value-type="string">
            <text:p text:style-name="P22">Stockage block Cloud-Pi Région 1</text:p>
          </table:table-cell>
          <table:table-cell table:style-name="Tableau5.A1" office:value-type="string">
            <text:p text:style-name="P22">volume associé à la base de données</text:p>
          </table:table-cell>
        </table:table-row>
        <table:table-row>
          <table:table-cell table:style-name="Tableau5.A1" office:value-type="string">
            <text:p text:style-name="P22">Sauvegarde des données de production</text:p>
          </table:table-cell>
          <table:table-cell table:style-name="Tableau5.A1" office:value-type="string">
            <text:p text:style-name="P22">Stockage objet Cloud-Pi Région 1</text:p>
          </table:table-cell>
          <table:table-cell table:style-name="Tableau5.A1" office:value-type="string">
            <text:p text:style-name="P22">bucket S3 associé au sauvegardes</text:p>
          </table:table-cell>
        </table:table-row>
        <table:table-row>
          <table:table-cell table:style-name="Tableau5.A1" office:value-type="string">
            <text:p text:style-name="P22">Ordonnancement</text:p>
          </table:table-cell>
          <table:table-cell table:style-name="Tableau5.A1" office:value-type="string">
            <text:p text:style-name="P22">Gitlab Cloud-Pi Région-1</text:p>
          </table:table-cell>
          <table:table-cell table:style-name="Tableau5.A1" office:value-type="string">
            <text:p text:style-name="P22">{adresses-gitlab}</text:p>
          </table:table-cell>
        </table:table-row>
        <table:table-row>
          <table:table-cell table:style-name="Tableau5.A1" office:value-type="string">
            <text:p text:style-name="P22">Tests</text:p>
          </table:table-cell>
          <table:table-cell table:style-name="Tableau5.A1" office:value-type="string">
            <text:p text:style-name="P22">Gitlab Cloud-Pi Région-1</text:p>
          </table:table-cell>
          <table:table-cell table:style-name="Tableau5.A1" office:value-type="string">
            <text:p text:style-name="P22">{adresses-gitlab}</text:p>
            <text:p text:style-name="P22"/>
          </table:table-cell>
        </table:table-row>
        <table:table-row>
          <table:table-cell table:style-name="Tableau5.A1" office:value-type="string">
            <text:p text:style-name="P22">Sources du DAG</text:p>
          </table:table-cell>
          <table:table-cell table:style-name="Tableau5.A1" office:value-type="string">
            <text:p text:style-name="P27">Gitlab Cloud-Pi Région-1</text:p>
          </table:table-cell>
          <table:table-cell table:style-name="Tableau5.A1" office:value-type="string">
            <text:p text:style-name="P22">{adresses-gitlab}</text:p>
          </table:table-cell>
        </table:table-row>
      </table:table>
      <text:p text:style-name="Normal"/>
      <text:p text:style-name="P2"/>
      <text:p text:style-name="P129">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18">1 <text:s text:c="2"/><text:a xlink:type="simple" xlink:href="#__RefHeading___Toc9806_1783990655" text:style-name="Index_20_Link" text:visited-style-name="Index_20_Link">Informations générales<text:tab/>1</text:a></text:p>
          <text:p text:style-name="P119">1.1 <text:s text:c="2"/><text:a xlink:type="simple" xlink:href="#__RefHeading___Toc9808_1783990655" text:style-name="Index_20_Link" text:visited-style-name="Index_20_Link">Révisions<text:tab/>2</text:a></text:p>
          <text:p text:style-name="P119">1.2 <text:s text:c="2"/><text:a xlink:type="simple" xlink:href="#__RefHeading___Toc9810_1783990655" text:style-name="Index_20_Link" text:visited-style-name="Index_20_Link">Équipe<text:tab/>2</text:a></text:p>
          <text:p text:style-name="P119">1.3 <text:s text:c="2"/><text:a xlink:type="simple" xlink:href="#__RefHeading___Toc9812_1783990655" text:style-name="Index_20_Link" text:visited-style-name="Index_20_Link">Date clés du projet<text:tab/>2</text:a></text:p>
          <text:p text:style-name="P119">1.4 <text:s text:c="2"/><text:a xlink:type="simple" xlink:href="#__RefHeading___Toc9814_1783990655" text:style-name="Index_20_Link" text:visited-style-name="Index_20_Link">Documentation<text:tab/>2</text:a></text:p>
          <text:p text:style-name="P119">1.5 <text:s text:c="2"/><text:a xlink:type="simple" xlink:href="#__RefHeading___Toc9816_1783990655" text:style-name="Index_20_Link" text:visited-style-name="Index_20_Link">Codes sources<text:tab/>3</text:a></text:p>
          <text:p text:style-name="P118">2 <text:s text:c="2"/><text:a xlink:type="simple" xlink:href="#__RefHeading___Toc9818_1783990655" text:style-name="Index_20_Link" text:visited-style-name="Index_20_Link">Métier et contraintes<text:tab/>7</text:a></text:p>
          <text:p text:style-name="P119">2.1 <text:s text:c="2"/><text:a xlink:type="simple" xlink:href="#__RefHeading___Toc9820_1783990655" text:style-name="Index_20_Link" text:visited-style-name="Index_20_Link">Contexte général<text:tab/>7</text:a></text:p>
          <text:p text:style-name="P119">2.2 <text:s text:c="2"/><text:a xlink:type="simple" xlink:href="#__RefHeading___Toc9822_1783990655" text:style-name="Index_20_Link" text:visited-style-name="Index_20_Link">Calendaires<text:tab/>7</text:a></text:p>
          <text:p text:style-name="P119">2.3 <text:s text:c="2"/><text:a xlink:type="simple" xlink:href="#__RefHeading___Toc9824_1783990655" text:style-name="Index_20_Link" text:visited-style-name="Index_20_Link">Résilience<text:tab/>7</text:a></text:p>
          <text:p text:style-name="P119">2.4 <text:s text:c="2"/><text:a xlink:type="simple" xlink:href="#__RefHeading___Toc9826_1783990655" text:style-name="Index_20_Link" text:visited-style-name="Index_20_Link">Ouverture du service et supports<text:tab/>8</text:a></text:p>
          <text:p text:style-name="P119">2.5 <text:s text:c="2"/><text:a xlink:type="simple" xlink:href="#__RefHeading___Toc9828_1783990655" text:style-name="Index_20_Link" text:visited-style-name="Index_20_Link">Critère PRA<text:tab/>8</text:a></text:p>
          <text:p text:style-name="P119">2.6 <text:s text:c="2"/><text:a xlink:type="simple" xlink:href="#__RefHeading___Toc9830_1783990655" text:style-name="Index_20_Link" text:visited-style-name="Index_20_Link">Critère PCA<text:tab/>8</text:a></text:p>
          <text:p text:style-name="P119">2.7 <text:s text:c="2"/><text:a xlink:type="simple" xlink:href="#__RefHeading___Toc9832_1783990655" text:style-name="Index_20_Link" text:visited-style-name="Index_20_Link">Disponibilité<text:tab/>9</text:a></text:p>
          <text:p text:style-name="P119">2.8 <text:s text:c="2"/><text:a xlink:type="simple" xlink:href="#__RefHeading___Toc9834_1783990655" text:style-name="Index_20_Link" text:visited-style-name="Index_20_Link">Performances<text:tab/>9</text:a></text:p>
          <text:p text:style-name="P119">2.9 <text:s text:c="2"/><text:a xlink:type="simple" xlink:href="#__RefHeading___Toc9836_1783990655" text:style-name="Index_20_Link" text:visited-style-name="Index_20_Link">Intégrité<text:tab/>10</text:a></text:p>
          <text:p text:style-name="P119">2.10 <text:s text:c="2"/><text:a xlink:type="simple" xlink:href="#__RefHeading___Toc9838_1783990655" text:style-name="Index_20_Link" text:visited-style-name="Index_20_Link">Traçabilité<text:tab/>10</text:a></text:p>
          <text:p text:style-name="P119">2.11 <text:s text:c="2"/><text:a xlink:type="simple" xlink:href="#__RefHeading___Toc9840_1783990655" text:style-name="Index_20_Link" text:visited-style-name="Index_20_Link">Confidentialité<text:tab/>10</text:a></text:p>
          <text:p text:style-name="P120">2.11.1 <text:s text:c="2"/><text:a xlink:type="simple" xlink:href="#__RefHeading___Toc9842_1783990655" text:style-name="Index_20_Link" text:visited-style-name="Index_20_Link">Registre des traitements<text:tab/>10</text:a></text:p>
          <text:p text:style-name="P120">2.11.2 <text:s text:c="2"/><text:a xlink:type="simple" xlink:href="#__RefHeading___Toc9844_1783990655" text:style-name="Index_20_Link" text:visited-style-name="Index_20_Link">Restrictions d'accès<text:tab/>10</text:a></text:p>
          <text:p text:style-name="P120">2.11.3 <text:s text:c="2"/><text:a xlink:type="simple" xlink:href="#__RefHeading___Toc9846_1783990655" text:style-name="Index_20_Link" text:visited-style-name="Index_20_Link">Délibération CNIL<text:tab/>11</text:a></text:p>
          <text:p text:style-name="P120">2.11.4 <text:s text:c="2"/><text:a xlink:type="simple" xlink:href="#__RefHeading___Toc9848_1783990655" text:style-name="Index_20_Link" text:visited-style-name="Index_20_Link">Contrainte d'anonymisation<text:tab/>11</text:a></text:p>
          <text:p text:style-name="P120">2.11.5 <text:s text:c="2"/><text:a xlink:type="simple" xlink:href="#__RefHeading___Toc9850_1783990655" text:style-name="Index_20_Link" text:visited-style-name="Index_20_Link">Habilitation de sécurité<text:tab/>11</text:a></text:p>
          <text:p text:style-name="P119">2.12 <text:s text:c="2"/><text:a xlink:type="simple" xlink:href="#__RefHeading___Toc9852_1783990655" text:style-name="Index_20_Link" text:visited-style-name="Index_20_Link">Volumétrie métier<text:tab/>11</text:a></text:p>
          <text:p text:style-name="P119">2.13 <text:s text:c="2"/><text:a xlink:type="simple" xlink:href="#__RefHeading___Toc9854_1783990655" text:style-name="Index_20_Link" text:visited-style-name="Index_20_Link">Archivage légal<text:tab/>11</text:a></text:p>
          <text:p text:style-name="P119">2.14 <text:s text:c="2"/><text:a xlink:type="simple" xlink:href="#__RefHeading___Toc9856_1783990655" text:style-name="Index_20_Link" text:visited-style-name="Index_20_Link">Accessibilité<text:tab/>11</text:a></text:p>
          <text:p text:style-name="P119">2.15 <text:s text:c="2"/><text:a xlink:type="simple" xlink:href="#__RefHeading___Toc9858_1783990655" text:style-name="Index_20_Link" text:visited-style-name="Index_20_Link">Services opérés<text:tab/>12</text:a></text:p>
          <text:p text:style-name="P119">2.16 <text:s text:c="2"/><text:a xlink:type="simple" xlink:href="#__RefHeading___Toc9860_1783990655" text:style-name="Index_20_Link" text:visited-style-name="Index_20_Link">Licenses<text:tab/>12</text:a></text:p>
          <text:p text:style-name="P118">3 <text:s text:c="2"/><text:a xlink:type="simple" xlink:href="#__RefHeading___Toc9862_1783990655" text:style-name="Index_20_Link" text:visited-style-name="Index_20_Link">Fonctionnel<text:tab/>12</text:a></text:p>
          <text:p text:style-name="P119">3.1 <text:s text:c="2"/><text:a xlink:type="simple" xlink:href="#__RefHeading___Toc9864_1783990655" text:style-name="Index_20_Link" text:visited-style-name="Index_20_Link">Périmètre global<text:tab/>12</text:a></text:p>
          <text:p text:style-name="P119">3.2 <text:s text:c="2"/><text:a xlink:type="simple" xlink:href="#__RefHeading___Toc9866_1783990655" text:style-name="Index_20_Link" text:visited-style-name="Index_20_Link">Plan d'occupation des sols<text:tab/>12</text:a></text:p>
          <text:p text:style-name="P119">3.3 <text:s text:c="2"/><text:a xlink:type="simple" xlink:href="#__RefHeading___Toc9868_1783990655" text:style-name="Index_20_Link" text:visited-style-name="Index_20_Link">Blocs fonctionnels<text:tab/>13</text:a></text:p>
          <text:p text:style-name="P119">3.4 <text:s text:c="2"/><text:a xlink:type="simple" xlink:href="#__RefHeading___Toc9870_1783990655" text:style-name="Index_20_Link" text:visited-style-name="Index_20_Link">Lots de livraison prévus<text:tab/>13</text:a></text:p>
          <text:p text:style-name="P119">3.5 <text:s text:c="2"/><text:a xlink:type="simple" xlink:href="#__RefHeading___Toc9872_1783990655" text:style-name="Index_20_Link" text:visited-style-name="Index_20_Link">Évolutions prévues<text:tab/>13</text:a></text:p>
          <text:p text:style-name="P119">3.6 <text:s text:c="2"/><text:a xlink:type="simple" xlink:href="#__RefHeading___Toc9874_1783990655" text:style-name="Index_20_Link" text:visited-style-name="Index_20_Link">Utilisateurs de l'application<text:tab/>13</text:a></text:p>
          <text:p text:style-name="P119">3.7 <text:s text:c="2"/><text:a xlink:type="simple" xlink:href="#__RefHeading___Toc9876_1783990655" text:style-name="Index_20_Link" text:visited-style-name="Index_20_Link">Rôles<text:tab/>13</text:a></text:p>
          <text:p text:style-name="P119">3.8 <text:s text:c="2"/><text:a xlink:type="simple" xlink:href="#__RefHeading___Toc9878_1783990655" text:style-name="Index_20_Link" text:visited-style-name="Index_20_Link">Boîtes aux lettres fonctionnelles<text:tab/>14</text:a></text:p>
          <text:p text:style-name="P118">4 <text:s text:c="2"/><text:a xlink:type="simple" xlink:href="#__RefHeading___Toc9880_1783990655" text:style-name="Index_20_Link" text:visited-style-name="Index_20_Link">Applicatif<text:tab/>14</text:a></text:p>
          <text:p text:style-name="P119">4.1 <text:s text:c="2"/><text:a xlink:type="simple" xlink:href="#__RefHeading___Toc9882_1783990655" text:style-name="Index_20_Link" text:visited-style-name="Index_20_Link">Hébergement<text:tab/>14</text:a></text:p>
          <text:p text:style-name="P119">4.2 <text:s text:c="2"/><text:a xlink:type="simple" xlink:href="#__RefHeading___Toc9884_1783990655" text:style-name="Index_20_Link" text:visited-style-name="Index_20_Link">Architecture applicative externe<text:tab/>15</text:a></text:p>
          <text:p text:style-name="P119">4.3 <text:s text:c="2"/><text:a xlink:type="simple" xlink:href="#__RefHeading___Toc9886_1783990655" text:style-name="Index_20_Link" text:visited-style-name="Index_20_Link">Applications liées<text:tab/>15</text:a></text:p>
          <text:p text:style-name="P119">4.4 <text:s text:c="2"/><text:a xlink:type="simple" xlink:href="#__RefHeading___Toc9888_1783990655" text:style-name="Index_20_Link" text:visited-style-name="Index_20_Link">Architecture applicative interne<text:tab/>16</text:a></text:p>
          <text:p text:style-name="P119">4.5 <text:s text:c="2"/><text:a xlink:type="simple" xlink:href="#__RefHeading___Toc9890_1783990655%20Copie%201" text:style-name="Index_20_Link" text:visited-style-name="Index_20_Link">Architecture applicative interne - Vue composants<text:tab/>16</text:a></text:p>
          <text:p text:style-name="P119">4.6 <text:s text:c="2"/><text:a xlink:type="simple" xlink:href="#__RefHeading___Toc9890_1783990655" text:style-name="Index_20_Link" text:visited-style-name="Index_20_Link">Critères techniques frontend<text:tab/>17</text:a></text:p>
          <text:p text:style-name="P119"><text:soft-page-break/>4.7 <text:s text:c="2"/><text:a xlink:type="simple" xlink:href="#__RefHeading___Toc9892_1783990655" text:style-name="Index_20_Link" text:visited-style-name="Index_20_Link">Version des assets<text:tab/>17</text:a></text:p>
          <text:p text:style-name="P119">4.8 <text:s text:c="2"/><text:a xlink:type="simple" xlink:href="#__RefHeading___Toc9894_1783990655" text:style-name="Index_20_Link" text:visited-style-name="Index_20_Link">Backend<text:tab/>17</text:a></text:p>
          <text:p text:style-name="P119">4.9 <text:s text:c="2"/><text:a xlink:type="simple" xlink:href="#__RefHeading___Toc9896_1783990655" text:style-name="Index_20_Link" text:visited-style-name="Index_20_Link">Gestion des sessions<text:tab/>18</text:a></text:p>
          <text:p text:style-name="P119">4.10 <text:s text:c="2"/><text:a xlink:type="simple" xlink:href="#__RefHeading___Toc9898_1783990655" text:style-name="Index_20_Link" text:visited-style-name="Index_20_Link">Bases de données<text:tab/>18</text:a></text:p>
          <text:p text:style-name="P119">4.11 <text:s text:c="2"/><text:a xlink:type="simple" xlink:href="#__RefHeading___Toc9900_1783990655" text:style-name="Index_20_Link" text:visited-style-name="Index_20_Link">Gestion documentaire<text:tab/>19</text:a></text:p>
          <text:p text:style-name="P119">4.12 <text:s text:c="2"/><text:a xlink:type="simple" xlink:href="#__RefHeading___Toc9902_1783990655" text:style-name="Index_20_Link" text:visited-style-name="Index_20_Link">critères principaux<text:tab/>19</text:a></text:p>
          <text:p text:style-name="P119">4.13 <text:s text:c="2"/><text:a xlink:type="simple" xlink:href="#__RefHeading___Toc9904_1783990655" text:style-name="Index_20_Link" text:visited-style-name="Index_20_Link">Version des API<text:tab/>20</text:a></text:p>
          <text:p text:style-name="P119">4.14 <text:s text:c="2"/><text:a xlink:type="simple" xlink:href="#__RefHeading___Toc9906_1783990655" text:style-name="Index_20_Link" text:visited-style-name="Index_20_Link">Chemins réservés<text:tab/>20</text:a></text:p>
          <text:p text:style-name="P119">4.15 <text:s text:c="2"/><text:a xlink:type="simple" xlink:href="#__RefHeading___Toc9908_1783990655" text:style-name="Index_20_Link" text:visited-style-name="Index_20_Link">Piles Logicielles<text:tab/>20</text:a></text:p>
          <text:p text:style-name="P119">4.16 <text:s text:c="2"/><text:a xlink:type="simple" xlink:href="#__RefHeading___Toc9910_1783990655" text:style-name="Index_20_Link" text:visited-style-name="Index_20_Link">Tâches planifiées<text:tab/>21</text:a></text:p>
          <text:p text:style-name="P119">4.17 <text:s text:c="2"/><text:a xlink:type="simple" xlink:href="#__RefHeading___Toc9912_1783990655" text:style-name="Index_20_Link" text:visited-style-name="Index_20_Link">Docker<text:tab/>21</text:a></text:p>
          <text:p text:style-name="P119">4.18 <text:s text:c="2"/><text:a xlink:type="simple" xlink:href="#__RefHeading___Toc9914_1783990655" text:style-name="Index_20_Link" text:visited-style-name="Index_20_Link">Systèmes d'exploitation<text:tab/>22</text:a></text:p>
          <text:p text:style-name="P119">4.19 <text:s text:c="2"/><text:a xlink:type="simple" xlink:href="#__RefHeading___Toc9916_1783990655" text:style-name="Index_20_Link" text:visited-style-name="Index_20_Link">Gestion des librairies<text:tab/>22</text:a></text:p>
          <text:p text:style-name="P119">4.20 <text:s text:c="2"/><text:a xlink:type="simple" xlink:href="#__RefHeading___Toc9918_1783990655" text:style-name="Index_20_Link" text:visited-style-name="Index_20_Link"><text:s/>Version des codes sources<text:tab/>22</text:a></text:p>
          <text:p text:style-name="P119">4.21 <text:s text:c="2"/><text:a xlink:type="simple" xlink:href="#__RefHeading___Toc9920_1783990655" text:style-name="Index_20_Link" text:visited-style-name="Index_20_Link">Architecture logicielle<text:tab/>22</text:a></text:p>
          <text:p text:style-name="P118">5 <text:s text:c="2"/><text:a xlink:type="simple" xlink:href="#__RefHeading___Toc9922_1783990655" text:style-name="Index_20_Link" text:visited-style-name="Index_20_Link">Services transverses et technique<text:tab/>22</text:a></text:p>
          <text:p text:style-name="P119">5.1 <text:s text:c="2"/><text:a xlink:type="simple" xlink:href="#__RefHeading___Toc9924_1783990655" text:style-name="Index_20_Link" text:visited-style-name="Index_20_Link">Services implémentés<text:tab/>22</text:a></text:p>
          <text:p text:style-name="P119">5.2 <text:s text:c="2"/><text:a xlink:type="simple" xlink:href="#__RefHeading___Toc9926_1783990655" text:style-name="Index_20_Link" text:visited-style-name="Index_20_Link"><text:s/>SSO – Passage2<text:tab/>23</text:a></text:p>
          <text:p text:style-name="P119">5.3 <text:s text:c="2"/><text:a xlink:type="simple" xlink:href="#__RefHeading___Toc9928_1783990655" text:style-name="Index_20_Link" text:visited-style-name="Index_20_Link">France Connect<text:tab/>24</text:a></text:p>
          <text:p text:style-name="P119">5.4 <text:s text:c="2"/><text:a xlink:type="simple" xlink:href="#__RefHeading___Toc9930_1783990655" text:style-name="Index_20_Link" text:visited-style-name="Index_20_Link">ProConnect<text:tab/>24</text:a></text:p>
          <text:p text:style-name="P119">5.5 <text:s text:c="2"/><text:a xlink:type="simple" xlink:href="#__RefHeading___Toc9932_1783990655" text:style-name="Index_20_Link" text:visited-style-name="Index_20_Link">Serveur relais d'envoi d'e-mail<text:tab/>25</text:a></text:p>
          <text:p text:style-name="P119">5.6 <text:s text:c="2"/><text:a xlink:type="simple" xlink:href="#__RefHeading___Toc9934_1783990655" text:style-name="Index_20_Link" text:visited-style-name="Index_20_Link">Passerelle API<text:tab/>25</text:a></text:p>
          <text:p text:style-name="P119">5.7 <text:s text:c="2"/><text:a xlink:type="simple" xlink:href="#__RefHeading___Toc9936_1783990655" text:style-name="Index_20_Link" text:visited-style-name="Index_20_Link">INES SAS<text:tab/>25</text:a></text:p>
          <text:p text:style-name="P119">5.8 <text:s text:c="2"/><text:a xlink:type="simple" xlink:href="#__RefHeading___Toc9938_1783990655" text:style-name="Index_20_Link" text:visited-style-name="Index_20_Link">Horodatage<text:tab/>26</text:a></text:p>
          <text:p text:style-name="P119">5.9 <text:s text:c="2"/><text:a xlink:type="simple" xlink:href="#__RefHeading___Toc9940_1783990655" text:style-name="Index_20_Link" text:visited-style-name="Index_20_Link">Signature électronique<text:tab/>26</text:a></text:p>
          <text:p text:style-name="P118">6 <text:s text:c="2"/><text:a xlink:type="simple" xlink:href="#__RefHeading___Toc9942_1783990655" text:style-name="Index_20_Link" text:visited-style-name="Index_20_Link">Données<text:tab/>26</text:a></text:p>
          <text:p text:style-name="P119">6.1 <text:s text:c="2"/><text:a xlink:type="simple" xlink:href="#__RefHeading___Toc9944_1783990655" text:style-name="Index_20_Link" text:visited-style-name="Index_20_Link">Modèle Conceptuel des Données<text:tab/>26</text:a></text:p>
          <text:p text:style-name="P119">6.2 <text:s text:c="2"/><text:a xlink:type="simple" xlink:href="#__RefHeading___Toc9946_1783990655" text:style-name="Index_20_Link" text:visited-style-name="Index_20_Link">Modèle Logique des Données<text:tab/>26</text:a></text:p>
          <text:p text:style-name="P119">6.3 <text:s text:c="2"/><text:a xlink:type="simple" xlink:href="#__RefHeading___Toc9948_1783990655" text:style-name="Index_20_Link" text:visited-style-name="Index_20_Link">Modèle Physique des Données<text:tab/>27</text:a></text:p>
          <text:p text:style-name="P119">6.4 <text:s text:c="2"/><text:a xlink:type="simple" xlink:href="#__RefHeading___Toc9960_1783990655" text:style-name="Index_20_Link" text:visited-style-name="Index_20_Link">Volume des bases de données<text:tab/>27</text:a></text:p>
          <text:p text:style-name="P119">6.5 <text:s text:c="2"/><text:a xlink:type="simple" xlink:href="#__RefHeading___Toc9962_1783990655" text:style-name="Index_20_Link" text:visited-style-name="Index_20_Link"><text:s/>Migration des données<text:tab/>27</text:a></text:p>
          <text:p text:style-name="P119">6.6 <text:s text:c="2"/><text:a xlink:type="simple" xlink:href="#__RefHeading___Toc9964_1783990655" text:style-name="Index_20_Link" text:visited-style-name="Index_20_Link">Reprise des données<text:tab/>28</text:a></text:p>
          <text:p text:style-name="P119">6.7 <text:s text:c="2"/><text:a xlink:type="simple" xlink:href="#__RefHeading___Toc9966_1783990655" text:style-name="Index_20_Link" text:visited-style-name="Index_20_Link">Données anonymisées<text:tab/>28</text:a></text:p>
          <text:p text:style-name="P119">6.8 <text:s text:c="2"/><text:a xlink:type="simple" xlink:href="#__RefHeading___Toc9968_1783990655" text:style-name="Index_20_Link" text:visited-style-name="Index_20_Link">Chiffrement<text:tab/>28</text:a></text:p>
          <text:p text:style-name="P119">6.9 <text:s text:c="2"/><text:a xlink:type="simple" xlink:href="#__RefHeading___Toc9950_1783990655" text:style-name="Index_20_Link" text:visited-style-name="Index_20_Link">API consommées<text:tab/>28</text:a></text:p>
          <text:p text:style-name="P119">6.10 <text:s text:c="2"/><text:a xlink:type="simple" xlink:href="#__RefHeading___Toc9952_1783990655" text:style-name="Index_20_Link" text:visited-style-name="Index_20_Link">API exposées<text:tab/>28</text:a></text:p>
          <text:p text:style-name="P119">6.11 <text:s text:c="2"/><text:a xlink:type="simple" xlink:href="#__RefHeading___Toc9954_1783990655" text:style-name="Index_20_Link" text:visited-style-name="Index_20_Link">Fichiers d'import de données<text:tab/>28</text:a></text:p>
          <text:p text:style-name="P119">6.12 <text:s text:c="2"/><text:a xlink:type="simple" xlink:href="#__RefHeading___Toc9956_1783990655" text:style-name="Index_20_Link" text:visited-style-name="Index_20_Link">Fichiers d'export de données<text:tab/>28</text:a></text:p>
          <text:p text:style-name="P118">7 <text:s text:c="2"/><text:a xlink:type="simple" xlink:href="#__RefHeading___Toc9970_1783990655" text:style-name="Index_20_Link" text:visited-style-name="Index_20_Link">Infrastructure<text:tab/>30</text:a></text:p>
          <text:p text:style-name="P119">7.1 <text:s text:c="2"/><text:a xlink:type="simple" xlink:href="#__RefHeading___Toc9972_1783990655" text:style-name="Index_20_Link" text:visited-style-name="Index_20_Link">Environnements<text:tab/>30</text:a></text:p>
          <text:p text:style-name="P119">7.2 <text:s text:c="2"/><text:a xlink:type="simple" xlink:href="#__RefHeading___Toc9974_1783990655" text:style-name="Index_20_Link" text:visited-style-name="Index_20_Link">Dimensionnement des « serveurs »<text:tab/>31</text:a></text:p>
          <text:p text:style-name="P118">8 <text:s text:c="2"/><text:a xlink:type="simple" xlink:href="#__RefHeading___Toc9976_1783990655" text:style-name="Index_20_Link" text:visited-style-name="Index_20_Link">DNS, certificats et CDS<text:tab/>32</text:a></text:p>
          <text:p text:style-name="P119">8.1 <text:s text:c="2"/><text:a xlink:type="simple" xlink:href="#__RefHeading___Toc9978_1783990655" text:style-name="Index_20_Link" text:visited-style-name="Index_20_Link">Flux<text:tab/>33</text:a></text:p>
          <text:p text:style-name="P119">8.2 <text:s text:c="2"/><text:a xlink:type="simple" xlink:href="#__RefHeading___Toc9980_1783990655" text:style-name="Index_20_Link" text:visited-style-name="Index_20_Link"><text:s/>Security Groups<text:tab/>34</text:a></text:p>
          <text:p text:style-name="P119">8.3 <text:s text:c="2"/><text:a xlink:type="simple" xlink:href="#__RefHeading___Toc9982_1783990655" text:style-name="Index_20_Link" text:visited-style-name="Index_20_Link"><text:s/>Réseaux<text:tab/>35</text:a></text:p>
          <text:p text:style-name="P119">8.4 <text:s text:c="2"/><text:a xlink:type="simple" xlink:href="#__RefHeading___Toc9984_1783990655" text:style-name="Index_20_Link" text:visited-style-name="Index_20_Link"><text:s/>Server Groups<text:tab/>35</text:a></text:p>
          <text:p text:style-name="P119">8.5 <text:s text:c="2"/><text:a xlink:type="simple" xlink:href="#__RefHeading___Toc9986_1783990655" text:style-name="Index_20_Link" text:visited-style-name="Index_20_Link">Livraison<text:tab/>35</text:a></text:p>
          <text:p text:style-name="P119">8.6 <text:s text:c="2"/><text:a xlink:type="simple" xlink:href="#__RefHeading___Toc9988_1783990655" text:style-name="Index_20_Link" text:visited-style-name="Index_20_Link">Gestion des secrets<text:tab/>36</text:a></text:p>
          <text:p text:style-name="P119"><text:soft-page-break/>8.7 <text:s text:c="2"/><text:a xlink:type="simple" xlink:href="#__RefHeading___Toc9990_1783990655" text:style-name="Index_20_Link" text:visited-style-name="Index_20_Link">Technologies de déploiement<text:tab/>36</text:a></text:p>
          <text:p text:style-name="P119">8.8 <text:s text:c="2"/><text:a xlink:type="simple" xlink:href="#__RefHeading___Toc9992_1783990655" text:style-name="Index_20_Link" text:visited-style-name="Index_20_Link"><text:s/>Maintien en condition opérationnelle<text:tab/>36</text:a></text:p>
          <text:p text:style-name="P118">9 <text:s text:c="2"/><text:a xlink:type="simple" xlink:href="#__RefHeading___Toc9994_1783990655" text:style-name="Index_20_Link" text:visited-style-name="Index_20_Link">Tests<text:tab/>36</text:a></text:p>
          <text:p text:style-name="P119">9.1 <text:s text:c="2"/><text:a xlink:type="simple" xlink:href="#__RefHeading___Toc9996_1783990655" text:style-name="Index_20_Link" text:visited-style-name="Index_20_Link">Résumé des tests<text:tab/>36</text:a></text:p>
          <text:p text:style-name="P118">10 <text:s text:c="2"/><text:a xlink:type="simple" xlink:href="#__RefHeading___Toc9998_1783990655" text:style-name="Index_20_Link" text:visited-style-name="Index_20_Link">Sécurité<text:tab/>37</text:a></text:p>
          <text:p text:style-name="P119">10.1 <text:s text:c="2"/><text:a xlink:type="simple" xlink:href="#__RefHeading___Toc10000_1783990655" text:style-name="Index_20_Link" text:visited-style-name="Index_20_Link">Analyse de risque<text:tab/>37</text:a></text:p>
          <text:p text:style-name="P119">10.2 <text:s text:c="2"/><text:a xlink:type="simple" xlink:href="#__RefHeading___Toc10002_1783990655" text:style-name="Index_20_Link" text:visited-style-name="Index_20_Link">Homologation<text:tab/>37</text:a></text:p>
          <text:p text:style-name="P119">10.3 <text:s text:c="2"/><text:a xlink:type="simple" xlink:href="#__RefHeading___Toc10004_1783990655" text:style-name="Index_20_Link" text:visited-style-name="Index_20_Link"><text:s/>Chaîne de service<text:tab/>37</text:a></text:p>
          <text:p text:style-name="P119">10.4 <text:s text:c="2"/><text:a xlink:type="simple" xlink:href="#__RefHeading___Toc10006_1783990655" text:style-name="Index_20_Link" text:visited-style-name="Index_20_Link">Upload<text:tab/>37</text:a></text:p>
          <text:p text:style-name="P119">10.5 <text:s text:c="2"/><text:a xlink:type="simple" xlink:href="#__RefHeading___Toc10008_1783990655" text:style-name="Index_20_Link" text:visited-style-name="Index_20_Link">Librairies logicielles<text:tab/>37</text:a></text:p>
          <text:p text:style-name="P120">10.5.1 <text:s text:c="2"/><text:a xlink:type="simple" xlink:href="#__RefHeading___Toc10010_1783990655" text:style-name="Index_20_Link" text:visited-style-name="Index_20_Link">Installation<text:tab/>37</text:a></text:p>
          <text:p text:style-name="P119">10.6 <text:s text:c="2"/><text:a xlink:type="simple" xlink:href="#__RefHeading___Toc10012_1783990655" text:style-name="Index_20_Link" text:visited-style-name="Index_20_Link">Gestion des comptes et mots de passe<text:tab/>38</text:a></text:p>
          <text:p text:style-name="P120">10.6.1 <text:s text:c="2"/><text:a xlink:type="simple" xlink:href="#__RefHeading___Toc10014_1783990655" text:style-name="Index_20_Link" text:visited-style-name="Index_20_Link">Création de mot de passe<text:tab/>38</text:a></text:p>
          <text:p text:style-name="P120">10.6.2 <text:s text:c="2"/><text:a xlink:type="simple" xlink:href="#__RefHeading___Toc10016_1783990655" text:style-name="Index_20_Link" text:visited-style-name="Index_20_Link">Tentatives de connexion<text:tab/>38</text:a></text:p>
          <text:p text:style-name="P120">10.6.3 <text:s text:c="2"/><text:a xlink:type="simple" xlink:href="#__RefHeading___Toc10018_1783990655" text:style-name="Index_20_Link" text:visited-style-name="Index_20_Link">Renouvellement des mots de passe<text:tab/>38</text:a></text:p>
          <text:p text:style-name="P120">10.6.4 <text:s text:c="2"/><text:a xlink:type="simple" xlink:href="#__RefHeading___Toc10020_1783990655" text:style-name="Index_20_Link" text:visited-style-name="Index_20_Link">Stockage<text:tab/>38</text:a></text:p>
          <text:p text:style-name="P120">10.6.5 <text:s text:c="2"/><text:a xlink:type="simple" xlink:href="#__RefHeading___Toc10022_1783990655" text:style-name="Index_20_Link" text:visited-style-name="Index_20_Link">Règles complémentaires<text:tab/>38</text:a></text:p>
          <text:p text:style-name="P119">10.7 <text:s text:c="2"/><text:a xlink:type="simple" xlink:href="#__RefHeading___Toc10024_1783990655" text:style-name="Index_20_Link" text:visited-style-name="Index_20_Link">Comptes utilisateurs<text:tab/>39</text:a></text:p>
          <text:p text:style-name="P119">10.8 <text:s text:c="2"/><text:a xlink:type="simple" xlink:href="#__RefHeading___Toc10026_1783990655" text:style-name="Index_20_Link" text:visited-style-name="Index_20_Link">Archivage de sécurité<text:tab/>39</text:a></text:p>
          <text:p text:style-name="P119">10.9 <text:s text:c="2"/><text:a xlink:type="simple" xlink:href="#__RefHeading___Toc10030_1783990655" text:style-name="Index_20_Link" text:visited-style-name="Index_20_Link">Maintenance Applicative<text:tab/>39</text:a></text:p>
          <text:p text:style-name="P120">10.9.1 <text:s text:c="2"/><text:a xlink:type="simple" xlink:href="#__RefHeading___Toc10032_1783990655" text:style-name="Index_20_Link" text:visited-style-name="Index_20_Link">Tierce maintenance applicative<text:tab/>39</text:a></text:p>
          <text:p text:style-name="P120">10.9.2 <text:s text:c="2"/><text:a xlink:type="simple" xlink:href="#__RefHeading___Toc10034_1783990655" text:style-name="Index_20_Link" text:visited-style-name="Index_20_Link">Maintenance applicative<text:tab/>40</text:a></text:p>
          <text:p text:style-name="P120">10.9.3 <text:s text:c="2"/><text:a xlink:type="simple" xlink:href="#__RefHeading___Toc10036_1783990655" text:style-name="Index_20_Link" text:visited-style-name="Index_20_Link">Maintenance évolutive<text:tab/>40</text:a></text:p>
          <text:p text:style-name="P119">10.10 <text:s text:c="2"/><text:a xlink:type="simple" xlink:href="#__RefHeading___Toc10038_1783990655" text:style-name="Index_20_Link" text:visited-style-name="Index_20_Link">Administration des environnements<text:tab/>40</text:a></text:p>
          <text:p text:style-name="P118">11 <text:s text:c="2"/><text:a xlink:type="simple" xlink:href="#__RefHeading___Toc10040_1783990655" text:style-name="Index_20_Link" text:visited-style-name="Index_20_Link">PRA<text:tab/>40</text:a></text:p>
          <text:p text:style-name="P119">11.1 <text:s text:c="2"/><text:a xlink:type="simple" xlink:href="#__RefHeading___Toc10042_1783990655" text:style-name="Index_20_Link" text:visited-style-name="Index_20_Link">Stratégie de sauvegarde<text:tab/>40</text:a></text:p>
          <text:p text:style-name="P119">11.2 <text:s text:c="2"/><text:a xlink:type="simple" xlink:href="#__RefHeading___Toc10044_1783990655" text:style-name="Index_20_Link" text:visited-style-name="Index_20_Link">Sauvegarde des bases de données<text:tab/>40</text:a></text:p>
          <text:p text:style-name="P119">11.3 <text:s text:c="2"/><text:a xlink:type="simple" xlink:href="#__RefHeading___Toc10046_1783990655" text:style-name="Index_20_Link" text:visited-style-name="Index_20_Link">Sauvegarde des fichiers<text:tab/>41</text:a></text:p>
          <text:p text:style-name="P119">11.4 <text:s text:c="2"/><text:a xlink:type="simple" xlink:href="#__RefHeading___Toc10048_1783990655" text:style-name="Index_20_Link" text:visited-style-name="Index_20_Link">Sauvegarde des logs<text:tab/>41</text:a></text:p>
          <text:p text:style-name="P119">11.5 <text:s text:c="2"/><text:a xlink:type="simple" xlink:href="#__RefHeading___Toc10050_1783990655" text:style-name="Index_20_Link" text:visited-style-name="Index_20_Link">Emplacements des sauvegardes<text:tab/>41</text:a></text:p>
          <text:p text:style-name="P119">11.6 <text:s text:c="2"/><text:a xlink:type="simple" xlink:href="#__RefHeading___Toc10052_1783990655" text:style-name="Index_20_Link" text:visited-style-name="Index_20_Link"><text:s/>Environnements sauvegardés<text:tab/>42</text:a></text:p>
          <text:p text:style-name="P118">12 <text:s text:c="2"/><text:a xlink:type="simple" xlink:href="#__RefHeading___Toc10054_1783990655" text:style-name="Index_20_Link" text:visited-style-name="Index_20_Link">PCA<text:tab/>42</text:a></text:p>
          <text:p text:style-name="P119">12.1 <text:s text:c="2"/><text:a xlink:type="simple" xlink:href="#__RefHeading___Toc10056_1783990655" text:style-name="Index_20_Link" text:visited-style-name="Index_20_Link">Politique de redémarrage des serveurs<text:tab/>42</text:a></text:p>
          <text:p text:style-name="P119">12.2 <text:s text:c="2"/><text:a xlink:type="simple" xlink:href="#__RefHeading___Toc10058_1783990655" text:style-name="Index_20_Link" text:visited-style-name="Index_20_Link">Redondance des serveurs<text:tab/>43</text:a></text:p>
          <text:p text:style-name="P119">12.3 <text:s text:c="2"/><text:a xlink:type="simple" xlink:href="#__RefHeading___Toc10060_1783990655" text:style-name="Index_20_Link" text:visited-style-name="Index_20_Link">Bascule des serveurs<text:tab/>43</text:a></text:p>
          <text:p text:style-name="P119">12.4 <text:s text:c="2"/><text:a xlink:type="simple" xlink:href="#__RefHeading___Toc10062_1783990655" text:style-name="Index_20_Link" text:visited-style-name="Index_20_Link">Redondance des bases de données<text:tab/>44</text:a></text:p>
          <text:p text:style-name="P119">12.5 <text:s text:c="2"/><text:a xlink:type="simple" xlink:href="#__RefHeading___Toc10064_1783990655" text:style-name="Index_20_Link" text:visited-style-name="Index_20_Link">Site de secours<text:tab/>44</text:a></text:p>
          <text:p text:style-name="P119">12.6 <text:s text:c="2"/><text:a xlink:type="simple" xlink:href="#__RefHeading___Toc10066_1783990655" text:style-name="Index_20_Link" text:visited-style-name="Index_20_Link">Réplication des fichiers<text:tab/>44</text:a></text:p>
          <text:p text:style-name="P119">12.7 <text:s text:c="2"/><text:a xlink:type="simple" xlink:href="#__RefHeading___Toc10068_1783990655" text:style-name="Index_20_Link" text:visited-style-name="Index_20_Link">Réplication des logs<text:tab/>44</text:a></text:p>
          <text:p text:style-name="P119">12.8 <text:s text:c="2"/><text:a xlink:type="simple" xlink:href="#__RefHeading___Toc10070_1783990655" text:style-name="Index_20_Link" text:visited-style-name="Index_20_Link">Bascule inter-sites<text:tab/>44</text:a></text:p>
          <text:p text:style-name="P119">12.9 <text:s text:c="2"/><text:a xlink:type="simple" xlink:href="#__RefHeading___Toc10072_1783990655" text:style-name="Index_20_Link" text:visited-style-name="Index_20_Link">Supervision<text:tab/>44</text:a></text:p>
          <text:p text:style-name="P119">12.10 <text:s text:c="2"/><text:a xlink:type="simple" xlink:href="#__RefHeading___Toc10074_1783990655" text:style-name="Index_20_Link" text:visited-style-name="Index_20_Link">Chaîne Soutien Utilisateur<text:tab/>45</text:a></text:p>
          <text:p text:style-name="P118">13 <text:s text:c="2"/><text:a xlink:type="simple" xlink:href="#__RefHeading___Toc10076_1783990655" text:style-name="Index_20_Link" text:visited-style-name="Index_20_Link">Services opérés<text:tab/>45</text:a></text:p>
          <text:p text:style-name="P119">13.1 <text:s text:c="2"/><text:a xlink:type="simple" xlink:href="#__RefHeading___Toc10078_1783990655" text:style-name="Index_20_Link" text:visited-style-name="Index_20_Link">Intégration<text:tab/>45</text:a></text:p>
          <text:p text:style-name="P119">13.2 <text:s text:c="2"/><text:a xlink:type="simple" xlink:href="#__RefHeading___Toc10080_1783990655" text:style-name="Index_20_Link" text:visited-style-name="Index_20_Link">Service d'exploitation<text:tab/>45</text:a></text:p>
          <text:p text:style-name="P118">14 <text:s text:c="2"/><text:a xlink:type="simple" xlink:href="#__RefHeading___Toc10084_1783990655" text:style-name="Index_20_Link" text:visited-style-name="Index_20_Link">Performance<text:tab/>45</text:a></text:p>
          <text:p text:style-name="P119">14.1 <text:s text:c="2"/><text:a xlink:type="simple" xlink:href="#__RefHeading___Toc10086_1783990655" text:style-name="Index_20_Link" text:visited-style-name="Index_20_Link">Mesure d'audience<text:tab/>45</text:a></text:p>
          <text:p text:style-name="P119">14.2 <text:s text:c="2"/><text:a xlink:type="simple" xlink:href="#__RefHeading___Toc10088_1783990655" text:style-name="Index_20_Link" text:visited-style-name="Index_20_Link"><text:s/>Performance de la base de données<text:tab/>45</text:a></text:p>
          <text:p text:style-name="P119">14.3 <text:s text:c="2"/><text:a xlink:type="simple" xlink:href="#__RefHeading___Toc10090_1783990655" text:style-name="Index_20_Link" text:visited-style-name="Index_20_Link">Caches<text:tab/>45</text:a></text:p>
          <text:p text:style-name="P120"><text:soft-page-break/>14.3.1 <text:s text:c="2"/><text:a xlink:type="simple" xlink:href="#__RefHeading___Toc10092_1783990655" text:style-name="Index_20_Link" text:visited-style-name="Index_20_Link"><text:s/>Cache du navigateur<text:tab/>45</text:a></text:p>
          <text:p text:style-name="P120">14.3.2 <text:s text:c="2"/><text:a xlink:type="simple" xlink:href="#__RefHeading___Toc10094_1783990655" text:style-name="Index_20_Link" text:visited-style-name="Index_20_Link">Cache HTTP<text:tab/>45</text:a></text:p>
          <text:p text:style-name="P120">14.3.3 <text:s text:c="2"/><text:a xlink:type="simple" xlink:href="#__RefHeading___Toc10096_1783990655" text:style-name="Index_20_Link" text:visited-style-name="Index_20_Link">Cache du backend<text:tab/>46</text:a></text:p>
          <text:p text:style-name="P120">14.3.4 <text:s text:c="2"/><text:a xlink:type="simple" xlink:href="#__RefHeading___Toc10098_1783990655" text:style-name="Index_20_Link" text:visited-style-name="Index_20_Link">Cache de base de données<text:tab/>46</text:a></text:p>
          <text:p text:style-name="P119">14.4 <text:s text:c="2"/><text:a xlink:type="simple" xlink:href="#__RefHeading___Toc10100_1783990655" text:style-name="Index_20_Link" text:visited-style-name="Index_20_Link">Scalabilité horizontale<text:tab/>46</text:a></text:p>
          <text:p text:style-name="P118">15 <text:s text:c="2"/><text:a xlink:type="simple" xlink:href="#__RefHeading___Toc10102_1783990655" text:style-name="Index_20_Link" text:visited-style-name="Index_20_Link">Annexes<text:tab/>47</text:a></text:p>
          <text:p text:style-name="P119">15.1 <text:s text:c="2"/><text:a xlink:type="simple" xlink:href="#__RefHeading___Toc10104_1783990655" text:style-name="Index_20_Link" text:visited-style-name="Index_20_Link">Sources<text:tab/>47</text:a></text:p>
          <text:p text:style-name="P119">15.2 <text:s text:c="2"/><text:a xlink:type="simple" xlink:href="#__RefHeading___Toc10108_1783990655%20Copie%201" text:style-name="Index_20_Link" text:visited-style-name="Index_20_Link">Définitions métier<text:tab/>47</text:a></text:p>
          <text:p text:style-name="P119">15.3 <text:s text:c="2"/><text:a xlink:type="simple" xlink:href="#__RefHeading___Toc10106_1783990655" text:style-name="Index_20_Link" text:visited-style-name="Index_20_Link">Définitions techniques<text:tab/>48</text:a></text:p>
          <text:p text:style-name="P119">15.4 <text:s text:c="2"/><text:a xlink:type="simple" xlink:href="#__RefHeading___Toc10112_1783990655" text:style-name="Index_20_Link" text:visited-style-name="Index_20_Link">Normes et stratégies de APIs<text:tab/>50</text:a></text:p>
          <text:p text:style-name="P119">15.5 <text:s text:c="2"/><text:a xlink:type="simple" xlink:href="#__RefHeading___Toc10114_1783990655" text:style-name="Index_20_Link" text:visited-style-name="Index_20_Link">Méthodes HTTP<text:tab/>50</text:a></text:p>
          <text:p text:style-name="P119">15.6 <text:s text:c="2"/><text:a xlink:type="simple" xlink:href="#__RefHeading___Toc10116_1783990655" text:style-name="Index_20_Link" text:visited-style-name="Index_20_Link">Codes HTTP<text:tab/>51</text:a></text:p>
          <text:p text:style-name="P119">15.7 <text:s text:c="2"/><text:a xlink:type="simple" xlink:href="#__RefHeading___Toc10118_1783990655" text:style-name="Index_20_Link" text:visited-style-name="Index_20_Link">Régions cloud<text:tab/>51</text:a></text:p>
          <text:p text:style-name="P119">15.8 <text:s text:c="2"/><text:a xlink:type="simple" xlink:href="#__RefHeading___Toc10120_1783990655" text:style-name="Index_20_Link" text:visited-style-name="Index_20_Link">Zones cloud<text:tab/>51</text:a></text:p>
          <text:p text:style-name="P119">15.9 <text:s text:c="2"/><text:a xlink:type="simple" xlink:href="#__RefHeading___Toc10122_1783990655" text:style-name="Index_20_Link" text:visited-style-name="Index_20_Link">Niveau d'habilitation de sécurité<text:tab/>51</text:a></text:p>
          <text:p text:style-name="P119">15.10 <text:s text:c="2"/><text:a xlink:type="simple" xlink:href="#__RefHeading___Toc10124_1783990655" text:style-name="Index_20_Link" text:visited-style-name="Index_20_Link">Niveau de disponibilité<text:tab/>51</text:a></text:p>
          <text:p text:style-name="P119">15.11 <text:s text:c="2"/><text:a xlink:type="simple" xlink:href="#__RefHeading___Toc10126_1783990655" text:style-name="Index_20_Link" text:visited-style-name="Index_20_Link">Niveau d'accessibilité<text:tab/>52</text:a></text:p>
          <text:p text:style-name="P119">15.12 <text:s text:c="2"/><text:a xlink:type="simple" xlink:href="#__RefHeading___Toc10128_1783990655" text:style-name="Index_20_Link" text:visited-style-name="Index_20_Link">Stratégie de redémarrage<text:tab/>52</text:a></text:p>
        </text:index-body>
      </text:table-of-content>
      <text:p text:style-name="Normal"/>
      <text:h text:style-name="Heading_20_1" text:outline-level="1"><text:bookmark-start text:name="_Toc177660664"/><text:bookmark-start text:name="_Toc177652543"/><text:bookmark-start text:name="_Toc177652079"/><text:bookmark-start text:name="__RefHeading___Toc9818_1783990655"/><text:bookmark-start text:name="_Toc177568901"/>Métier et contraintes<text:bookmark-end text:name="_Toc177660664"/><text:bookmark-end text:name="_Toc177652543"/><text:bookmark-end text:name="_Toc177652079"/><text:bookmark-end text:name="__RefHeading___Toc9818_1783990655"/><text:bookmark-end text:name="_Toc177568901"/></text:h>
      <text:p text:style-name="Normal"/>
      <text:h text:style-name="Heading_20_2" text:outline-level="2"><text:bookmark-start text:name="_Toc177660665"/><text:bookmark-start text:name="_Toc177652544"/><text:bookmark-start text:name="_Toc177652080"/><text:bookmark-start text:name="__RefHeading___Toc9820_1783990655"/><text:bookmark-start text:name="_Toc177568902"/>Contexte général<text:bookmark-end text:name="_Toc177660665"/><text:bookmark-end text:name="_Toc177652544"/><text:bookmark-end text:name="_Toc177652080"/><text:bookmark-end text:name="__RefHeading___Toc9820_1783990655"/><text:bookmark-end text:name="_Toc177568902"/></text:h>
      <text:p text:style-name="P28"/>
      <text:p text:style-name="P9">Décrire le contexte et les acteurs métier en quelques lignes.</text:p>
      <text:p text:style-name="P9">Rappeler brièvement la raison d’être du projet, et les besoins principaux sans trop rentrer dans les détails (quelques lignes).</text:p>
      <text:p text:style-name="Normal"/>
      <text:h text:style-name="Heading_20_2" text:outline-level="2"><text:bookmark-start text:name="_Toc177660666"/><text:bookmark-start text:name="_Toc177652545"/><text:bookmark-start text:name="_Toc177652081"/><text:bookmark-start text:name="__RefHeading___Toc9822_1783990655"/><text:bookmark-start text:name="_Toc177568903"/>Calendaires<text:bookmark-end text:name="_Toc177660666"/><text:bookmark-end text:name="_Toc177652545"/><text:bookmark-end text:name="_Toc177652081"/><text:bookmark-end text:name="__RefHeading___Toc9822_1783990655"/><text:bookmark-end text:name="_Toc177568903"/></text:h>
      <table:table table:name="Tableau6" table:style-name="Tableau6">
        <table:table-column table:style-name="Tableau6.A" table:number-columns-repeated="2"/>
        <table:table-row>
          <table:table-cell table:style-name="Tableau6.A1" office:value-type="string">
            <text:p text:style-name="P17">Date</text:p>
          </table:table-cell>
          <table:table-cell table:style-name="Tableau6.A1" office:value-type="string">
            <text:p text:style-name="P17">Contrainte</text:p>
          </table:table-cell>
        </table:table-row>
        <table:table-row>
          <table:table-cell table:style-name="Tableau6.A1" office:value-type="string">
            <text:p text:style-name="P20"/>
          </table:table-cell>
          <table:table-cell table:style-name="Tableau6.A1" office:value-type="string">
            <text:p text:style-name="P20">Dé commissionnement de l'ancienne plateforme</text:p>
          </table:table-cell>
        </table:table-row>
      </table:table>
      <text:p text:style-name="Normal"/>
      <text:h text:style-name="Heading_20_2" text:outline-level="2"><text:bookmark-start text:name="_Toc177660667"/><text:bookmark-start text:name="_Toc177652546"/><text:bookmark-start text:name="_Toc177652082"/><text:bookmark-start text:name="__RefHeading___Toc9824_1783990655"/><text:bookmark-start text:name="_Toc177568904"/>Résilience<text:bookmark-end text:name="_Toc177660667"/><text:bookmark-end text:name="_Toc177652546"/><text:bookmark-end text:name="_Toc177652082"/><text:bookmark-end text:name="__RefHeading___Toc9824_1783990655"/><text:bookmark-end text:name="_Toc177568904"/></text:h>
      <text:p text:style-name="Normal">Les solutions de résilience permettent de gérer les différents scénarios d’incidents possibles sur l’application.<text:line-break/>Elles sont aussi adaptées en fonction des besoins de disponibilité et d’intégrité.</text:p>
      <text:p text:style-name="Normal">La résilience est mise en place par les éléments complémentaires suivants :</text:p>
      <text:list text:style-name="L4">
        <text:list-item>
          <text:p text:style-name="P142">le PCA : Plan de Continuité d’Activité</text:p>
        </text:list-item>
        <text:list-item>
          <text:p text:style-name="P142">Le PRA : Plan de Reprise d’Activité</text:p>
        </text:list-item>
        <text:list-item>
          <text:p text:style-name="P142">Un support adapté aux exigences</text:p>
        </text:list-item>
      </text:list>
      <text:p text:style-name="Normal"/>
      <text:p text:style-name="Normal"><text:soft-page-break/>Le DAG comprend uniquement l’aspect applicatif. L’hébergement possède ses propres mécanismes et documentations.</text:p>
      <text:p text:style-name="Normal"/>
      <text:h text:style-name="Heading_20_2" text:outline-level="2"><text:bookmark-start text:name="_Toc177660668"/><text:bookmark-start text:name="_Toc177652547"/><text:bookmark-start text:name="_Toc177652083"/><text:bookmark-start text:name="__RefHeading___Toc9826_1783990655"/><text:bookmark-start text:name="_Toc177568905"/>Ouverture du service et supports<text:bookmark-end text:name="_Toc177660668"/><text:bookmark-end text:name="_Toc177652547"/><text:bookmark-end text:name="_Toc177652083"/><text:bookmark-end text:name="__RefHeading___Toc9826_1783990655"/><text:bookmark-end text:name="_Toc177568905"/></text:h>
      <text:p text:style-name="P13">Plages horaires de disponibilité de l’application requise par les services métiers</text:p>
      <text:p text:style-name="P10"/>
      <table:table table:name="Tableau7" table:style-name="Tableau7">
        <table:table-column table:style-name="Tableau7.A" table:number-columns-repeated="4"/>
        <table:table-row>
          <table:table-cell table:style-name="Tableau7.A1" office:value-type="string">
            <text:p text:style-name="P17">Contexte</text:p>
          </table:table-cell>
          <table:table-cell table:style-name="Tableau7.A1" office:value-type="string">
            <text:p text:style-name="P17">Périmètre</text:p>
          </table:table-cell>
          <table:table-cell table:style-name="Tableau7.A1" office:value-type="string">
            <text:p text:style-name="P17">Personnes concernées</text:p>
          </table:table-cell>
          <table:table-cell table:style-name="Tableau7.A1" office:value-type="string">
            <text:p text:style-name="P17">Plage de disponibilité</text:p>
          </table:table-cell>
        </table:table-row>
        <table:table-row>
          <table:table-cell table:style-name="Tableau7.A1" office:value-type="string">
            <text:p text:style-name="P29">Application</text:p>
          </table:table-cell>
          <table:table-cell table:style-name="Tableau7.A1" office:value-type="string">
            <text:p text:style-name="P29">Ouverture du service</text:p>
          </table:table-cell>
          <table:table-cell table:style-name="Tableau7.A1" office:value-type="string">
            <text:p text:style-name="P29">Utilisateurs</text:p>
          </table:table-cell>
          <table:table-cell table:style-name="Tableau7.A1" office:value-type="string">
            <text:p text:style-name="P29">24h/24, 7j/7</text:p>
          </table:table-cell>
        </table:table-row>
        <table:table-row>
          <table:table-cell table:style-name="Tableau7.A1" office:value-type="string">
            <text:p text:style-name="P29">Support niveau 1</text:p>
          </table:table-cell>
          <table:table-cell table:style-name="Tableau7.A1" office:value-type="string">
            <text:p text:style-name="P29">Problème non bloquant</text:p>
          </table:table-cell>
          <table:table-cell table:style-name="Tableau7.A1" office:value-type="string">
            <text:p text:style-name="P29">Supervision</text:p>
          </table:table-cell>
          <table:table-cell table:style-name="Tableau7.A1" office:value-type="string">
            <text:p text:style-name="P29">horaires de bureau (8h-18h 5j/7)</text:p>
          </table:table-cell>
        </table:table-row>
        <table:table-row>
          <table:table-cell table:style-name="Tableau7.A1" office:value-type="string">
            <text:p text:style-name="P29">Support niveau 2</text:p>
          </table:table-cell>
          <table:table-cell table:style-name="Tableau7.A1" office:value-type="string">
            <text:p text:style-name="P29">Problème bloquant</text:p>
          </table:table-cell>
          <table:table-cell table:style-name="Tableau7.A1" office:value-type="string">
            <text:p text:style-name="P29">Niveau 1 + Intégration, Exploitation, TMA</text:p>
          </table:table-cell>
          <table:table-cell table:style-name="Tableau7.A1" office:value-type="string">
            <text:p text:style-name="P29">horaires de bureau (8h-18h 5j/7)</text:p>
          </table:table-cell>
        </table:table-row>
        <table:table-row>
          <table:table-cell table:style-name="Tableau7.A1" office:value-type="string">
            <text:p text:style-name="P29">Support niveau 3</text:p>
          </table:table-cell>
          <table:table-cell table:style-name="Tableau7.A1" office:value-type="string">
            <text:p text:style-name="P29">Situation de crise</text:p>
          </table:table-cell>
          <table:table-cell table:style-name="Tableau7.A1" office:value-type="string">
            <text:p text:style-name="P29">Niveau 2 + Chef de projet et service métier</text:p>
          </table:table-cell>
          <table:table-cell table:style-name="Tableau7.A1" office:value-type="string">
            <text:p text:style-name="P29">horaires de bureau (8h-18h 5j/7)</text:p>
          </table:table-cell>
        </table:table-row>
      </table:table>
      <text:p text:style-name="Normal"/>
      <text:h text:style-name="Heading_20_2" text:outline-level="2"><text:bookmark-start text:name="_Toc177660669"/><text:bookmark-start text:name="_Toc177652548"/><text:bookmark-start text:name="_Toc177652084"/><text:bookmark-start text:name="__RefHeading___Toc9828_1783990655"/><text:bookmark-start text:name="_Toc177568906"/>Critère PRA<text:bookmark-end text:name="_Toc177660669"/><text:bookmark-end text:name="_Toc177652548"/><text:bookmark-end text:name="_Toc177652084"/><text:bookmark-end text:name="__RefHeading___Toc9828_1783990655"/><text:bookmark-end text:name="_Toc177568906"/></text:h>
      <text:p text:style-name="P9"><text:span text:style-name="T56">L</text:span>e PRA est mis en place pour ne perdre ni les sources ni les données de l’application (sauvegardes) et doit couvrir les incidents majeurs. Il comprend aussi la capacité à redéployer rapidement à partir de ces sources.</text:p>
      <text:p text:style-name="Normal">Critères principaux</text:p>
      <table:table table:name="Tableau8" table:style-name="Tableau8">
        <table:table-column table:style-name="Tableau8.A"/>
        <table:table-column table:style-name="Tableau8.B"/>
        <table:table-column table:style-name="Tableau8.C"/>
        <table:table-row>
          <table:table-cell table:style-name="Tableau8.A1" office:value-type="string">
            <text:p text:style-name="P17">Contrainte</text:p>
          </table:table-cell>
          <table:table-cell table:style-name="Tableau8.A1" office:value-type="string">
            <text:p text:style-name="P17">Détails</text:p>
          </table:table-cell>
          <table:table-cell table:style-name="Tableau8.A1" office:value-type="string">
            <text:p text:style-name="P17">Valeur</text:p>
          </table:table-cell>
        </table:table-row>
        <table:table-row>
          <table:table-cell table:style-name="Tableau8.A1" office:value-type="string">
            <text:p text:style-name="P29">PDMA (Perte de Données Maximale Admissible)</text:p>
          </table:table-cell>
          <table:table-cell table:style-name="Tableau8.A1" office:value-type="string">
            <text:p text:style-name="P29">La PDMA commence à s’exprimer à l’instant où l’incident majeur arrive. C’est l’écart maximal possible entre les données de production et celles dans le stockage de secours.</text:p>
          </table:table-cell>
          <table:table-cell table:style-name="Tableau8.A1" office:value-type="string">
            <text:p text:style-name="P30"/>
            <text:p text:style-name="P30"/>
            <text:p text:style-name="P30">[nb][minutes, heures, jours]</text:p>
          </table:table-cell>
        </table:table-row>
        <table:table-row>
          <table:table-cell table:style-name="Tableau8.A1" office:value-type="string">
            <text:p text:style-name="P29">Sauvegarde locale</text:p>
          </table:table-cell>
          <table:table-cell table:style-name="Tableau8.A1" office:value-type="string">
            <text:p text:style-name="P29">Sauvegarde principale utilisée en cas d’incident mineur</text:p>
          </table:table-cell>
          <table:table-cell table:style-name="Tableau8.A1" office:value-type="string">
            <text:p text:style-name="P30">Oui / Non</text:p>
          </table:table-cell>
        </table:table-row>
        <table:table-row>
          <table:table-cell table:style-name="Tableau8.A1" office:value-type="string">
            <text:p text:style-name="P29">Sauvegarde externe</text:p>
          </table:table-cell>
          <table:table-cell table:style-name="Tableau8.A1" office:value-type="string">
            <text:p text:style-name="P29">Sauvegarde secondaire utilisée en cas d’incident majeur</text:p>
          </table:table-cell>
          <table:table-cell table:style-name="Tableau8.A1" office:value-type="string">
            <text:p text:style-name="P30">Oui / Non</text:p>
          </table:table-cell>
        </table:table-row>
        <table:table-row>
          <table:table-cell table:style-name="Tableau8.A1" office:value-type="string">
            <text:p text:style-name="P29">Archivage technique</text:p>
          </table:table-cell>
          <table:table-cell table:style-name="Tableau8.A1" office:value-type="string">
            <text:p text:style-name="P29">Sauvegarde de versions précédentes pour retour en arrière ou analyse en cas d’incident</text:p>
          </table:table-cell>
          <table:table-cell table:style-name="Tableau8.A1" office:value-type="string">
            <text:p text:style-name="P30">Oui / Non [nombre de versions ou intervalle de temps]</text:p>
          </table:table-cell>
        </table:table-row>
      </table:table>
      <text:p text:style-name="first-paragraph">Besoins spécifiques supplémentaires du PRA :</text:p>
      <text:p text:style-name="P80">{ A compléter si nécessaire }</text:p>
      <text:p text:style-name="Normal"/>
      <text:h text:style-name="Heading_20_2" text:outline-level="2"><text:bookmark-start text:name="_Toc177660670"/><text:bookmark-start text:name="_Toc177652549"/><text:bookmark-start text:name="__RefHeading___Toc9830_1783990655"/><text:bookmark-start text:name="_Toc177652085"/>Critère PCA<text:bookmark-end text:name="_Toc177660670"/><text:bookmark-end text:name="_Toc177652549"/><text:bookmark-end text:name="__RefHeading___Toc9830_1783990655"/><text:bookmark-end text:name="_Toc177652085"/></text:h>
      <text:p text:style-name="P9">Le PCA met en place les mécanismes pour assurer la continuité de service en prévoyant les scénarios principaux d’incidents d’interruption possibles.</text:p>
      <text:p text:style-name="P9"><text:soft-page-break/>Les mécanismes principaux utilisés sont la redondance des serveurs, le déploiement d’un 2ème site et la gestion des bascules.</text:p>
      <text:p text:style-name="Normal">Critères principaux</text:p>
      <table:table table:name="Tableau9" table:style-name="Tableau9">
        <table:table-column table:style-name="Tableau9.A"/>
        <table:table-column table:style-name="Tableau9.B"/>
        <table:table-column table:style-name="Tableau9.C"/>
        <table:table-row>
          <table:table-cell table:style-name="Tableau9.A1" office:value-type="string">
            <text:p text:style-name="P17">Contrainte</text:p>
          </table:table-cell>
          <table:table-cell table:style-name="Tableau9.A1" office:value-type="string">
            <text:p text:style-name="P17">Détails</text:p>
          </table:table-cell>
          <table:table-cell table:style-name="Tableau9.A1" office:value-type="string">
            <text:p text:style-name="P17">Valeur</text:p>
          </table:table-cell>
        </table:table-row>
        <table:table-row>
          <table:table-cell table:style-name="Tableau9.A1" office:value-type="string">
            <text:p text:style-name="P29">DIMA (Durée <text:span text:style-name="T87">Maximale </text:span>d’Interruption Admissible)</text:p>
          </table:table-cell>
          <table:table-cell table:style-name="Tableau9.A1" office:value-type="string">
            <text:p text:style-name="P29">C’est le délai de rétablissement d’une application, à la suite d’un incident majeur, pour éviter des conséquences importantes associées à une rupture de la continuité d’activité. Il définit le temps alloué pour faire le déploiement/basculement vers le nouveau système.</text:p>
          </table:table-cell>
          <table:table-cell table:style-name="Tableau9.A1" office:value-type="string">
            <text:p text:style-name="P30"/>
            <text:p text:style-name="P30"/>
            <text:p text:style-name="P30">[nb][minutes, heures, jours]</text:p>
          </table:table-cell>
        </table:table-row>
        <table:table-row>
          <table:table-cell table:style-name="Tableau9.A1" office:value-type="string">
            <text:p text:style-name="P29">Site de secours</text:p>
          </table:table-cell>
          <table:table-cell table:style-name="Tableau9.A1" office:value-type="string">
            <text:p text:style-name="P29">La mise en place d’un site de secours offre un niveau de résilience élevé</text:p>
          </table:table-cell>
          <table:table-cell table:style-name="Tableau9.A1" office:value-type="string">
            <text:p text:style-name="P30">Oui / Non</text:p>
          </table:table-cell>
        </table:table-row>
        <table:table-row>
          <table:table-cell table:style-name="Tableau9.A1" office:value-type="string">
            <text:p text:style-name="P29">Redondance des serveurs</text:p>
          </table:table-cell>
          <table:table-cell table:style-name="Tableau9.A1" office:value-type="string">
            <text:p text:style-name="P29">La redondance des serveurs permet la continuité de service lors d’incidents mineurs et évite d’avoir un "Point de défaillance unique".</text:p>
          </table:table-cell>
          <table:table-cell table:style-name="Tableau9.A1" office:value-type="string">
            <text:p text:style-name="P30">Oui / Non</text:p>
          </table:table-cell>
        </table:table-row>
      </table:table>
      <text:p text:style-name="P16">Besoins spécifiques</text:p>
      <text:p text:style-name="P80"><text:span text:style-name="Police_20_par_20_défaut"><text:span text:style-name="T12">{ A compléter si nécessaire }</text:span></text:span></text:p>
      <text:p text:style-name="Normal"/>
      <text:h text:style-name="Heading_20_2" text:outline-level="2"><text:bookmark-start text:name="_Toc177660671"/><text:bookmark-start text:name="_Toc177652550"/><text:bookmark-start text:name="_Toc177652086"/><text:bookmark-start text:name="__RefHeading___Toc9832_1783990655"/><text:bookmark-start text:name="_Toc177568907"/>Disponibilité<text:bookmark-end text:name="_Toc177660671"/><text:bookmark-end text:name="_Toc177652550"/><text:bookmark-end text:name="_Toc177652086"/><text:bookmark-end text:name="__RefHeading___Toc9832_1783990655"/><text:bookmark-end text:name="_Toc177568907"/></text:h>
      <text:p text:style-name="P55"><text:span text:style-name="Police_20_par_20_défaut"><text:span text:style-name="T14">Niveau de haute disponibilité requis</text:span></text:span></text:p>
      <table:table table:name="Tableau10" table:style-name="Tableau10">
        <table:table-column table:style-name="Tableau10.A" table:number-columns-repeated="4"/>
        <table:table-row>
          <table:table-cell table:style-name="Tableau10.A1" office:value-type="string">
            <text:p text:style-name="P35">Disponibilité en %</text:p>
          </table:table-cell>
          <table:table-cell table:style-name="Tableau10.A1" office:value-type="string">
            <text:p text:style-name="P35">Indisponibilité par année</text:p>
          </table:table-cell>
          <table:table-cell table:style-name="Tableau10.A1" office:value-type="string">
            <text:p text:style-name="P35">Indisponibilité par mois</text:p>
          </table:table-cell>
          <table:table-cell table:style-name="Tableau10.A1" office:value-type="string">
            <text:p text:style-name="P35">Indisponibilité par semaine</text:p>
          </table:table-cell>
        </table:table-row>
        <table:table-row>
          <table:table-cell table:style-name="Tableau10.A1" office:value-type="string">
            <text:p text:style-name="P36">98,00 %</text:p>
          </table:table-cell>
          <table:table-cell table:style-name="Tableau10.A1" office:value-type="string">
            <text:p text:style-name="P36">7,30 jours</text:p>
          </table:table-cell>
          <table:table-cell table:style-name="Tableau10.A1" office:value-type="string">
            <text:p text:style-name="P36">14,4 heures</text:p>
          </table:table-cell>
          <table:table-cell table:style-name="Tableau10.A1" office:value-type="string">
            <text:p text:style-name="P36">3,36 heures</text:p>
          </table:table-cell>
        </table:table-row>
      </table:table>
      <text:p text:style-name="Normal"/>
      <text:h text:style-name="Heading_20_2" text:outline-level="2"><text:bookmark-start text:name="_Toc177660672"/><text:bookmark-start text:name="_Toc177652551"/><text:bookmark-start text:name="_Toc177652087"/><text:bookmark-start text:name="__RefHeading___Toc9834_1783990655"/><text:bookmark-start text:name="_Toc177568908"/>Performances<text:bookmark-end text:name="_Toc177660672"/><text:bookmark-end text:name="_Toc177652551"/><text:bookmark-end text:name="_Toc177652087"/><text:bookmark-end text:name="__RefHeading___Toc9834_1783990655"/><text:bookmark-end text:name="_Toc177568908"/></text:h>
      <text:p text:style-name="P55"><text:span text:style-name="Police_20_par_20_défaut"><text:span text:style-name="T14">Critères requis</text:span></text:span></text:p>
      <table:table table:name="Tableau11" table:style-name="Tableau11">
        <table:table-column table:style-name="Tableau11.A" table:number-columns-repeated="2"/>
        <table:table-row>
          <table:table-cell table:style-name="Tableau11.A1" office:value-type="string">
            <text:p text:style-name="P35">Périmètre</text:p>
          </table:table-cell>
          <table:table-cell table:style-name="Tableau11.A1" office:value-type="string">
            <text:p text:style-name="P35">Temps de réponse</text:p>
          </table:table-cell>
        </table:table-row>
        <table:table-row>
          <table:table-cell table:style-name="Tableau11.A1" office:value-type="string">
            <text:p text:style-name="P36">Page principale</text:p>
          </table:table-cell>
          <table:table-cell table:style-name="Tableau11.A1" office:value-type="string">
            <text:p text:style-name="P36">&lt; 1s</text:p>
          </table:table-cell>
        </table:table-row>
        <table:table-row>
          <table:table-cell table:style-name="Tableau11.A1" office:value-type="string">
            <text:p text:style-name="P36">Page normale</text:p>
          </table:table-cell>
          <table:table-cell table:style-name="Tableau11.A1" office:value-type="string">
            <text:p text:style-name="P36">&lt; 500ms</text:p>
          </table:table-cell>
        </table:table-row>
        <table:table-row>
          <table:table-cell table:style-name="Tableau11.A1" office:value-type="string">
            <text:p text:style-name="P36">Page complexe (style dashboard)</text:p>
          </table:table-cell>
          <table:table-cell table:style-name="Tableau11.A1" office:value-type="string">
            <text:p text:style-name="P36">&lt; 2s</text:p>
          </table:table-cell>
        </table:table-row>
        <table:table-row>
          <table:table-cell table:style-name="Tableau11.A1" office:value-type="string">
            <text:p text:style-name="P36">API</text:p>
          </table:table-cell>
          <table:table-cell table:style-name="Tableau11.A1" office:value-type="string">
            <text:p text:style-name="P36">&lt; 50ms</text:p>
          </table:table-cell>
        </table:table-row>
        <table:table-row>
          <table:table-cell table:style-name="Tableau11.A1" office:value-type="string">
            <text:p text:style-name="P36">First Input Delay (FID)</text:p>
          </table:table-cell>
          <table:table-cell table:style-name="Tableau11.A1" office:value-type="string">
            <text:p text:style-name="P36">&lt; 100ms</text:p>
          </table:table-cell>
        </table:table-row>
        <table:table-row>
          <table:table-cell table:style-name="Tableau11.A1" office:value-type="string">
            <text:p text:style-name="P36">Cumulative Layout Shift (CLS)</text:p>
          </table:table-cell>
          <table:table-cell table:style-name="Tableau11.A1" office:value-type="string">
            <text:p text:style-name="P36">&lt; 0,1</text:p>
          </table:table-cell>
        </table:table-row>
        <table:table-row table:style-name="Tableau11.8">
          <table:table-cell table:style-name="Tableau11.A1" office:value-type="string">
            <text:p text:style-name="P36">Largest Contentful Paint (LCP)</text:p>
          </table:table-cell>
          <table:table-cell table:style-name="Tableau11.A1" office:value-type="string">
            <text:p text:style-name="P36">&lt; 2,5s</text:p>
          </table:table-cell>
        </table:table-row>
      </table:table>
      <text:p text:style-name="Normal"/>
      <text:h text:style-name="Heading_20_2" text:outline-level="2"><text:bookmark-start text:name="_Toc177660673"/><text:bookmark-start text:name="_Toc177652552"/><text:bookmark-start text:name="_Toc177652088"/><text:bookmark-start text:name="__RefHeading___Toc9836_1783990655"/><text:bookmark-start text:name="_Toc177568909"/><text:soft-page-break/>Intégrité<text:bookmark-end text:name="_Toc177660673"/><text:bookmark-end text:name="_Toc177652552"/><text:bookmark-end text:name="_Toc177652088"/><text:bookmark-end text:name="__RefHeading___Toc9836_1783990655"/><text:bookmark-end text:name="_Toc177568909"/></text:h>
      <text:p text:style-name="Normal">Critères requis</text:p>
      <table:table table:name="Tableau12" table:style-name="Tableau12">
        <table:table-column table:style-name="Tableau12.A" table:number-columns-repeated="2"/>
        <table:table-row>
          <table:table-cell table:style-name="Tableau12.A1" office:value-type="string">
            <text:p text:style-name="P35">Périmètre</text:p>
          </table:table-cell>
          <table:table-cell table:style-name="Tableau12.A1" office:value-type="string">
            <text:p text:style-name="P35">Niveau</text:p>
          </table:table-cell>
        </table:table-row>
        <table:table-row>
          <table:table-cell table:style-name="Tableau12.A1" office:value-type="string">
            <text:p text:style-name="P36">global</text:p>
          </table:table-cell>
          <table:table-cell table:style-name="Tableau12.A1" office:value-type="string">
            <text:p text:style-name="P36">Standard<text:line-break/>Important<text:line-break/>Très important</text:p>
          </table:table-cell>
        </table:table-row>
      </table:table>
      <text:p text:style-name="Normal"/>
      <text:p text:style-name="Normal"/>
      <text:h text:style-name="Heading_20_2" text:outline-level="2"><text:bookmark-start text:name="_Toc177660674"/><text:bookmark-start text:name="_Toc177652553"/><text:bookmark-start text:name="_Toc177652089"/><text:bookmark-start text:name="__RefHeading___Toc9838_1783990655"/><text:bookmark-start text:name="_Toc177568910"/>Traçabilité<text:bookmark-end text:name="_Toc177660674"/><text:bookmark-end text:name="_Toc177652553"/><text:bookmark-end text:name="_Toc177652089"/><text:bookmark-end text:name="__RefHeading___Toc9838_1783990655"/><text:bookmark-end text:name="_Toc177568910"/></text:h>
      <table:table table:name="Tableau13" table:style-name="Tableau13">
        <table:table-column table:style-name="Tableau13.A" table:number-columns-repeated="2"/>
        <table:table-row>
          <table:table-cell table:style-name="Tableau13.A1" office:value-type="string">
            <text:p text:style-name="P35">Élément à tracer</text:p>
          </table:table-cell>
          <table:table-cell table:style-name="Tableau13.A1" office:value-type="string">
            <text:p text:style-name="P35">Solution</text:p>
          </table:table-cell>
        </table:table-row>
        <table:table-row>
          <table:table-cell table:style-name="Tableau13.A1" office:value-type="string">
            <text:p text:style-name="P36">Connexion utilisateur</text:p>
          </table:table-cell>
          <table:table-cell table:style-name="Tableau13.A1" office:value-type="string">
            <text:p text:style-name="P36">SSO : logs gérés par le service<text:line-break/>Comptes internes : Log en BDD + fichier<text:line-break/>- utilisateur<text:line-break/>- date et heure de connexion</text:p>
          </table:table-cell>
        </table:table-row>
        <table:table-row>
          <table:table-cell table:style-name="Tableau13.A1" office:value-type="string">
            <text:p text:style-name="P36">Action utilisateur</text:p>
          </table:table-cell>
          <table:table-cell table:style-name="Tableau13.A1" office:value-type="string">
            <text:p text:style-name="P36">Log en BDD + fichier<text:line-break/>- utilisateur<text:line-break/>- méthode appelée<text:line-break/>- date et heure</text:p>
          </table:table-cell>
        </table:table-row>
        <table:table-row>
          <table:table-cell table:style-name="Tableau13.A1" office:value-type="string">
            <text:p text:style-name="P36">Échange inter-application</text:p>
          </table:table-cell>
          <table:table-cell table:style-name="Tableau13.A1" office:value-type="string">
            <text:p text:style-name="P36">Log en BDD + fichier<text:line-break/>- client<text:line-break/>- méthode appelée<text:line-break/>- date et heure</text:p>
          </table:table-cell>
        </table:table-row>
        <table:table-row>
          <table:table-cell table:style-name="Tableau13.A1" office:value-type="string">
            <text:p text:style-name="P36">Import de fichier de données</text:p>
          </table:table-cell>
          <table:table-cell table:style-name="Tableau13.A1" office:value-type="string">
            <text:p text:style-name="P36">Log de l’action en BDD + fichier<text:line-break/>- nom du fichier<text:line-break/>- date d’import<text:line-break/>Sauvegarde du fichier importé dans le stockage objet</text:p>
          </table:table-cell>
        </table:table-row>
      </table:table>
      <text:p text:style-name="Normal"/>
      <text:h text:style-name="Heading_20_2" text:outline-level="2"><text:bookmark-start text:name="_Toc177568911"/><text:bookmark-start text:name="_Toc177652090"/><text:bookmark-start text:name="_Toc177652554"/><text:bookmark-start text:name="__RefHeading___Toc9840_1783990655"/><text:bookmark-start text:name="_Toc177660675"/>Confidentialité<text:bookmark-end text:name="_Toc177568911"/><text:bookmark-end text:name="_Toc177652090"/><text:bookmark-end text:name="_Toc177652554"/><text:bookmark-end text:name="__RefHeading___Toc9840_1783990655"/><text:bookmark-end text:name="_Toc177660675"/></text:h>
      <text:p text:style-name="P11">Le principe du moindre privilège est appliqué (seuls les droits nécessaires sont attribués à un utilisateur)</text:p>
      <text:p text:style-name="Normal"/>
      <text:h text:style-name="Heading_20_3" text:outline-level="3"><text:bookmark-start text:name="_Toc177660676"/><text:bookmark-start text:name="_Toc177652555"/><text:bookmark-start text:name="_Toc177652091"/><text:bookmark-start text:name="__RefHeading___Toc9842_1783990655"/><text:bookmark-start text:name="_Toc177568912"/>Registre des traitements<text:bookmark-end text:name="_Toc177660676"/><text:bookmark-end text:name="_Toc177652555"/><text:bookmark-end text:name="_Toc177652091"/><text:bookmark-end text:name="__RefHeading___Toc9842_1783990655"/><text:bookmark-end text:name="_Toc177568912"/></text:h>
      <text:p text:style-name="P9">Pour répondre au RGPD le registre des traitements est associé à la documentation du projet et maintenu à jour.</text:p>
      <text:p text:style-name="P54"><text:span text:style-name="Police_20_par_20_défaut"><text:span text:style-name="T15">Le système, étant sous la responsabilité de la D</text:span></text:span><text:span text:style-name="Police_20_par_20_défaut"><text:span text:style-name="T16">T</text:span></text:span><text:span text:style-name="Police_20_par_20_défaut"><text:span text:style-name="T15">NUM, renseigne en plus (</text:span></text:span><text:a xlink:type="simple" xlink:href="http://dnum.minint.fr/index.php/rdgp/traitements" office:target-frame-name="_top" xlink:show="replace" text:style-name="Internet_20_link" text:visited-style-name="Visited_20_Internet_20_Link"><text:span text:style-name="Police_20_par_20_défaut"><text:span text:style-name="T10">le tableau des informations générales de trait</text:span></text:span><text:bookmark-start text:name="_Hlt177401240"/><text:span text:style-name="Police_20_par_20_défaut"><text:span text:style-name="T10">e</text:span></text:span><text:bookmark-end text:name="_Hlt177401240"/><text:span text:style-name="Police_20_par_20_défaut"><text:span text:style-name="T10">ments</text:span></text:span></text:a><text:span text:style-name="Police_20_par_20_défaut"><text:span text:style-name="T15">.</text:span></text:span></text:p>
      <text:p text:style-name="Normal"/>
      <text:h text:style-name="Heading_20_3" text:outline-level="3"><text:bookmark-start text:name="_Toc177660677"/><text:bookmark-start text:name="_Toc177652556"/><text:bookmark-start text:name="_Toc177652092"/><text:bookmark-start text:name="__RefHeading___Toc9844_1783990655"/><text:bookmark-start text:name="_Toc177568913"/>Restrictions d'accès<text:bookmark-end text:name="_Toc177660677"/><text:bookmark-end text:name="_Toc177652556"/><text:bookmark-end text:name="_Toc177652092"/><text:bookmark-end text:name="__RefHeading___Toc9844_1783990655"/><text:bookmark-end text:name="_Toc177568913"/></text:h>
      <text:p text:style-name="P57">Les données véhiculées, stockées ou utilisées à caractère personnel ou sensible sont soumises à une restriction d’accès.</text:p>
      <text:p text:style-name="P57"><text:soft-page-break/>Le système doit garantir cette restriction, aussi bien en son sein que dans la manière d’exposer les données.</text:p>
      <text:p text:style-name="P57">Tous les environnements portants ces données personnelles ou sensibles sont concernés.</text:p>
      <text:p text:style-name="Normal"/>
      <text:h text:style-name="Heading_20_3" text:outline-level="3"><text:bookmark-start text:name="_Toc177660678"/><text:bookmark-start text:name="_Toc177652557"/><text:bookmark-start text:name="_Toc177652093"/><text:bookmark-start text:name="__RefHeading___Toc9846_1783990655"/><text:bookmark-start text:name="_Toc177568914"/>Délibération CNIL<text:bookmark-end text:name="_Toc177660678"/><text:bookmark-end text:name="_Toc177652557"/><text:bookmark-end text:name="_Toc177652093"/><text:bookmark-end text:name="__RefHeading___Toc9846_1783990655"/><text:bookmark-end text:name="_Toc177568914"/></text:h>
      <text:p text:style-name="Normal">Aucune délibération RGPD spécifique délivrée par la CNIL.</text:p>
      <text:p text:style-name="Normal"/>
      <text:h text:style-name="Heading_20_3" text:outline-level="3"><text:bookmark-start text:name="_Toc177660679"/><text:bookmark-start text:name="_Toc177652558"/><text:bookmark-start text:name="_Toc177652094"/><text:bookmark-start text:name="__RefHeading___Toc9848_1783990655"/><text:bookmark-start text:name="_Toc177568915"/>Contrainte d'anonymisation<text:bookmark-end text:name="_Toc177660679"/><text:bookmark-end text:name="_Toc177652558"/><text:bookmark-end text:name="_Toc177652094"/><text:bookmark-end text:name="__RefHeading___Toc9848_1783990655"/><text:bookmark-end text:name="_Toc177568915"/></text:h>
      <text:p text:style-name="Normal">Les fichiers de log ne doivent contenir aucune donnée personnelle ou sensible.</text:p>
      <text:p text:style-name="Normal"/>
      <text:h text:style-name="Heading_20_3" text:outline-level="3"><text:bookmark-start text:name="_Toc177660680"/><text:bookmark-start text:name="_Toc177652559"/><text:bookmark-start text:name="_Toc177652095"/><text:bookmark-start text:name="__RefHeading___Toc9850_1783990655"/><text:bookmark-start text:name="_Toc177568916"/>Habilitation de sécurité<text:bookmark-end text:name="_Toc177660680"/><text:bookmark-end text:name="_Toc177652559"/><text:bookmark-end text:name="_Toc177652095"/><text:bookmark-end text:name="__RefHeading___Toc9850_1783990655"/><text:bookmark-end text:name="_Toc177568916"/></text:h>
      <table:table table:name="Tableau14" table:style-name="Tableau14">
        <table:table-column table:style-name="Tableau14.A" table:number-columns-repeated="2"/>
        <table:table-row>
          <table:table-cell table:style-name="Tableau14.A1" office:value-type="string">
            <text:p text:style-name="P35">Populations</text:p>
          </table:table-cell>
          <table:table-cell table:style-name="Tableau14.A1" office:value-type="string">
            <text:p text:style-name="P35">Habilitation requise</text:p>
          </table:table-cell>
        </table:table-row>
        <table:table-row>
          <table:table-cell table:style-name="Tableau14.A1" office:value-type="string">
            <text:p text:style-name="P36">aucune</text:p>
          </table:table-cell>
          <table:table-cell table:style-name="Tableau14.A1" office:value-type="string">
            <text:p text:style-name="P36">Secret Défense</text:p>
          </table:table-cell>
        </table:table-row>
        <table:table-row>
          <table:table-cell table:style-name="Tableau14.A1" office:value-type="string">
            <text:p text:style-name="P36">aucune</text:p>
          </table:table-cell>
          <table:table-cell table:style-name="Tableau14.A1" office:value-type="string">
            <text:p text:style-name="P36">Très Secret Défense</text:p>
          </table:table-cell>
        </table:table-row>
      </table:table>
      <text:p text:style-name="Normal"/>
      <text:h text:style-name="Heading_20_2" text:outline-level="2"><text:bookmark-start text:name="_Toc177660681"/><text:bookmark-start text:name="_Toc177652560"/><text:bookmark-start text:name="_Toc177652096"/><text:bookmark-start text:name="__RefHeading___Toc9852_1783990655"/><text:bookmark-start text:name="_Toc177568917"/>Volumétrie métier<text:bookmark-end text:name="_Toc177660681"/><text:bookmark-end text:name="_Toc177652560"/><text:bookmark-end text:name="_Toc177652096"/><text:bookmark-end text:name="__RefHeading___Toc9852_1783990655"/><text:bookmark-end text:name="_Toc177568917"/></text:h>
      <text:p text:style-name="P91">{ A compléter }</text:p>
      <text:p text:style-name="Normal"/>
      <text:h text:style-name="Heading_20_2" text:outline-level="2"><text:bookmark-start text:name="_Toc177568918"/><text:bookmark-start text:name="_Toc177652097"/><text:bookmark-start text:name="_Toc177652561"/><text:bookmark-start text:name="__RefHeading___Toc9854_1783990655"/><text:bookmark-start text:name="_Toc177660682"/>Archivage légal<text:bookmark-end text:name="_Toc177568918"/><text:bookmark-end text:name="_Toc177652097"/><text:bookmark-end text:name="_Toc177652561"/><text:bookmark-end text:name="__RefHeading___Toc9854_1783990655"/><text:bookmark-end text:name="_Toc177660682"/></text:h>
      <text:p text:style-name="P91">{ A compléter si nécessaire }</text:p>
      <text:p text:style-name="Normal"/>
      <text:h text:style-name="Heading_20_2" text:outline-level="2"><text:bookmark-start text:name="_Toc177568919"/><text:bookmark-start text:name="_Toc177652098"/><text:bookmark-start text:name="_Toc177652562"/><text:bookmark-start text:name="__RefHeading___Toc9856_1783990655"/><text:bookmark-start text:name="_Toc177660683"/>Accessibilité<text:bookmark-end text:name="_Toc177568919"/><text:bookmark-end text:name="_Toc177652098"/><text:bookmark-end text:name="_Toc177652562"/><text:bookmark-end text:name="__RefHeading___Toc9856_1783990655"/><text:bookmark-end text:name="_Toc177660683"/></text:h>
      <text:p text:style-name="Normal">Le Référentiel général d’accessibilité pour les administrations ou Référentiel général d’amélioration de l’accessibilité (RGAA) définit les modalités techniques d’accessibilité des services en ligne.</text:p>
      <text:p text:style-name="P54"><text:a xlink:type="simple" xlink:href="https://accessibilite.numerique.gouv.fr/" office:target-frame-name="_top" xlink:show="replace" text:style-name="Internet_20_link" text:visited-style-name="Visited_20_Internet_20_Link"><text:span text:style-name="Police_20_par_20_défaut"><text:span text:style-name="T10">Accessibilité Numé</text:span></text:span><text:bookmark-start text:name="_Hlt177554106"/><text:bookmark-start text:name="_Hlt177554132"/><text:span text:style-name="Police_20_par_20_défaut"><text:span text:style-name="T10">r</text:span></text:span><text:bookmark-end text:name="_Hlt177554106"/><text:bookmark-end text:name="_Hlt177554132"/><text:span text:style-name="Police_20_par_20_défaut"><text:span text:style-name="T10">iq</text:span></text:span><text:bookmark-start text:name="_Hlt177554140"/><text:span text:style-name="Police_20_par_20_défaut"><text:span text:style-name="T10">u</text:span></text:span><text:bookmark-end text:name="_Hlt177554140"/><text:span text:style-name="Police_20_par_20_défaut"><text:span text:style-name="T10">e</text:span></text:span></text:a></text:p>
      <text:p text:style-name="P56"><text:span text:style-name="Police_20_par_20_défaut"><text:span text:style-name="T11"/></text:span></text:p>
      <text:p text:style-name="P55"><text:span text:style-name="Police_20_par_20_défaut"><text:span text:style-name="T14">Niveaux requis pour les interfaces</text:span></text:span></text:p>
      <table:table table:name="Tableau15" table:style-name="Tableau15">
        <table:table-column table:style-name="Tableau15.A" table:number-columns-repeated="2"/>
        <table:table-row>
          <table:table-cell table:style-name="Tableau15.A1" office:value-type="string">
            <text:p text:style-name="P35">Interface</text:p>
          </table:table-cell>
          <table:table-cell table:style-name="Tableau15.A1" office:value-type="string">
            <text:p text:style-name="P35">Niveau RGAA</text:p>
          </table:table-cell>
        </table:table-row>
        <table:table-row>
          <table:table-cell table:style-name="Tableau15.A1" office:value-type="string">
            <text:p text:style-name="P36">portail agents</text:p>
          </table:table-cell>
          <table:table-cell table:style-name="Tableau15.A1" office:value-type="string">
            <text:p text:style-name="P36"/>
          </table:table-cell>
        </table:table-row>
        <table:table-row>
          <table:table-cell table:style-name="Tableau15.A1" office:value-type="string">
            <text:p text:style-name="P36">portail citoyens</text:p>
          </table:table-cell>
          <table:table-cell table:style-name="Tableau15.A1" office:value-type="string">
            <text:p text:style-name="P36"/>
          </table:table-cell>
        </table:table-row>
      </table:table>
      <text:p text:style-name="Normal"/>
      <text:p text:style-name="Normal"/>
      <text:h text:style-name="Heading_20_2" text:outline-level="2"><text:bookmark-start text:name="_Toc177568920"/><text:bookmark-start text:name="_Toc177652099"/><text:bookmark-start text:name="_Toc177652563"/><text:bookmark-start text:name="__RefHeading___Toc9858_1783990655"/><text:bookmark-start text:name="_Toc177660684"/><text:soft-page-break/>Service<text:span text:style-name="T29">s</text:span> opérés<text:bookmark-end text:name="_Toc177568920"/><text:bookmark-end text:name="_Toc177652099"/><text:bookmark-end text:name="_Toc177652563"/><text:bookmark-end text:name="__RefHeading___Toc9858_1783990655"/><text:bookmark-end text:name="_Toc177660684"/></text:h>
      <table:table table:name="Tableau16" table:style-name="Tableau16">
        <table:table-column table:style-name="Tableau16.A" table:number-columns-repeated="2"/>
        <table:table-row>
          <table:table-cell table:style-name="Tableau16.A1" office:value-type="string">
            <text:p text:style-name="P35">Service opéré</text:p>
          </table:table-cell>
          <table:table-cell table:style-name="Tableau16.A1" office:value-type="string">
            <text:p text:style-name="P35">Organisme responsable</text:p>
          </table:table-cell>
        </table:table-row>
        <table:table-row>
          <table:table-cell table:style-name="Tableau16.A1" office:value-type="string">
            <text:p text:style-name="P36">Développement</text:p>
          </table:table-cell>
          <table:table-cell table:style-name="Tableau16.A1" office:value-type="string">
            <text:p text:style-name="P36">prestation externe</text:p>
          </table:table-cell>
        </table:table-row>
        <table:table-row>
          <table:table-cell table:style-name="Tableau16.A1" office:value-type="string">
            <text:p text:style-name="P36">Intégration</text:p>
          </table:table-cell>
          <table:table-cell table:style-name="Tableau16.A1" office:value-type="string">
            <text:p text:style-name="P36">D<text:span text:style-name="T91">T</text:span>NUM / SD<text:span text:style-name="T91">AN</text:span> / B<text:span text:style-name="T91">FO</text:span></text:p>
          </table:table-cell>
        </table:table-row>
        <table:table-row>
          <table:table-cell table:style-name="Tableau16.A1" office:value-type="string">
            <text:p text:style-name="P36">Exploitation</text:p>
          </table:table-cell>
          <table:table-cell table:style-name="Tableau16.A1" office:value-type="string">
            <text:p text:style-name="P36">D<text:span text:style-name="T91">T</text:span>NUM / SD<text:span text:style-name="T91">AN</text:span> / B<text:span text:style-name="T91">FO</text:span></text:p>
          </table:table-cell>
        </table:table-row>
        <table:table-row>
          <table:table-cell table:style-name="Tableau16.A1" office:value-type="string">
            <text:p text:style-name="P36">Supervision</text:p>
          </table:table-cell>
          <table:table-cell table:style-name="Tableau16.A1" office:value-type="string">
            <text:p text:style-name="P36">D<text:span text:style-name="T91">T</text:span>NUM / SD<text:span text:style-name="T91">AS</text:span> / BS</text:p>
          </table:table-cell>
        </table:table-row>
        <table:table-row>
          <table:table-cell table:style-name="Tableau16.A1" office:value-type="string">
            <text:p text:style-name="P36">Soutient utilisateur</text:p>
          </table:table-cell>
          <table:table-cell table:style-name="Tableau16.A1" office:value-type="string">
            <text:p text:style-name="P36">D<text:span text:style-name="T91">T</text:span>NUM / CSU</text:p>
          </table:table-cell>
        </table:table-row>
        <table:table-row>
          <table:table-cell table:style-name="Tableau16.A1" office:value-type="string">
            <text:p text:style-name="P36">TMA</text:p>
          </table:table-cell>
          <table:table-cell table:style-name="Tableau16.A1" office:value-type="string">
            <text:p text:style-name="P36">prestation externe</text:p>
          </table:table-cell>
        </table:table-row>
      </table:table>
      <text:p text:style-name="Normal"/>
      <text:h text:style-name="Heading_20_2" text:outline-level="2"><text:bookmark-start text:name="_Toc177568921"/><text:bookmark-start text:name="_Toc177652100"/><text:bookmark-start text:name="_Toc177652564"/><text:bookmark-start text:name="__RefHeading___Toc9860_1783990655"/><text:bookmark-start text:name="_Toc177660685"/>Licenses<text:bookmark-end text:name="_Toc177568921"/><text:bookmark-end text:name="_Toc177652100"/><text:bookmark-end text:name="_Toc177652564"/><text:bookmark-end text:name="__RefHeading___Toc9860_1783990655"/><text:bookmark-end text:name="_Toc177660685"/></text:h>
      <text:p text:style-name="Normal">Aucune contrainte de licence spécifique.</text:p>
      <text:p text:style-name="Normal"/>
      <text:h text:style-name="Heading_20_1" text:outline-level="1"><text:bookmark-start text:name="_Toc177660686"/><text:bookmark-start text:name="_Toc177652565"/><text:bookmark-start text:name="_Toc177652101"/><text:bookmark-start text:name="__RefHeading___Toc9862_1783990655"/><text:bookmark-start text:name="_Toc177568922"/>Fonctionnel<text:bookmark-end text:name="_Toc177660686"/><text:bookmark-end text:name="_Toc177652565"/><text:bookmark-end text:name="_Toc177652101"/><text:bookmark-end text:name="__RefHeading___Toc9862_1783990655"/><text:bookmark-end text:name="_Toc177568922"/></text:h>
      <text:p text:style-name="Normal"/>
      <text:h text:style-name="Heading_20_2" text:outline-level="2"><text:bookmark-start text:name="_Toc177660687"/><text:bookmark-start text:name="_Toc177652566"/><text:bookmark-start text:name="_Toc177652102"/><text:bookmark-start text:name="__RefHeading___Toc9864_1783990655"/><text:bookmark-start text:name="_Toc177568923"/>Périmètre global<text:bookmark-end text:name="_Toc177660687"/><text:bookmark-end text:name="_Toc177652566"/><text:bookmark-end text:name="_Toc177652102"/><text:bookmark-end text:name="__RefHeading___Toc9864_1783990655"/><text:bookmark-end text:name="_Toc177568923"/></text:h>
      <text:p text:style-name="Normal">Décrire les objectifs du système à construire en terme de simplification des activités Métier, des démarches publiques, des acteurs et des processus couverts. Il s’agit du périmètre fonctionnel couvert par l’application cible.</text:p>
      <text:p text:style-name="P14"><text:span text:style-name="T57">{</text:span>exemple:</text:p>
      <text:p text:style-name="P14">Il s’agit d’industrialiser le fonctionnement actuel [en simplifiant les démarches des usagers, en automatisant les traitements, en intégrant une validation par étape, …].<text:line-break/>La gestion des cas particuliers [seront traités manuellement, font l’objet d’un traitement spécifique, … ]<text:line-break/>En synthèse, cette automatisation doit permettre de : [liste de besoins couverts par la solution]<text:span text:style-name="T57">}</text:span></text:p>
      <text:p text:style-name="Normal"/>
      <text:h text:style-name="Heading_20_2" text:outline-level="2"><text:bookmark-start text:name="_Toc177660688"/><text:bookmark-start text:name="_Toc177652567"/><text:bookmark-start text:name="_Toc177652103"/><text:bookmark-start text:name="__RefHeading___Toc9866_1783990655"/><text:bookmark-start text:name="_Toc177568924"/>Plan d'occupation des sols<text:bookmark-end text:name="_Toc177660688"/><text:bookmark-end text:name="_Toc177652567"/><text:bookmark-end text:name="_Toc177652103"/><text:bookmark-end text:name="__RefHeading___Toc9866_1783990655"/><text:bookmark-end text:name="_Toc177568924"/></text:h>
      <text:p text:style-name="Normal"><text:span text:style-name="Police_20_par_20_défaut"><text:span text:style-name="T1"><draw:frame draw:style-name="fr2" draw:name="Image 3" text:anchor-type="as-char" svg:y="0cm" svg:width="4.65cm" style:rel-width="scale" svg:height="6.823cm" style:rel-height="scale" draw:z-index="1"><draw:image xlink:href="Pictures/100000010000017700000393A8A35542.png" xlink:type="simple" xlink:show="embed" xlink:actuate="onLoad" draw:mime-type="image/png"/></draw:frame></text:span></text:span></text:p>
      <text:p text:style-name="P9"><text:soft-page-break/>Représentation des applications partageant le même domaine métier</text:p>
      <text:p text:style-name="Normal"/>
      <text:h text:style-name="Heading_20_2" text:outline-level="2"><text:bookmark-start text:name="_Toc177660689"/><text:bookmark-start text:name="_Toc177652568"/><text:bookmark-start text:name="_Toc177652104"/><text:bookmark-start text:name="__RefHeading___Toc9868_1783990655"/><text:bookmark-start text:name="_Toc177568925"/>Blocs fonctionnels<text:bookmark-end text:name="_Toc177660689"/><text:bookmark-end text:name="_Toc177652568"/><text:bookmark-end text:name="_Toc177652104"/><text:bookmark-end text:name="__RefHeading___Toc9868_1783990655"/><text:bookmark-end text:name="_Toc177568925"/></text:h>
      <table:table table:name="Tableau17" table:style-name="Tableau17">
        <table:table-column table:style-name="Tableau17.A" table:number-columns-repeated="2"/>
        <table:table-row>
          <table:table-cell table:style-name="Tableau17.A1" office:value-type="string">
            <text:p text:style-name="P35">Blocs fonctionnels</text:p>
          </table:table-cell>
          <table:table-cell table:style-name="Tableau17.A1" office:value-type="string">
            <text:p text:style-name="P35">Description</text:p>
          </table:table-cell>
        </table:table-row>
        <table:table-row>
          <table:table-cell table:style-name="Tableau17.A1" office:value-type="string">
            <text:p text:style-name="P36">Utilisateurs</text:p>
          </table:table-cell>
          <table:table-cell table:style-name="Tableau17.A1" office:value-type="string">
            <text:p text:style-name="P36">Comptes utilisateurs<text:line-break/>Authentification<text:line-break/>Rôles et permissions</text:p>
          </table:table-cell>
        </table:table-row>
        <table:table-row>
          <table:table-cell table:style-name="Tableau17.A1" office:value-type="string">
            <text:p text:style-name="P36">Administration</text:p>
          </table:table-cell>
          <table:table-cell table:style-name="Tableau17.A1" office:value-type="string">
            <text:p text:style-name="P36">Paramétrage global<text:line-break/>Administration des utilisateurs</text:p>
          </table:table-cell>
        </table:table-row>
        <table:table-row>
          <table:table-cell table:style-name="Tableau17.A1" office:value-type="string">
            <text:p text:style-name="P36">Pages génériques</text:p>
          </table:table-cell>
          <table:table-cell table:style-name="Tableau17.A1" office:value-type="string">
            <text:p text:style-name="P36">Gestion des cookies<text:line-break/>Contact<text:line-break/>Mentions légales<text:line-break/>Plan du site</text:p>
          </table:table-cell>
        </table:table-row>
      </table:table>
      <text:p text:style-name="Normal"/>
      <text:h text:style-name="Heading_20_2" text:outline-level="2"><text:bookmark-start text:name="_Toc177660690"/><text:bookmark-start text:name="_Toc177652569"/><text:bookmark-start text:name="_Toc177652105"/><text:bookmark-start text:name="__RefHeading___Toc9870_1783990655"/><text:bookmark-start text:name="_Toc177568926"/>Lots de livraison prévus<text:bookmark-end text:name="_Toc177660690"/><text:bookmark-end text:name="_Toc177652569"/><text:bookmark-end text:name="_Toc177652105"/><text:bookmark-end text:name="__RefHeading___Toc9870_1783990655"/><text:bookmark-end text:name="_Toc177568926"/></text:h>
      <text:p text:style-name="Normal"/>
      <table:table table:name="Tableau18" table:style-name="Tableau18">
        <table:table-column table:style-name="Tableau18.A" table:number-columns-repeated="2"/>
        <table:table-row>
          <table:table-cell table:style-name="Tableau18.A1" office:value-type="string">
            <text:p text:style-name="P35">Numéro du lot</text:p>
          </table:table-cell>
          <table:table-cell table:style-name="Tableau18.A1" office:value-type="string">
            <text:p text:style-name="P35">Modules fonctionnels</text:p>
          </table:table-cell>
        </table:table-row>
        <table:table-row>
          <table:table-cell table:style-name="Tableau18.A1" office:value-type="string">
            <text:p text:style-name="P36">1</text:p>
          </table:table-cell>
          <table:table-cell table:style-name="Tableau18.A1" office:value-type="string">
            <text:p text:style-name="P36">PMV (projet minimum viable)</text:p>
          </table:table-cell>
        </table:table-row>
        <table:table-row>
          <table:table-cell table:style-name="Tableau18.A1" office:value-type="string">
            <text:p text:style-name="P36">2</text:p>
          </table:table-cell>
          <table:table-cell table:style-name="Tableau18.A1" office:value-type="string">
            <text:p text:style-name="P36">Application finale</text:p>
          </table:table-cell>
        </table:table-row>
      </table:table>
      <text:p text:style-name="Normal"/>
      <text:h text:style-name="Heading_20_2" text:outline-level="2"><text:bookmark-start text:name="_Toc177660691"/><text:bookmark-start text:name="_Toc177652570"/><text:bookmark-start text:name="_Toc177652106"/><text:bookmark-start text:name="__RefHeading___Toc9872_1783990655"/><text:bookmark-start text:name="_Toc177568927"/>Évolutions prévues<text:bookmark-end text:name="_Toc177660691"/><text:bookmark-end text:name="_Toc177652570"/><text:bookmark-end text:name="_Toc177652106"/><text:bookmark-end text:name="__RefHeading___Toc9872_1783990655"/><text:bookmark-end text:name="_Toc177568927"/></text:h>
      <table:table table:name="Tableau19" table:style-name="Tableau19">
        <table:table-column table:style-name="Tableau19.A"/>
        <table:table-column table:style-name="Tableau19.B"/>
        <table:table-column table:style-name="Tableau19.C"/>
        <table:table-row>
          <table:table-cell table:style-name="Tableau19.A1" office:value-type="string">
            <text:p text:style-name="P35">Évolution</text:p>
          </table:table-cell>
          <table:table-cell table:style-name="Tableau19.A1" office:value-type="string">
            <text:p text:style-name="P35">Priorité</text:p>
          </table:table-cell>
          <table:table-cell table:style-name="Tableau19.A1" office:value-type="string">
            <text:p text:style-name="P35">Détails / Commentaires</text:p>
          </table:table-cell>
        </table:table-row>
        <table:table-row>
          <table:table-cell table:style-name="Tableau19.A1" office:value-type="string">
            <text:p text:style-name="P36">Évolution A</text:p>
          </table:table-cell>
          <table:table-cell table:style-name="Tableau19.A1" office:value-type="string">
            <text:p text:style-name="P36">1</text:p>
          </table:table-cell>
          <table:table-cell table:style-name="Tableau19.A1" office:value-type="string">
            <text:p text:style-name="P37"/>
          </table:table-cell>
        </table:table-row>
        <table:table-row>
          <table:table-cell table:style-name="Tableau19.A1" office:value-type="string">
            <text:p text:style-name="P36">Évolution B</text:p>
          </table:table-cell>
          <table:table-cell table:style-name="Tableau19.A1" office:value-type="string">
            <text:p text:style-name="P36">2</text:p>
          </table:table-cell>
          <table:table-cell table:style-name="Tableau19.A1" office:value-type="string">
            <text:p text:style-name="P37"/>
          </table:table-cell>
        </table:table-row>
        <table:table-row>
          <table:table-cell table:style-name="Tableau19.A1" office:value-type="string">
            <text:p text:style-name="P36">Évolution C</text:p>
          </table:table-cell>
          <table:table-cell table:style-name="Tableau19.A1" office:value-type="string">
            <text:p text:style-name="P36">3</text:p>
          </table:table-cell>
          <table:table-cell table:style-name="Tableau19.A1" office:value-type="string">
            <text:p text:style-name="P37"/>
          </table:table-cell>
        </table:table-row>
      </table:table>
      <text:p text:style-name="Normal"/>
      <text:h text:style-name="Heading_20_2" text:outline-level="2"><text:bookmark-start text:name="_Toc177660692"/><text:bookmark-start text:name="_Toc177652571"/><text:bookmark-start text:name="_Toc177652107"/><text:bookmark-start text:name="__RefHeading___Toc9874_1783990655"/><text:bookmark-start text:name="_Toc177568928"/>Utilisateurs de l'application<text:bookmark-end text:name="_Toc177660692"/><text:bookmark-end text:name="_Toc177652571"/><text:bookmark-end text:name="_Toc177652107"/><text:bookmark-end text:name="__RefHeading___Toc9874_1783990655"/><text:bookmark-end text:name="_Toc177568928"/></text:h>
      <table:table table:name="Tableau20" table:style-name="Tableau20">
        <table:table-column table:style-name="Tableau20.A" table:number-columns-repeated="2"/>
        <table:table-column table:style-name="Tableau20.C" table:number-columns-repeated="3"/>
        <table:table-row>
          <table:table-cell table:style-name="Tableau20.A1" office:value-type="string">
            <text:p text:style-name="P35">Catégorie d’utilisateur</text:p>
          </table:table-cell>
          <table:table-cell table:style-name="Tableau20.A1" office:value-type="string">
            <text:p text:style-name="P35">Périmètre Fonctionnel</text:p>
          </table:table-cell>
          <table:table-cell table:style-name="Tableau20.A1" office:value-type="string">
            <text:p text:style-name="P35">Réseaux d’accès</text:p>
          </table:table-cell>
          <table:table-cell table:style-name="Tableau20.A1" office:value-type="string">
            <text:p text:style-name="P35">Nombre estimé</text:p>
          </table:table-cell>
          <table:table-cell table:style-name="Tableau20.A1" office:value-type="string">
            <text:p text:style-name="P35">Plages horaires</text:p>
          </table:table-cell>
        </table:table-row>
        <table:table-row>
          <table:table-cell table:style-name="Tableau20.A1" office:value-type="string">
            <text:p text:style-name="P36">[agents / citoyen / … ]</text:p>
          </table:table-cell>
          <table:table-cell table:style-name="Tableau20.A1" office:value-type="string">
            <text:p text:style-name="P36">Périmètre-A</text:p>
          </table:table-cell>
          <table:table-cell table:style-name="Tableau20.A1" office:value-type="string">
            <text:p text:style-name="P36">[Minint / RIE / Internet]</text:p>
          </table:table-cell>
          <table:table-cell table:style-name="Tableau20.A1" office:value-type="string">
            <text:p text:style-name="P36">XX</text:p>
          </table:table-cell>
          <table:table-cell table:style-name="Tableau20.A1" office:value-type="string">
            <text:p text:style-name="P36">[horaires de bureau / 24h/24, 7j/7, …]</text:p>
          </table:table-cell>
        </table:table-row>
      </table:table>
      <text:p text:style-name="Normal"/>
      <text:h text:style-name="Heading_20_2" text:outline-level="2"><text:bookmark-start text:name="_Toc177660693"/><text:bookmark-start text:name="_Toc177652572"/><text:bookmark-start text:name="_Toc177652108"/><text:bookmark-start text:name="__RefHeading___Toc9876_1783990655"/><text:bookmark-start text:name="_Toc177568929"/>Rôles<text:bookmark-end text:name="_Toc177660693"/><text:bookmark-end text:name="_Toc177652572"/><text:bookmark-end text:name="_Toc177652108"/><text:bookmark-end text:name="__RefHeading___Toc9876_1783990655"/><text:bookmark-end text:name="_Toc177568929"/></text:h>
      <table:table table:name="Tableau21" table:style-name="Tableau21">
        <table:table-column table:style-name="Tableau21.A" table:number-columns-repeated="2"/>
        <table:table-row>
          <table:table-cell table:style-name="Tableau21.A1" office:value-type="string">
            <text:p text:style-name="P35">Nom</text:p>
          </table:table-cell>
          <table:table-cell table:style-name="Tableau21.A1" office:value-type="string">
            <text:p text:style-name="P35">Description</text:p>
          </table:table-cell>
        </table:table-row>
        <table:table-row>
          <table:table-cell table:style-name="Tableau21.A1" office:value-type="string">
            <text:p text:style-name="P36">admin-technique</text:p>
          </table:table-cell>
          <table:table-cell table:style-name="Tableau21.A1" office:value-type="string">
            <text:p text:style-name="P36">Administrateur technique de la plateforme</text:p>
          </table:table-cell>
        </table:table-row>
        <text:soft-page-break/>
        <table:table-row>
          <table:table-cell table:style-name="Tableau21.A1" office:value-type="string">
            <text:p text:style-name="P36">admin-fonctionnel</text:p>
          </table:table-cell>
          <table:table-cell table:style-name="Tableau21.A1" office:value-type="string">
            <text:p text:style-name="P36">Administrateur fonctionnel de la plateforme</text:p>
          </table:table-cell>
        </table:table-row>
        <table:table-row>
          <table:table-cell table:style-name="Tableau21.A1" office:value-type="string">
            <text:p text:style-name="P36">agent</text:p>
          </table:table-cell>
          <table:table-cell table:style-name="Tableau21.A1" office:value-type="string">
            <text:p text:style-name="P36">Agent du ministère</text:p>
          </table:table-cell>
        </table:table-row>
        <table:table-row>
          <table:table-cell table:style-name="Tableau21.A1" office:value-type="string">
            <text:p text:style-name="P36">citoyen</text:p>
          </table:table-cell>
          <table:table-cell table:style-name="Tableau21.A1" office:value-type="string">
            <text:p text:style-name="P36">Citoyen</text:p>
          </table:table-cell>
        </table:table-row>
      </table:table>
      <text:p text:style-name="P11">Les rôles sont les principaux groupements de permissions attribués aux utilisateurs (RBAC).</text:p>
      <text:p text:style-name="Normal"/>
      <text:h text:style-name="Heading_20_2" text:outline-level="2"><text:bookmark-start text:name="__RefHeading___Toc9878_1783990655"/><text:bookmark-start text:name="_Toc177568930"/><text:bookmark-start text:name="_Toc177652109"/><text:bookmark-start text:name="_Toc177652573"/><text:bookmark-start text:name="_Toc177660694"/>Boîtes aux lettres fonctionnelles<text:bookmark-end text:name="__RefHeading___Toc9878_1783990655"/><text:bookmark-end text:name="_Toc177568930"/><text:bookmark-end text:name="_Toc177652109"/><text:bookmark-end text:name="_Toc177652573"/><text:bookmark-end text:name="_Toc177660694"/></text:h>
      <text:p text:style-name="P141"><text:span text:style-name="T57">{</text:span>exemple<text:span text:style-name="T95">}</text:span>:</text:p>
      <table:table table:name="Tableau22" table:style-name="Tableau22">
        <table:table-column table:style-name="Tableau22.A" table:number-columns-repeated="2"/>
        <table:table-row>
          <table:table-cell table:style-name="Tableau22.A1" office:value-type="string">
            <text:p text:style-name="P35">Email</text:p>
          </table:table-cell>
          <table:table-cell table:style-name="Tableau22.A1" office:value-type="string">
            <text:p text:style-name="P35">Usage</text:p>
          </table:table-cell>
        </table:table-row>
        <table:table-row>
          <table:table-cell table:style-name="Tableau22.A1" office:value-type="string">
            <text:p text:style-name="P36">rgpd-[application]@interieur.gouv.fr</text:p>
          </table:table-cell>
          <table:table-cell table:style-name="Tableau22.A1" office:value-type="string">
            <text:p text:style-name="P36">Contact pour les demandes RGPD</text:p>
          </table:table-cell>
        </table:table-row>
        <table:table-row>
          <table:table-cell table:style-name="Tableau22.A1" office:value-type="string">
            <text:p text:style-name="P36">support-[application]@interieur.gouv.fr</text:p>
          </table:table-cell>
          <table:table-cell table:style-name="Tableau22.A1" office:value-type="string">
            <text:p text:style-name="P36">Contact pour le support</text:p>
          </table:table-cell>
        </table:table-row>
        <table:table-row>
          <table:table-cell table:style-name="Tableau22.A1" office:value-type="string">
            <text:p text:style-name="P36">moa-[application]@interieur.gouv.fr</text:p>
          </table:table-cell>
          <table:table-cell table:style-name="Tableau22.A1" office:value-type="string">
            <text:p text:style-name="P36">Liste de diffusion MOA</text:p>
          </table:table-cell>
        </table:table-row>
        <table:table-row>
          <table:table-cell table:style-name="Tableau22.A1" office:value-type="string">
            <text:p text:style-name="P36">moe-[application]@interieur.gouv.fr</text:p>
          </table:table-cell>
          <table:table-cell table:style-name="Tableau22.A1" office:value-type="string">
            <text:p text:style-name="P36">Liste de diffusion MOE</text:p>
          </table:table-cell>
        </table:table-row>
        <table:table-row>
          <table:table-cell table:style-name="Tableau22.A1" office:value-type="string">
            <text:p text:style-name="P36">intégration-[application]@interieur.gouv.fr</text:p>
          </table:table-cell>
          <table:table-cell table:style-name="Tableau22.A1" office:value-type="string">
            <text:p text:style-name="P36">Liste de diffusion d’intégration</text:p>
          </table:table-cell>
        </table:table-row>
        <table:table-row>
          <table:table-cell table:style-name="Tableau22.A1" office:value-type="string">
            <text:p text:style-name="P36">exploitation-[application]@interieur.gouv.fr</text:p>
          </table:table-cell>
          <table:table-cell table:style-name="Tableau22.A1" office:value-type="string">
            <text:p text:style-name="P36">Liste de diffusion d’exploitation</text:p>
          </table:table-cell>
        </table:table-row>
        <table:table-row>
          <table:table-cell table:style-name="Tableau22.A1" office:value-type="string">
            <text:p text:style-name="P36">supervision-[application]@interieur.gouv.fr</text:p>
          </table:table-cell>
          <table:table-cell table:style-name="Tableau22.A1" office:value-type="string">
            <text:p text:style-name="P36">Liste de diffusion de supervision</text:p>
          </table:table-cell>
        </table:table-row>
      </table:table>
      <text:p text:style-name="Normal"/>
      <text:h text:style-name="Heading_20_1" text:outline-level="1"><text:bookmark-start text:name="_Toc177660695"/><text:bookmark-start text:name="_Toc177652574"/><text:bookmark-start text:name="_Toc177652110"/><text:bookmark-start text:name="__RefHeading___Toc9880_1783990655"/><text:bookmark-start text:name="_Toc177568931"/>Applicatif<text:bookmark-end text:name="_Toc177660695"/><text:bookmark-end text:name="_Toc177652574"/><text:bookmark-end text:name="_Toc177652110"/><text:bookmark-end text:name="__RefHeading___Toc9880_1783990655"/><text:bookmark-end text:name="_Toc177568931"/></text:h>
      <text:p text:style-name="Normal"/>
      <text:h text:style-name="Heading_20_2" text:outline-level="2"><text:bookmark-start text:name="_Toc177660696"/><text:bookmark-start text:name="_Toc177652575"/><text:bookmark-start text:name="_Toc177652111"/><text:bookmark-start text:name="__RefHeading___Toc9882_1783990655"/><text:bookmark-start text:name="_Toc177568932"/>Hébergement<text:bookmark-end text:name="_Toc177660696"/><text:bookmark-end text:name="_Toc177652575"/><text:bookmark-end text:name="_Toc177652111"/><text:bookmark-end text:name="__RefHeading___Toc9882_1783990655"/><text:bookmark-end text:name="_Toc177568932"/></text:h>
      <table:table table:name="Tableau23" table:style-name="Tableau23">
        <table:table-column table:style-name="Tableau23.A" table:number-columns-repeated="2"/>
        <table:table-row>
          <table:table-cell table:style-name="Tableau23.A1" office:value-type="string">
            <text:p text:style-name="P29">Hébergement</text:p>
          </table:table-cell>
          <table:table-cell table:style-name="Tableau23.A1" office:value-type="string">
            <text:p text:style-name="P31">Carmin<text:line-break/>ISOCELE<text:line-break/>Cloud-Pi Gen1<text:line-break/>Cloud-Pi Gen2,</text:p>
            <text:p text:style-name="P31"><text:span text:style-name="T27">Cloud PI Native</text:span><text:line-break/>Cer<text:span text:style-name="T27">cl</text:span>e-3 : OVH, Outscale, Oodrive, Wordline <text:span text:style-name="T92">etc.</text:span></text:p>
          </table:table-cell>
        </table:table-row>
        <table:table-row>
          <table:table-cell table:style-name="Tableau23.A1" office:value-type="string">
            <text:p text:style-name="P29">Type</text:p>
          </table:table-cell>
          <table:table-cell table:style-name="Tableau23.A1" office:value-type="string">
            <text:p text:style-name="P29">IaaS (OpenStack)<text:line-break/><text:span text:style-name="T90">Caas </text:span>(OpenShift)<text:line-break/>Hyperviseur de VM<text:line-break/>Physique dédié</text:p>
          </table:table-cell>
        </table:table-row>
        <table:table-row>
          <table:table-cell table:style-name="Tableau23.A1" office:value-type="string">
            <text:p text:style-name="P29">Région principale</text:p>
          </table:table-cell>
          <table:table-cell table:style-name="Tableau23.A1" office:value-type="string">
            <text:p text:style-name="P29">R1 – SIR, R2 – SIL</text:p>
          </table:table-cell>
        </table:table-row>
        <table:table-row>
          <table:table-cell table:style-name="Tableau23.A1" office:value-type="string">
            <text:p text:style-name="P29">Zone <text:span text:style-name="T45">de sensibilité</text:span></text:p>
          </table:table-cell>
          <table:table-cell table:style-name="Tableau23.A1" office:value-type="string">
            <text:p text:style-name="P29">S1 – <text:span text:style-name="T28">Usuel ou NP</text:span>, S2 – DR</text:p>
          </table:table-cell>
        </table:table-row>
        <table:table-row>
          <table:table-cell table:style-name="Tableau23.A1" office:value-type="string">
            <text:p text:style-name="P29">Région de secours</text:p>
          </table:table-cell>
          <table:table-cell table:style-name="Tableau23.A1" office:value-type="string">
            <text:p text:style-name="P33">R1 – SIR, R2 – SIL</text:p>
          </table:table-cell>
        </table:table-row>
        <table:table-row>
          <table:table-cell table:style-name="Tableau23.A1" office:value-type="string">
            <text:p text:style-name="P29">PAI</text:p>
          </table:table-cell>
          <table:table-cell table:style-name="Tableau23.A1" office:value-type="string">
            <text:p text:style-name="P34">Pré-requis : demande minitil s99</text:p>
          </table:table-cell>
        </table:table-row>
        <table:table-row>
          <table:table-cell table:style-name="Tableau23.A1" office:value-type="string">
            <text:p text:style-name="P29">Trigramme <text:span text:style-name="T46">ou code PAI</text:span></text:p>
          </table:table-cell>
          <table:table-cell table:style-name="Tableau23.A1" office:value-type="string">
            <text:p text:style-name="P34">Pré-requis : demande minitil s99</text:p>
          </table:table-cell>
        </table:table-row>
      </table:table>
      <text:p text:style-name="Normal"/>
      <text:h text:style-name="Heading_20_2" text:outline-level="2"><text:bookmark-start text:name="_Toc177660697"/><text:bookmark-start text:name="_Toc177652576"/><text:bookmark-start text:name="_Toc177652112"/><text:bookmark-start text:name="__RefHeading___Toc9884_1783990655"/><text:bookmark-start text:name="_Toc177568933"/><text:soft-page-break/>Architecture applicative externe<text:bookmark-end text:name="_Toc177660697"/><text:bookmark-end text:name="_Toc177652576"/><text:bookmark-end text:name="_Toc177652112"/><text:bookmark-end text:name="__RefHeading___Toc9884_1783990655"/><text:bookmark-end text:name="_Toc177568933"/></text:h>
      <text:p text:style-name="Normal"><text:span text:style-name="Police_20_par_20_défaut"><text:span text:style-name="T1"><draw:frame draw:style-name="fr2" draw:name="Image 4" text:anchor-type="as-char" svg:y="0cm" svg:width="17.014cm" style:rel-width="scale" svg:height="11.075cm" style:rel-height="scale" draw:z-index="2"><draw:image xlink:href="Pictures/100000010000075A000004FD9BF9ABC0.png" xlink:type="simple" xlink:show="embed" xlink:actuate="onLoad" draw:mime-type="image/png"/></draw:frame></text:span></text:span></text:p>
      <text:p text:style-name="Normal"/>
      <text:h text:style-name="Heading_20_2" text:outline-level="2"><text:bookmark-start text:name="_Toc177660698"/><text:bookmark-start text:name="_Toc177652577"/><text:bookmark-start text:name="_Toc177652113"/><text:bookmark-start text:name="__RefHeading___Toc9886_1783990655"/><text:bookmark-start text:name="_Toc177568934"/>Application<text:span text:style-name="T30">s</text:span> liées<text:bookmark-end text:name="_Toc177660698"/><text:bookmark-end text:name="_Toc177652577"/><text:bookmark-end text:name="_Toc177652113"/><text:bookmark-end text:name="__RefHeading___Toc9886_1783990655"/><text:bookmark-end text:name="_Toc177568934"/></text:h>
      <table:table table:name="Tableau24" table:style-name="Tableau24">
        <table:table-column table:style-name="Tableau24.A"/>
        <table:table-column table:style-name="Tableau24.B"/>
        <table:table-column table:style-name="Tableau24.C"/>
        <table:table-column table:style-name="Tableau24.B"/>
        <table:table-column table:style-name="Tableau24.E"/>
        <table:table-column table:style-name="Tableau24.F"/>
        <table:table-row>
          <table:table-cell table:style-name="Tableau24.A1" office:value-type="string">
            <text:p text:style-name="P35">Description</text:p>
          </table:table-cell>
          <table:table-cell table:style-name="Tableau24.A1" office:value-type="string">
            <text:p text:style-name="P35">Client</text:p>
          </table:table-cell>
          <table:table-cell table:style-name="Tableau24.A1" office:value-type="string">
            <text:p text:style-name="P35">Intermédiaires</text:p>
          </table:table-cell>
          <table:table-cell table:style-name="Tableau24.A1" office:value-type="string">
            <text:p text:style-name="P35">Serveur</text:p>
          </table:table-cell>
          <table:table-cell table:style-name="Tableau24.A1" office:value-type="string">
            <text:p text:style-name="P35">Format</text:p>
          </table:table-cell>
          <table:table-cell table:style-name="Tableau24.A1" office:value-type="string">
            <text:p text:style-name="P35">Types d’authentification</text:p>
          </table:table-cell>
        </table:table-row>
        <table:table-row>
          <table:table-cell table:style-name="Tableau24.A1" office:value-type="string">
            <text:p text:style-name="P38"/>
          </table:table-cell>
          <table:table-cell table:style-name="Tableau24.A1" office:value-type="string">
            <text:p text:style-name="P39">Application-A<text:line-break/>[Internet, RIE, Minint]</text:p>
          </table:table-cell>
          <table:table-cell table:style-name="Tableau24.A1" office:value-type="string">
            <text:p text:style-name="P39">[ INES-API, INES-SE ]</text:p>
          </table:table-cell>
          <table:table-cell table:style-name="Tableau24.A1" office:value-type="string">
            <text:p text:style-name="P39">Mon-Application</text:p>
          </table:table-cell>
          <table:table-cell table:style-name="Tableau24.A1" office:value-type="string">
            <text:p text:style-name="P39">[ HTTP, HTTPS ]<text:line-break/>[ JSON, XML ]</text:p>
          </table:table-cell>
          <table:table-cell table:style-name="Tableau24.A1" office:value-type="string">
            <text:p text:style-name="P39">Certificat Serveur SSL<text:line-break/>[API Key, Oauth 2.0]</text:p>
          </table:table-cell>
        </table:table-row>
        <table:table-row>
          <table:table-cell table:style-name="Tableau24.A1" office:value-type="string">
            <text:p text:style-name="P38"/>
          </table:table-cell>
          <table:table-cell table:style-name="Tableau24.A1" office:value-type="string">
            <text:p text:style-name="P39">Mon-Application</text:p>
          </table:table-cell>
          <table:table-cell table:style-name="Tableau24.A1" office:value-type="string">
            <text:p text:style-name="P39">INES-SAS</text:p>
          </table:table-cell>
          <table:table-cell table:style-name="Tableau24.A1" office:value-type="string">
            <text:p text:style-name="P39">Application-B<text:line-break/>[Internet, RIE, Minint]</text:p>
          </table:table-cell>
          <table:table-cell table:style-name="Tableau24.A1" office:value-type="string">
            <text:p text:style-name="P39">SFTP<text:line-break/>Fichiers [ CSV, …]</text:p>
          </table:table-cell>
          <table:table-cell table:style-name="Tableau24.A1" office:value-type="string">
            <text:p text:style-name="P39">Certificat Serveur SSL</text:p>
          </table:table-cell>
        </table:table-row>
        <table:table-row>
          <table:table-cell table:style-name="Tableau24.A1" office:value-type="string">
            <text:p text:style-name="P38"/>
          </table:table-cell>
          <table:table-cell table:style-name="Tableau24.A1" office:value-type="string">
            <text:p text:style-name="P39">Application-C<text:line-break/>[Internet, RIE, Minint]</text:p>
          </table:table-cell>
          <table:table-cell table:style-name="Tableau24.A1" office:value-type="string">
            <text:p text:style-name="P39">INES-SAS</text:p>
          </table:table-cell>
          <table:table-cell table:style-name="Tableau24.A1" office:value-type="string">
            <text:p text:style-name="P39">Mon-Application</text:p>
          </table:table-cell>
          <table:table-cell table:style-name="Tableau24.A1" office:value-type="string">
            <text:p text:style-name="P39">[ FTP, FTPS ]<text:line-break/>Fichiers [ CSV, …]</text:p>
          </table:table-cell>
          <table:table-cell table:style-name="Tableau24.A1" office:value-type="string">
            <text:p text:style-name="P39">Certificat Serveur SSL<text:line-break/>Login + Mot de passe</text:p>
          </table:table-cell>
        </table:table-row>
      </table:table>
      <text:p text:style-name="P16">Ressources complémentaires</text:p>
      <text:list text:style-name="L5">
        <text:list-item>
          <text:p text:style-name="P153"><text:a xlink:type="simple" xlink:href="http://api.minint.fr/" office:target-frame-name="_top" xlink:show="replace" text:style-name="Internet_20_link" text:visited-style-name="Visited_20_Internet_20_Link"><text:span text:style-name="Lien_20_hypertexte"><text:span text:style-name="T3">Référentiel des A</text:span></text:span><text:bookmark-start text:name="_Hlt177475467"/><text:bookmark-start text:name="_Hlt177475468"/><text:span text:style-name="Lien_20_hypertexte"><text:span text:style-name="T3">P</text:span></text:span><text:bookmark-end text:name="_Hlt177475467"/><text:bookmark-end text:name="_Hlt177475468"/><text:span text:style-name="Lien_20_hypertexte"><text:span text:style-name="T3">I MI</text:span></text:span></text:a></text:p>
        </text:list-item>
      </text:list>
      <text:p text:style-name="Normal"/>
      <text:p text:style-name="Normal"/>
      <text:p text:style-name="Normal"/>
      <text:p text:style-name="Normal"/>
      <text:h text:style-name="Heading_20_2" text:outline-level="2"><text:bookmark-start text:name="_Toc177660699"/><text:bookmark-start text:name="_Toc177652578"/><text:bookmark-start text:name="_Toc177652114"/><text:bookmark-start text:name="__RefHeading___Toc9888_1783990655"/><text:bookmark-start text:name="_Toc177568935"/><text:soft-page-break/>Architecture applicative interne<text:bookmark-end text:name="_Toc177660699"/><text:bookmark-end text:name="_Toc177652578"/><text:bookmark-end text:name="_Toc177652114"/><text:bookmark-end text:name="__RefHeading___Toc9888_1783990655"/><text:bookmark-end text:name="_Toc177568935"/></text:h>
      <text:p text:style-name="P71"/>
      <text:p text:style-name="Normal"><draw:frame draw:style-name="fr3" draw:name="Image 5" text:anchor-type="paragraph" svg:x="0cm" svg:y="0cm" svg:width="17.134cm" style:rel-width="scale" svg:height="14.051cm" style:rel-height="scale" draw:z-index="3"><draw:image xlink:href="Pictures/10000001000006B9000005A1D93ACC48.png" xlink:type="simple" xlink:show="embed" xlink:actuate="onLoad" draw:mime-type="image/png"/></draw:frame><text:span text:style-name="Police_20_par_20_défaut"><text:span text:style-name="T1"/></text:span></text:p>
      <text:h text:style-name="P130" text:outline-level="2"><text:bookmark-start text:name="__RefHeading___Toc9890_1783990655 Copie 1"/><text:span text:style-name="T82">Architecture </text:span><text:span text:style-name="T83">applicative </text:span><text:span text:style-name="T82">interne - </text:span><text:bookmark-start text:name="_Toc177568936 Copie 1"/><text:bookmark-start text:name="_Toc177652115 Copie 1"/><text:bookmark-start text:name="_Toc177652579 Copie 1"/><text:bookmark-start text:name="_Toc177660700 Copie 1"/>V<text:bookmark-end text:name="_Toc177568936 Copie 1"/><text:bookmark-end text:name="_Toc177652115 Copie 1"/><text:bookmark-end text:name="_Toc177652579 Copie 1"/><text:bookmark-end text:name="_Toc177660700 Copie 1"/>ue composants<text:bookmark-end text:name="__RefHeading___Toc9890_1783990655 Copie 1"/></text:h>
      <text:p text:style-name="P100">{exemple à appliquer en fonction du contexte}</text:p>
      <text:p text:style-name="P125"><draw:frame draw:style-name="fr1" draw:name="Image11" text:anchor-type="paragraph" svg:x="3.343cm" svg:y="19.216cm" svg:width="10.169cm" svg:height="5.881cm" draw:z-index="9"><draw:image xlink:href="Pictures/10000000000002720000016AEB9AF3C2.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h text:style-name="Heading_20_2" text:outline-level="2"><text:bookmark-start text:name="__RefHeading___Toc9890_1783990655"/><text:bookmark-start text:name="_Toc177568936"/><text:bookmark-start text:name="_Toc177652115"/><text:bookmark-start text:name="_Toc177652579"/><text:bookmark-start text:name="_Toc177660700"/>Critères techniques frontend<text:bookmark-end text:name="__RefHeading___Toc9890_1783990655"/><text:bookmark-end text:name="_Toc177568936"/><text:bookmark-end text:name="_Toc177652115"/><text:bookmark-end text:name="_Toc177652579"/><text:bookmark-end text:name="_Toc177660700"/></text:h>
      <text:p text:style-name="P99">{exemple à appliquer en fonction du contexte}</text:p>
      <text:p text:style-name="P55"><text:span text:style-name="Police_20_par_20_défaut"><text:span text:style-name="T14">Critères techniques généraux de conception</text:span></text:span></text:p>
      <table:table table:name="Tableau25" table:style-name="Tableau25">
        <table:table-column table:style-name="Tableau25.A"/>
        <table:table-column table:style-name="Tableau25.B" table:number-columns-repeated="2"/>
        <table:table-header-rows>
          <table:table-row>
            <table:table-cell table:style-name="Tableau25.A1" office:value-type="string">
              <text:p text:style-name="P35">Type</text:p>
            </table:table-cell>
            <table:table-cell table:style-name="Tableau25.A1" office:value-type="string">
              <text:p text:style-name="P35">Catégorie</text:p>
            </table:table-cell>
            <table:table-cell table:style-name="Tableau25.A1" office:value-type="string">
              <text:p text:style-name="P35">Valeur</text:p>
            </table:table-cell>
          </table:table-row>
        </table:table-header-rows>
        <table:table-row>
          <table:table-cell table:style-name="Tableau25.A1" office:value-type="string">
            <text:p text:style-name="P36">Navigateurs</text:p>
          </table:table-cell>
          <table:table-cell table:style-name="Tableau25.A1" office:value-type="string">
            <text:p text:style-name="P36">Compatibilité</text:p>
          </table:table-cell>
          <table:table-cell table:style-name="Tableau25.A1" office:value-type="string">
            <text:p text:style-name="P36">les versions 91 ESR ou supérieures de Firefox<text:line-break/>les versions 99 ou supérieures de Chrome</text:p>
          </table:table-cell>
        </table:table-row>
        <table:table-row>
          <table:table-cell table:style-name="Tableau25.A1" office:value-type="string">
            <text:p text:style-name="P36">SPA (Single Page Application)</text:p>
          </table:table-cell>
          <table:table-cell table:style-name="Tableau25.A1" office:value-type="string">
            <text:p text:style-name="P36">Structure</text:p>
          </table:table-cell>
          <table:table-cell table:style-name="Tableau25.A1" office:value-type="string">
            <text:p text:style-name="P36">Non</text:p>
          </table:table-cell>
        </table:table-row>
        <table:table-row>
          <table:table-cell table:style-name="Tableau25.A1" office:value-type="string">
            <text:p text:style-name="P36">Framework JavaScript</text:p>
          </table:table-cell>
          <table:table-cell table:style-name="Tableau25.A1" office:value-type="string">
            <text:p text:style-name="P36">Structure</text:p>
          </table:table-cell>
          <table:table-cell table:style-name="Tableau25.A1" office:value-type="string">
            <text:p text:style-name="P36">Oui</text:p>
          </table:table-cell>
        </table:table-row>
        <table:table-row>
          <table:table-cell table:style-name="Tableau25.A1" office:value-type="string">
            <text:p text:style-name="P36">Framework CSS</text:p>
          </table:table-cell>
          <table:table-cell table:style-name="Tableau25.A1" office:value-type="string">
            <text:p text:style-name="P36">Structure</text:p>
          </table:table-cell>
          <table:table-cell table:style-name="Tableau25.A1" office:value-type="string">
            <text:p text:style-name="P36">DSFR (obligatoire)<text:line-break/>Framework préprocesseur CSS</text:p>
          </table:table-cell>
        </table:table-row>
        <table:table-row>
          <table:table-cell table:style-name="Tableau25.A1" office:value-type="string">
            <text:p text:style-name="P36">Responsive design</text:p>
          </table:table-cell>
          <table:table-cell table:style-name="Tableau25.A1" office:value-type="string">
            <text:p text:style-name="P36">Structure</text:p>
          </table:table-cell>
          <table:table-cell table:style-name="Tableau25.A1" office:value-type="string">
            <text:p text:style-name="P36">Oui</text:p>
          </table:table-cell>
        </table:table-row>
        <table:table-row>
          <table:table-cell table:style-name="Tableau25.A1" office:value-type="string">
            <text:p text:style-name="P36">Accessibilité</text:p>
          </table:table-cell>
          <table:table-cell table:style-name="Tableau25.A1" office:value-type="string">
            <text:p text:style-name="P36">Structure</text:p>
          </table:table-cell>
          <table:table-cell table:style-name="Tableau25.A1" office:value-type="string">
            <text:p text:style-name="western2"><text:span text:style-name="Police_20_par_20_défaut"><text:span text:style-name="T22">voir </text:span></text:span><text:a xlink:type="simple" xlink:href="#_accessibilité" office:target-frame-name="_top" xlink:show="replace" text:style-name="Internet_20_link" text:visited-style-name="Visited_20_Internet_20_Link"><text:span text:style-name="Lien_20_hypertexte"><text:span text:style-name="T23">Accessibilité</text:span></text:span></text:a></text:p>
          </table:table-cell>
        </table:table-row>
        <table:table-row>
          <table:table-cell table:style-name="Tableau25.A1" office:value-type="string">
            <text:p text:style-name="P36">Cache navigateur</text:p>
          </table:table-cell>
          <table:table-cell table:style-name="Tableau25.A1" office:value-type="string">
            <text:p text:style-name="P36">Performance</text:p>
          </table:table-cell>
          <table:table-cell table:style-name="Tableau25.A1" office:value-type="string">
            <text:p text:style-name="P36">version + expiration ?</text:p>
          </table:table-cell>
        </table:table-row>
        <table:table-row>
          <table:table-cell table:style-name="Tableau25.A1" office:value-type="string">
            <text:p text:style-name="P36">Minification</text:p>
          </table:table-cell>
          <table:table-cell table:style-name="Tableau25.A1" office:value-type="string">
            <text:p text:style-name="P36">Performance</text:p>
          </table:table-cell>
          <table:table-cell table:style-name="Tableau25.A1" office:value-type="string">
            <text:p text:style-name="P36">Oui (obligatoire)</text:p>
          </table:table-cell>
        </table:table-row>
        <table:table-row>
          <table:table-cell table:style-name="Tableau25.A1" office:value-type="string">
            <text:p text:style-name="P36">Métadonnées</text:p>
          </table:table-cell>
          <table:table-cell table:style-name="Tableau25.A1" office:value-type="string">
            <text:p text:style-name="P36">Indexation</text:p>
          </table:table-cell>
          <table:table-cell table:style-name="Tableau25.A1" office:value-type="string">
            <text:p text:style-name="P53">Oui/ N<text:span text:style-name="T80">on</text:span></text:p>
          </table:table-cell>
        </table:table-row>
        <table:table-row>
          <table:table-cell table:style-name="Tableau25.A1" office:value-type="string">
            <text:p text:style-name="P36">Robots</text:p>
          </table:table-cell>
          <table:table-cell table:style-name="Tableau25.A1" office:value-type="string">
            <text:p text:style-name="P36">Indexation</text:p>
          </table:table-cell>
          <table:table-cell table:style-name="Tableau25.A1" office:value-type="string">
            <text:p text:style-name="P53">Oui/ N<text:span text:style-name="T80">on</text:span></text:p>
          </table:table-cell>
        </table:table-row>
        <table:table-row>
          <table:table-cell table:style-name="Tableau25.A1" office:value-type="string">
            <text:p text:style-name="P36">Analyse d’audience</text:p>
          </table:table-cell>
          <table:table-cell table:style-name="Tableau25.A1" office:value-type="string">
            <text:p text:style-name="P36">Indexation</text:p>
          </table:table-cell>
          <table:table-cell table:style-name="Tableau25.A1" office:value-type="string">
            <text:p text:style-name="P53">Oui/ N<text:span text:style-name="T80">on</text:span></text:p>
          </table:table-cell>
        </table:table-row>
        <table:table-row>
          <table:table-cell table:style-name="Tableau25.A1" office:value-type="string">
            <text:p text:style-name="P36">SSR (Server Side Rendering)</text:p>
          </table:table-cell>
          <table:table-cell table:style-name="Tableau25.A1" office:value-type="string">
            <text:p text:style-name="P36">Indexation</text:p>
          </table:table-cell>
          <table:table-cell table:style-name="Tableau25.A1" office:value-type="string">
            <text:p text:style-name="P53">Oui/ N<text:span text:style-name="T80">on</text:span></text:p>
          </table:table-cell>
        </table:table-row>
        <table:table-row>
          <table:table-cell table:style-name="Tableau25.A1" office:value-type="string">
            <text:p text:style-name="P36">Services worker : API indexeddb</text:p>
          </table:table-cell>
          <table:table-cell table:style-name="Tableau25.A1" office:value-type="string">
            <text:p text:style-name="P36">Hors ligne</text:p>
          </table:table-cell>
          <table:table-cell table:style-name="Tableau25.A1" office:value-type="string">
            <text:p text:style-name="P36">Stockage des données côté client en mode déconnecté</text:p>
          </table:table-cell>
        </table:table-row>
        <table:table-row>
          <table:table-cell table:style-name="Tableau25.A1" office:value-type="string">
            <text:p text:style-name="P36">Services worker : API cache</text:p>
          </table:table-cell>
          <table:table-cell table:style-name="Tableau25.A1" office:value-type="string">
            <text:p text:style-name="P36">Hors ligne</text:p>
          </table:table-cell>
          <table:table-cell table:style-name="Tableau25.A1" office:value-type="string">
            <text:p text:style-name="P36">Stockage et gestion des fichiers hors-ligne nécessaires</text:p>
          </table:table-cell>
        </table:table-row>
        <table:table-row>
          <table:table-cell table:style-name="Tableau25.A1" office:value-type="string">
            <text:p text:style-name="P36">PWA</text:p>
          </table:table-cell>
          <table:table-cell table:style-name="Tableau25.A1" office:value-type="string">
            <text:p text:style-name="P36">Natif</text:p>
          </table:table-cell>
          <table:table-cell table:style-name="Tableau25.A1" office:value-type="string">
            <text:p text:style-name="P36">Expérience d’application native</text:p>
          </table:table-cell>
        </table:table-row>
      </table:table>
      <text:p text:style-name="Normal"/>
      <text:h text:style-name="Heading_20_2" text:outline-level="2"><text:bookmark-start text:name="_Toc177660701"/><text:bookmark-start text:name="_Toc177652580"/><text:bookmark-start text:name="_Toc177652116"/><text:bookmark-start text:name="__RefHeading___Toc9892_1783990655"/><text:bookmark-start text:name="_Toc177568937"/>Version des assets<text:bookmark-end text:name="_Toc177660701"/><text:bookmark-end text:name="_Toc177652580"/><text:bookmark-end text:name="_Toc177652116"/><text:bookmark-end text:name="__RefHeading___Toc9892_1783990655"/><text:bookmark-end text:name="_Toc177568937"/></text:h>
      <text:p text:style-name="Normal">Règles de versionnement des sources statiques frontend</text:p>
      <text:p text:style-name="Normal"/>
      <text:h text:style-name="Heading_20_2" text:outline-level="2"><text:bookmark-start text:name="_Toc177660702"/><text:bookmark-start text:name="_Toc177652581"/><text:bookmark-start text:name="_Toc177652117"/><text:bookmark-start text:name="__RefHeading___Toc9894_1783990655"/><text:bookmark-start text:name="_Toc177568938"/>Backend<text:bookmark-end text:name="_Toc177660702"/><text:bookmark-end text:name="_Toc177652581"/><text:bookmark-end text:name="_Toc177652117"/><text:bookmark-end text:name="__RefHeading___Toc9894_1783990655"/><text:bookmark-end text:name="_Toc177568938"/></text:h>
      <text:p text:style-name="P55"><text:span text:style-name="Police_20_par_20_défaut"><text:span text:style-name="T14">Critères techniques généraux de conception</text:span></text:span></text:p>
      <table:table table:name="Tableau26" table:style-name="Tableau26">
        <table:table-column table:style-name="Tableau26.A"/>
        <table:table-column table:style-name="Tableau26.B" table:number-columns-repeated="2"/>
        <table:table-row>
          <table:table-cell table:style-name="Tableau26.A1" office:value-type="string">
            <text:p text:style-name="P35">Type</text:p>
          </table:table-cell>
          <table:table-cell table:style-name="Tableau26.A1" office:value-type="string">
            <text:p text:style-name="P35">Catégorie</text:p>
          </table:table-cell>
          <table:table-cell table:style-name="Tableau26.A1" office:value-type="string">
            <text:p text:style-name="P35">Valeur</text:p>
          </table:table-cell>
        </table:table-row>
        <table:table-row>
          <table:table-cell table:style-name="Tableau26.A1" office:value-type="string">
            <text:p text:style-name="P36">Stateless</text:p>
          </table:table-cell>
          <table:table-cell table:style-name="Tableau26.A1" office:value-type="string">
            <text:p text:style-name="P36">Structure</text:p>
          </table:table-cell>
          <table:table-cell table:style-name="Tableau26.A1" office:value-type="string">
            <text:p text:style-name="P36">Oui</text:p>
          </table:table-cell>
        </table:table-row>
        <table:table-row>
          <table:table-cell table:style-name="Tableau26.A1" office:value-type="string">
            <text:p text:style-name="P36">Synchronisation des sessions</text:p>
          </table:table-cell>
          <table:table-cell table:style-name="Tableau26.A1" office:value-type="string">
            <text:p text:style-name="P36">Structure</text:p>
          </table:table-cell>
          <table:table-cell table:style-name="Tableau26.A1" office:value-type="string">
            <text:p text:style-name="P36">Oui (memcached, JWT, …)</text:p>
          </table:table-cell>
        </table:table-row>
        <text:soft-page-break/>
        <table:table-row>
          <table:table-cell table:style-name="Tableau26.A1" office:value-type="string">
            <text:p text:style-name="P36">Pattern principal</text:p>
          </table:table-cell>
          <table:table-cell table:style-name="Tableau26.A1" office:value-type="string">
            <text:p text:style-name="P36">Structure</text:p>
          </table:table-cell>
          <table:table-cell table:style-name="Tableau26.A1" office:value-type="string">
            <text:p text:style-name="P36">MVC<text:line-break/>Clean Architecture<text:line-break/>DDD</text:p>
          </table:table-cell>
        </table:table-row>
        <table:table-row>
          <table:table-cell table:style-name="Tableau26.A1" office:value-type="string">
            <text:p text:style-name="P36">Découpage</text:p>
          </table:table-cell>
          <table:table-cell table:style-name="Tableau26.A1" office:value-type="string">
            <text:p text:style-name="P36">Structure</text:p>
          </table:table-cell>
          <table:table-cell table:style-name="Tableau26.A1" office:value-type="string">
            <text:p text:style-name="P36">Monolithe<text:line-break/>Monolithe modulaire<text:line-break/>Micro-services</text:p>
          </table:table-cell>
        </table:table-row>
        <table:table-row>
          <table:table-cell table:style-name="Tableau26.A1" office:value-type="string">
            <text:p text:style-name="P36">Front inclus</text:p>
          </table:table-cell>
          <table:table-cell table:style-name="Tableau26.A1" office:value-type="string">
            <text:p text:style-name="P36">Structure</text:p>
          </table:table-cell>
          <table:table-cell table:style-name="Tableau26.A1" office:value-type="string">
            <text:p text:style-name="P36">Non</text:p>
          </table:table-cell>
        </table:table-row>
        <table:table-row>
          <table:table-cell table:style-name="Tableau26.A1" office:value-type="string">
            <text:p text:style-name="P36">API</text:p>
          </table:table-cell>
          <table:table-cell table:style-name="Tableau26.A1" office:value-type="string">
            <text:p text:style-name="P36">Structure</text:p>
          </table:table-cell>
          <table:table-cell table:style-name="Tableau26.A1" office:value-type="string">
            <text:p text:style-name="P36">REST, découpage métier</text:p>
          </table:table-cell>
        </table:table-row>
        <table:table-row>
          <table:table-cell table:style-name="Tableau26.A1" office:value-type="string">
            <text:p text:style-name="P36">HTTPS</text:p>
          </table:table-cell>
          <table:table-cell table:style-name="Tableau26.A1" office:value-type="string">
            <text:p text:style-name="P36">Sécurité</text:p>
          </table:table-cell>
          <table:table-cell table:style-name="Tableau26.A1" office:value-type="string">
            <text:p text:style-name="P36">Oui, forcé</text:p>
          </table:table-cell>
        </table:table-row>
        <table:table-row>
          <table:table-cell table:style-name="Tableau26.A1" office:value-type="string">
            <text:p text:style-name="P36">Comptes utilisateurs</text:p>
          </table:table-cell>
          <table:table-cell table:style-name="Tableau26.A1" office:value-type="string">
            <text:p text:style-name="P36">Sécurité</text:p>
          </table:table-cell>
          <table:table-cell table:style-name="Tableau26.A1" office:value-type="string">
            <text:p text:style-name="P36">Locaux et/ou hérités (SSO)</text:p>
          </table:table-cell>
        </table:table-row>
        <table:table-row>
          <table:table-cell table:style-name="Tableau26.A1" office:value-type="string">
            <text:p text:style-name="P36">Comptes API</text:p>
          </table:table-cell>
          <table:table-cell table:style-name="Tableau26.A1" office:value-type="string">
            <text:p text:style-name="P36">Sécurité</text:p>
          </table:table-cell>
          <table:table-cell table:style-name="Tableau26.A1" office:value-type="string">
            <text:p text:style-name="P36">Certificat + token (pour applications clientes)</text:p>
          </table:table-cell>
        </table:table-row>
        <table:table-row>
          <table:table-cell table:style-name="Tableau26.A1" office:value-type="string">
            <text:p text:style-name="P36">Rôles</text:p>
          </table:table-cell>
          <table:table-cell table:style-name="Tableau26.A1" office:value-type="string">
            <text:p text:style-name="P36">Sécurité</text:p>
          </table:table-cell>
          <table:table-cell table:style-name="Tableau26.A1" office:value-type="string">
            <text:p text:style-name="P36">Internes<text:line-break/>Hérités (RBAC SSO)</text:p>
          </table:table-cell>
        </table:table-row>
        <table:table-row>
          <table:table-cell table:style-name="Tableau26.A1" office:value-type="string">
            <text:p text:style-name="P36">Permissions fines</text:p>
          </table:table-cell>
          <table:table-cell table:style-name="Tableau26.A1" office:value-type="string">
            <text:p text:style-name="P36">Sécurité</text:p>
          </table:table-cell>
          <table:table-cell table:style-name="Tableau26.A1" office:value-type="string">
            <text:p text:style-name="P36">Internes</text:p>
          </table:table-cell>
        </table:table-row>
        <table:table-row>
          <table:table-cell table:style-name="Tableau26.A1" office:value-type="string">
            <text:p text:style-name="P36">Serveur de cache HTTP</text:p>
          </table:table-cell>
          <table:table-cell table:style-name="Tableau26.A1" office:value-type="string">
            <text:p text:style-name="P36">Performance</text:p>
          </table:table-cell>
          <table:table-cell table:style-name="Tableau26.A1" office:value-type="string">
            <text:p text:style-name="P36">Non</text:p>
          </table:table-cell>
        </table:table-row>
        <table:table-row>
          <table:table-cell table:style-name="Tableau26.A1" office:value-type="string">
            <text:p text:style-name="P36">Scalabilité horizontale</text:p>
          </table:table-cell>
          <table:table-cell table:style-name="Tableau26.A1" office:value-type="string">
            <text:p text:style-name="P36">Performance</text:p>
          </table:table-cell>
          <table:table-cell table:style-name="Tableau26.A1" office:value-type="string">
            <text:p text:style-name="P36">Oui</text:p>
          </table:table-cell>
        </table:table-row>
        <table:table-row>
          <table:table-cell table:style-name="Tableau26.A1" office:value-type="string">
            <text:p text:style-name="P36">Documentation des API</text:p>
          </table:table-cell>
          <table:table-cell table:style-name="Tableau26.A1" office:value-type="string">
            <text:p text:style-name="P36">Documentation</text:p>
          </table:table-cell>
          <table:table-cell table:style-name="Tableau26.A1" office:value-type="string">
            <text:p text:style-name="P36">OpenAPI</text:p>
          </table:table-cell>
        </table:table-row>
      </table:table>
      <text:p text:style-name="Normal"/>
      <text:h text:style-name="Heading_20_2" text:outline-level="2"><text:bookmark-start text:name="_Toc177660703"/><text:bookmark-start text:name="_Toc177652582"/><text:bookmark-start text:name="_Toc177652118"/><text:bookmark-start text:name="__RefHeading___Toc9896_1783990655"/><text:bookmark-start text:name="_Toc177568939"/>Gestion des sessions<text:bookmark-end text:name="_Toc177660703"/><text:bookmark-end text:name="_Toc177652582"/><text:bookmark-end text:name="_Toc177652118"/><text:bookmark-end text:name="__RefHeading___Toc9896_1783990655"/><text:bookmark-end text:name="_Toc177568939"/></text:h>
      <text:p text:style-name="Normal">La session utilisateur est portée par un token JWT côté client (navigateur).<text:line-break/>Cette méthode ne nécessite pas de synchronisation des sessions entre les serveurs backend.</text:p>
      <text:p text:style-name="Normal"/>
      <text:h text:style-name="Heading_20_2" text:outline-level="2"><text:bookmark-start text:name="_Toc177660704"/><text:bookmark-start text:name="_Toc177652583"/><text:bookmark-start text:name="_Toc177652119"/><text:bookmark-start text:name="__RefHeading___Toc9898_1783990655"/><text:bookmark-start text:name="_Toc177568940"/>Bases de données<text:bookmark-end text:name="_Toc177660704"/><text:bookmark-end text:name="_Toc177652583"/><text:bookmark-end text:name="_Toc177652119"/><text:bookmark-end text:name="__RefHeading___Toc9898_1783990655"/><text:bookmark-end text:name="_Toc177568940"/></text:h>
      <text:p text:style-name="P55"><text:span text:style-name="Police_20_par_20_défaut"><text:span text:style-name="T14">Critères techniques généraux de conception</text:span></text:span></text:p>
      <table:table table:name="Tableau27" table:style-name="Tableau27">
        <table:table-column table:style-name="Tableau27.A"/>
        <table:table-column table:style-name="Tableau27.B" table:number-columns-repeated="2"/>
        <table:table-row>
          <table:table-cell table:style-name="Tableau27.A1" office:value-type="string">
            <text:p text:style-name="P35">Type</text:p>
          </table:table-cell>
          <table:table-cell table:style-name="Tableau27.A1" office:value-type="string">
            <text:p text:style-name="P35">Catégorie</text:p>
          </table:table-cell>
          <table:table-cell table:style-name="Tableau27.A1" office:value-type="string">
            <text:p text:style-name="P35">Valeur</text:p>
          </table:table-cell>
        </table:table-row>
        <table:table-row>
          <table:table-cell table:style-name="Tableau27.A1" office:value-type="string">
            <text:p text:style-name="P36">Théorème de CAP</text:p>
          </table:table-cell>
          <table:table-cell table:style-name="Tableau27.A1" office:value-type="string">
            <text:p text:style-name="P36">Critère de sélection</text:p>
          </table:table-cell>
          <table:table-cell table:style-name="Tableau27.A1" office:value-type="string">
            <text:p text:style-name="P36">[ <text:span text:style-name="T58">Cohérence</text:span>, <text:span text:style-name="T58">Disponibilité</text:span>, <text:span text:style-name="T58">Tolérance au partionnement</text:span> ] en choisir 2</text:p>
          </table:table-cell>
        </table:table-row>
        <table:table-row>
          <table:table-cell table:style-name="Tableau27.A1" office:value-type="string">
            <text:p text:style-name="P36">Type de BDD</text:p>
          </table:table-cell>
          <table:table-cell table:style-name="Tableau27.A1" office:value-type="string">
            <text:p text:style-name="P36">Structure</text:p>
          </table:table-cell>
          <table:table-cell table:style-name="Tableau27.A1" office:value-type="string">
            <text:p text:style-name="P36">[Relationnelle, No-SQL, NewSQL, Clé-Valeur]</text:p>
          </table:table-cell>
        </table:table-row>
        <table:table-row>
          <table:table-cell table:style-name="Tableau27.A1" office:value-type="string">
            <text:p text:style-name="P36">Redondance</text:p>
          </table:table-cell>
          <table:table-cell table:style-name="Tableau27.A1" office:value-type="string">
            <text:p text:style-name="P36">Structure</text:p>
          </table:table-cell>
          <table:table-cell table:style-name="Tableau27.A1" office:value-type="string">
            <text:p text:style-name="P36">oui / non, [1 maître 1 esclave, 1 maître 2 esclaves]</text:p>
          </table:table-cell>
        </table:table-row>
        <table:table-row>
          <table:table-cell table:style-name="Tableau27.A1" office:value-type="string">
            <text:p text:style-name="P36">Indexes</text:p>
          </table:table-cell>
          <table:table-cell table:style-name="Tableau27.A1" office:value-type="string">
            <text:p text:style-name="P36">Structure</text:p>
          </table:table-cell>
          <table:table-cell table:style-name="Tableau27.A1" office:value-type="string">
            <text:p text:style-name="P36">clé primaire et étrangère + pour les besoins de performance</text:p>
          </table:table-cell>
        </table:table-row>
        <table:table-row>
          <table:table-cell table:style-name="Tableau27.A1" office:value-type="string">
            <text:p text:style-name="P36">Pool de connexion</text:p>
          </table:table-cell>
          <table:table-cell table:style-name="Tableau27.A1" office:value-type="string">
            <text:p text:style-name="P36">Performance</text:p>
          </table:table-cell>
          <table:table-cell table:style-name="Tableau27.A1" office:value-type="string">
            <text:p text:style-name="P36">oui</text:p>
          </table:table-cell>
        </table:table-row>
        <table:table-row>
          <table:table-cell table:style-name="Tableau27.A1" office:value-type="string">
            <text:p text:style-name="P36">Cache</text:p>
          </table:table-cell>
          <table:table-cell table:style-name="Tableau27.A1" office:value-type="string">
            <text:p text:style-name="P36">Performance</text:p>
          </table:table-cell>
          <table:table-cell table:style-name="Tableau27.A1" office:value-type="string">
            <text:p text:style-name="P36">non</text:p>
          </table:table-cell>
        </table:table-row>
      </table:table>
      <text:p text:style-name="Normal"/>
      <text:h text:style-name="Heading_20_2" text:outline-level="2"><text:bookmark-start text:name="_Toc177568941"/><text:bookmark-start text:name="_Toc177652120"/><text:bookmark-start text:name="_Toc177652584"/><text:bookmark-start text:name="__RefHeading___Toc9900_1783990655"/><text:bookmark-start text:name="_Toc177660705"/><text:soft-page-break/>Gestion documentaire<text:bookmark-end text:name="_Toc177568941"/><text:bookmark-end text:name="_Toc177652120"/><text:bookmark-end text:name="_Toc177652584"/><text:bookmark-end text:name="__RefHeading___Toc9900_1783990655"/><text:bookmark-end text:name="_Toc177660705"/></text:h>
      <text:p text:style-name="P92">{A compléter si nécessaire}</text:p>
      <text:h text:style-name="Heading_20_2" text:outline-level="2"><text:bookmark-start text:name="_Toc177568942"/><text:bookmark-start text:name="_Toc177652121"/><text:bookmark-start text:name="_Toc177652585"/><text:bookmark-start text:name="__RefHeading___Toc9902_1783990655"/><text:bookmark-start text:name="_Toc177660706"/>critères principaux<text:bookmark-end text:name="_Toc177568942"/><text:bookmark-end text:name="_Toc177652121"/><text:bookmark-end text:name="_Toc177652585"/><text:bookmark-end text:name="__RefHeading___Toc9902_1783990655"/><text:bookmark-end text:name="_Toc177660706"/></text:h>
      <text:p text:style-name="P55"><text:span text:style-name="Police_20_par_20_défaut"><text:span text:style-name="T14">Critères généraux de conception</text:span></text:span></text:p>
      <text:p text:style-name="Normal"/>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P35">Type</text:p>
            </table:table-cell>
            <table:table-cell table:style-name="Tableau28.A1" office:value-type="string">
              <text:p text:style-name="P35">Catégorie</text:p>
            </table:table-cell>
            <table:table-cell table:style-name="Tableau28.A1" office:value-type="string">
              <text:p text:style-name="P35">Valeur</text:p>
            </table:table-cell>
          </table:table-row>
        </table:table-header-rows>
        <table:table-row>
          <table:table-cell table:style-name="Tableau28.A1" office:value-type="string">
            <text:p text:style-name="P36">Sans état (stateless)</text:p>
          </table:table-cell>
          <table:table-cell table:style-name="Tableau28.A1" office:value-type="string">
            <text:p text:style-name="P36">REST</text:p>
          </table:table-cell>
          <table:table-cell table:style-name="Tableau28.A1" office:value-type="string">
            <text:p text:style-name="P36">Oui</text:p>
          </table:table-cell>
        </table:table-row>
        <table:table-row>
          <table:table-cell table:style-name="Tableau28.A1" office:value-type="string">
            <text:p text:style-name="P36">Interface uniforme</text:p>
          </table:table-cell>
          <table:table-cell table:style-name="Tableau28.A1" office:value-type="string">
            <text:p text:style-name="P36">REST</text:p>
          </table:table-cell>
          <table:table-cell table:style-name="Tableau28.A1" office:value-type="string">
            <text:p text:style-name="P36">Oui</text:p>
          </table:table-cell>
        </table:table-row>
        <table:table-row>
          <table:table-cell table:style-name="Tableau28.A1" office:value-type="string">
            <text:p text:style-name="P36">Codes HTTP</text:p>
          </table:table-cell>
          <table:table-cell table:style-name="Tableau28.A1" office:value-type="string">
            <text:p text:style-name="P36">REST</text:p>
          </table:table-cell>
          <table:table-cell table:style-name="Tableau28.A1" office:value-type="string">
            <text:p text:style-name="western2"><text:a xlink:type="simple" xlink:href="#_codes_http" office:target-frame-name="_top" xlink:show="replace" text:style-name="Internet_20_link" text:visited-style-name="Visited_20_Internet_20_Link"><text:span text:style-name="Lien_20_hypertexte"><text:span text:style-name="T23">Codes HTTP</text:span></text:span></text:a></text:p>
          </table:table-cell>
        </table:table-row>
        <table:table-row>
          <table:table-cell table:style-name="Tableau28.A1" office:value-type="string">
            <text:p text:style-name="P36">Méthodes</text:p>
          </table:table-cell>
          <table:table-cell table:style-name="Tableau28.A1" office:value-type="string">
            <text:p text:style-name="P36">REST</text:p>
          </table:table-cell>
          <table:table-cell table:style-name="Tableau28.A1" office:value-type="string">
            <text:p text:style-name="western2"><text:a xlink:type="simple" xlink:href="#_méthodes_http" office:target-frame-name="_top" xlink:show="replace" text:style-name="Internet_20_link" text:visited-style-name="Visited_20_Internet_20_Link"><text:span text:style-name="Lien_20_hypertexte"><text:span text:style-name="T23">Méthodes HTTP</text:span></text:span></text:a></text:p>
          </table:table-cell>
        </table:table-row>
        <table:table-row>
          <table:table-cell table:style-name="Tableau28.A1" office:value-type="string">
            <text:p text:style-name="P36">Serveur de cache</text:p>
          </table:table-cell>
          <table:table-cell table:style-name="Tableau28.A1" office:value-type="string">
            <text:p text:style-name="P36">REST</text:p>
          </table:table-cell>
          <table:table-cell table:style-name="Tableau28.A1" office:value-type="string">
            <text:p text:style-name="P36">Non</text:p>
          </table:table-cell>
        </table:table-row>
        <table:table-row>
          <table:table-cell table:style-name="Tableau28.A1" office:value-type="string">
            <text:p text:style-name="P36">Domaine et sous-domaines</text:p>
          </table:table-cell>
          <table:table-cell table:style-name="Tableau28.A1" office:value-type="string">
            <text:p text:style-name="P36">Structure</text:p>
          </table:table-cell>
          <table:table-cell table:style-name="Tableau28.A1" office:value-type="string">
            <text:p text:style-name="P36">Les APIs sont regroupées sous un ou plusieurs chemins principaux (/api ou /mon-service) pour éviter l’utilisation de CORS</text:p>
          </table:table-cell>
        </table:table-row>
        <table:table-row>
          <table:table-cell table:style-name="Tableau28.A1" office:value-type="string">
            <text:p text:style-name="P36">CORS</text:p>
          </table:table-cell>
          <table:table-cell table:style-name="Tableau28.A1" office:value-type="string">
            <text:p text:style-name="P36">Structure</text:p>
          </table:table-cell>
          <table:table-cell table:style-name="Tableau28.A1" office:value-type="string">
            <text:p text:style-name="P36">Non</text:p>
          </table:table-cell>
        </table:table-row>
        <table:table-row>
          <table:table-cell table:style-name="Tableau28.A1" office:value-type="string">
            <text:p text:style-name="P36">Granularité</text:p>
          </table:table-cell>
          <table:table-cell table:style-name="Tableau28.A1" office:value-type="string">
            <text:p text:style-name="P36">Structure</text:p>
          </table:table-cell>
          <table:table-cell table:style-name="Tableau28.A1" office:value-type="string">
            <text:p text:style-name="P36">Privilégier le découpage métier (vision produit) plutôt que CRUD quand c’est possible</text:p>
          </table:table-cell>
        </table:table-row>
        <table:table-row>
          <table:table-cell table:style-name="Tableau28.A1" office:value-type="string">
            <text:p text:style-name="P36">Gestion des versions</text:p>
          </table:table-cell>
          <table:table-cell table:style-name="Tableau28.A1" office:value-type="string">
            <text:p text:style-name="P36">Structure</text:p>
          </table:table-cell>
          <table:table-cell table:style-name="Tableau28.A1" office:value-type="string">
            <text:p text:style-name="P36">Oui. Uniquement numéro de version majeur (v2), en fin d’URI</text:p>
          </table:table-cell>
        </table:table-row>
        <table:table-row>
          <table:table-cell table:style-name="Tableau28.A1" office:value-type="string">
            <text:p text:style-name="P36">Format</text:p>
          </table:table-cell>
          <table:table-cell table:style-name="Tableau28.A1" office:value-type="string">
            <text:p text:style-name="P36">Structure</text:p>
          </table:table-cell>
          <table:table-cell table:style-name="Tableau28.A1" office:value-type="string">
            <text:p text:style-name="P36">JSON</text:p>
          </table:table-cell>
        </table:table-row>
        <table:table-row>
          <table:table-cell table:style-name="Tableau28.A1" office:value-type="string">
            <text:p text:style-name="P36">Nom des ressources</text:p>
          </table:table-cell>
          <table:table-cell table:style-name="Tableau28.A1" office:value-type="string">
            <text:p text:style-name="P36">URI</text:p>
          </table:table-cell>
          <table:table-cell table:style-name="Tableau28.A1" office:value-type="string">
            <text:p text:style-name="P36">Des noms plutôt que des verbes, au pluriel</text:p>
          </table:table-cell>
        </table:table-row>
        <table:table-row>
          <table:table-cell table:style-name="Tableau28.A1" office:value-type="string">
            <text:p text:style-name="P36">Casse des ressources</text:p>
          </table:table-cell>
          <table:table-cell table:style-name="Tableau28.A1" office:value-type="string">
            <text:p text:style-name="P36">URI</text:p>
          </table:table-cell>
          <table:table-cell table:style-name="Tableau28.A1" office:value-type="string">
            <text:p text:style-name="P36"><text:span text:style-name="T93">snake_case, </text:span>spinal-case, <text:span text:style-name="T93">CamelCase</text:span></text:p>
          </table:table-cell>
        </table:table-row>
        <table:table-row>
          <table:table-cell table:style-name="Tableau28.A1" office:value-type="string">
            <text:p text:style-name="P36">Casse des paramètres d’URL et contenu JSON</text:p>
          </table:table-cell>
          <table:table-cell table:style-name="Tableau28.A1" office:value-type="string">
            <text:p text:style-name="P36">URI</text:p>
          </table:table-cell>
          <table:table-cell table:style-name="Tableau28.A1" office:value-type="string">
            <text:p text:style-name="P36">snake_case (id_client) recommandé (lowerCamlCase possible). Doit être consistant entre les deux</text:p>
          </table:table-cell>
        </table:table-row>
        <table:table-row>
          <table:table-cell table:style-name="Tableau28.A1" office:value-type="string">
            <text:p text:style-name="P36">Pagination</text:p>
          </table:table-cell>
          <table:table-cell table:style-name="Tableau28.A1" office:value-type="string">
            <text:p text:style-name="P36">Uniformisation</text:p>
          </table:table-cell>
          <table:table-cell table:style-name="Tableau28.A1" office:value-type="string">
            <text:p text:style-name="P36">Systématique avec paramètres par défaut</text:p>
          </table:table-cell>
        </table:table-row>
        <table:table-row>
          <table:table-cell table:style-name="Tableau28.A1" office:value-type="string">
            <text:p text:style-name="P36">Qualité de la donnée</text:p>
          </table:table-cell>
          <table:table-cell table:style-name="Tableau28.A1" office:value-type="string">
            <text:p text:style-name="P37"/>
          </table:table-cell>
          <table:table-cell table:style-name="Tableau28.A1" office:value-type="string">
            <text:p text:style-name="P37"/>
          </table:table-cell>
        </table:table-row>
        <table:table-row>
          <table:table-cell table:style-name="Tableau28.A1" office:value-type="string">
            <text:p text:style-name="P36">Référentiels</text:p>
          </table:table-cell>
          <table:table-cell table:style-name="Tableau28.A1" office:value-type="string">
            <text:p text:style-name="P37"/>
          </table:table-cell>
          <table:table-cell table:style-name="Tableau28.A1" office:value-type="string">
            <text:p text:style-name="P36">Avoir un seul propriétaire, porté par l’application dont c’est le domaine métier principal</text:p>
          </table:table-cell>
        </table:table-row>
        <table:table-row>
          <table:table-cell table:style-name="Tableau28.A1" office:value-type="string">
            <text:p text:style-name="P36">Supervision</text:p>
          </table:table-cell>
          <table:table-cell table:style-name="Tableau28.A1" office:value-type="string">
            <text:p text:style-name="P37"/>
          </table:table-cell>
          <table:table-cell table:style-name="Tableau28.A1" office:value-type="string">
            <text:p text:style-name="P37"/>
          </table:table-cell>
        </table:table-row>
        <table:table-row>
          <table:table-cell table:style-name="Tableau28.A1" office:value-type="string">
            <text:p text:style-name="P36">Management</text:p>
          </table:table-cell>
          <table:table-cell table:style-name="Tableau28.A1" office:value-type="string">
            <text:p text:style-name="P37"/>
          </table:table-cell>
          <table:table-cell table:style-name="Tableau28.A1" office:value-type="string">
            <text:p text:style-name="P36">Les API entre le frontend et le backend sont managées par la chaîne de service<text:line-break/>Les API inter-applicative sont managées par INES-API</text:p>
          </table:table-cell>
        </table:table-row>
        <text:soft-page-break/>
        <table:table-row>
          <table:table-cell table:style-name="Tableau28.A1" office:value-type="string">
            <text:p text:style-name="P36">Sécurisation</text:p>
          </table:table-cell>
          <table:table-cell table:style-name="Tableau28.A1" office:value-type="string">
            <text:p text:style-name="P36">Sécurité</text:p>
          </table:table-cell>
          <table:table-cell table:style-name="Tableau28.A1" office:value-type="string">
            <text:p text:style-name="P36">Générale : rôles, permissions et analyse par la chaîne de service<text:line-break/>Client API : passe en plus par INES-API et nécessite un certificat</text:p>
          </table:table-cell>
        </table:table-row>
      </table:table>
      <text:p text:style-name="Normal"/>
      <text:h text:style-name="Heading_20_2" text:outline-level="2"><text:bookmark-start text:name="_Toc177568943"/><text:bookmark-start text:name="_Toc177652122"/><text:bookmark-start text:name="_Toc177652586"/><text:bookmark-start text:name="__RefHeading___Toc9904_1783990655"/><text:bookmark-start text:name="_Toc177660707"/>Version des API<text:bookmark-end text:name="_Toc177568943"/><text:bookmark-end text:name="_Toc177652122"/><text:bookmark-end text:name="_Toc177652586"/><text:bookmark-end text:name="__RefHeading___Toc9904_1783990655"/><text:bookmark-end text:name="_Toc177660707"/></text:h>
      <text:p text:style-name="Normal">Règles de versionnement des APIs <text:span text:style-name="T78">comme établie</text:span><text:span text:style-name="T81">s</text:span><text:span text:style-name="T78"> dans la </text:span><text:a xlink:type="simple" xlink:href="http://cct.sg.minint.fr/strategie-api/regles.html#pr3" text:style-name="Internet_20_link" text:visited-style-name="Visited_20_Internet_20_Link"><text:span text:style-name="T78">doctrine d’API</text:span></text:a><text:span text:style-name="T78"> </text:span></text:p>
      <text:h text:style-name="Heading_20_2" text:outline-level="2"><text:bookmark-start text:name="__RefHeading___Toc9906_1783990655"/><text:bookmark-start text:name="_Toc177660708"/><text:bookmark-start text:name="_Toc177652587"/><text:bookmark-start text:name="_Toc177652123"/><text:bookmark-start text:name="_Toc177568944"/>Chemins réservés<text:bookmark-end text:name="__RefHeading___Toc9906_1783990655"/><text:bookmark-end text:name="_Toc177660708"/><text:bookmark-end text:name="_Toc177652587"/><text:bookmark-end text:name="_Toc177652123"/><text:bookmark-end text:name="_Toc177568944"/></text:h>
      <text:p text:style-name="P101">{exemple}</text:p>
      <table:table table:name="Tableau29" table:style-name="Tableau29">
        <table:table-column table:style-name="Tableau29.A" table:number-columns-repeated="2"/>
        <table:table-header-rows>
          <table:table-row>
            <table:table-cell table:style-name="Tableau29.A1" office:value-type="string">
              <text:p text:style-name="P35">Chemin</text:p>
            </table:table-cell>
            <table:table-cell table:style-name="Tableau29.A1" office:value-type="string">
              <text:p text:style-name="P35">Description</text:p>
            </table:table-cell>
          </table:table-row>
        </table:table-header-rows>
        <table:table-row>
          <table:table-cell table:style-name="Tableau29.A1" office:value-type="string">
            <text:p text:style-name="P36">/admin</text:p>
          </table:table-cell>
          <table:table-cell table:style-name="Tableau29.A1" office:value-type="string">
            <text:p text:style-name="P36">Administration fonctionnelle</text:p>
          </table:table-cell>
        </table:table-row>
        <table:table-row>
          <table:table-cell table:style-name="Tableau29.A1" office:value-type="string">
            <text:p text:style-name="P36">/<text:span text:style-name="T31">healthcheck</text:span></text:p>
          </table:table-cell>
          <table:table-cell table:style-name="Tableau29.A1" office:value-type="string">
            <text:p text:style-name="P43">Healthcheck</text:p>
          </table:table-cell>
        </table:table-row>
        <table:table-row>
          <table:table-cell table:style-name="Tableau29.A4" office:value-type="string">
            <text:p text:style-name="P36">/stats</text:p>
          </table:table-cell>
          <table:table-cell table:style-name="Tableau29.A4" office:value-type="string">
            <text:p text:style-name="P36">Analyses statistiques</text:p>
          </table:table-cell>
        </table:table-row>
        <table:table-row>
          <table:table-cell table:style-name="Tableau29.A1" office:value-type="string">
            <text:p text:style-name="P36">/openapi</text:p>
          </table:table-cell>
          <table:table-cell table:style-name="Tableau29.A1" office:value-type="string">
            <text:p text:style-name="P36">Documentations OpenAPI et lien de téléchargement des fichiers OpenAPI</text:p>
          </table:table-cell>
        </table:table-row>
        <table:table-row>
          <table:table-cell table:style-name="Tableau29.A1" office:value-type="string">
            <text:p text:style-name="P36">/upload</text:p>
          </table:table-cell>
          <table:table-cell table:style-name="Tableau29.A1" office:value-type="string">
            <text:p text:style-name="P36">Téléversement de fichier</text:p>
          </table:table-cell>
        </table:table-row>
      </table:table>
      <text:p text:style-name="Normal"/>
      <text:p text:style-name="Normal"/>
      <text:h text:style-name="Heading_20_2" text:outline-level="2"><text:bookmark-start text:name="_Toc177660709"/><text:bookmark-start text:name="_Toc177652588"/><text:bookmark-start text:name="_Toc177652124"/><text:bookmark-start text:name="_Toc177568945"/><text:bookmark-start text:name="__RefHeading___Toc9908_1783990655"/>Piles Logicielles<text:bookmark-end text:name="_Toc177660709"/><text:bookmark-end text:name="_Toc177652588"/><text:bookmark-end text:name="_Toc177652124"/><text:bookmark-end text:name="_Toc177568945"/><text:bookmark-end text:name="__RefHeading___Toc9908_1783990655"/></text:h>
      <text:p text:style-name="P104">{exemple}</text:p>
      <table:table table:name="Tableau30" table:style-name="Tableau30">
        <table:table-column table:style-name="Tableau30.A" table:number-columns-repeated="4"/>
        <table:table-header-rows>
          <table:table-row>
            <table:table-cell table:style-name="Tableau30.A1" office:value-type="string">
              <text:p text:style-name="P35">Ser<text:span text:style-name="T72">vice</text:span> hôte</text:p>
            </table:table-cell>
            <table:table-cell table:style-name="Tableau30.A1" office:value-type="string">
              <text:p text:style-name="P35">Fonction</text:p>
            </table:table-cell>
            <table:table-cell table:style-name="Tableau30.A1" office:value-type="string">
              <text:p text:style-name="P35">Brique logicielle</text:p>
            </table:table-cell>
            <table:table-cell table:style-name="Tableau30.A1" office:value-type="string">
              <text:p text:style-name="P35">Version</text:p>
            </table:table-cell>
          </table:table-row>
        </table:table-header-rows>
        <table:table-row>
          <table:table-cell table:style-name="Tableau30.A1" office:value-type="string">
            <text:p text:style-name="P36">*</text:p>
          </table:table-cell>
          <table:table-cell table:style-name="Tableau30.A1" office:value-type="string">
            <text:p text:style-name="P36">Gestion des conteneurs</text:p>
          </table:table-cell>
          <table:table-cell table:style-name="Tableau30.A1" office:value-type="string">
            <text:p text:style-name="P36">Docker Engine</text:p>
          </table:table-cell>
          <table:table-cell table:style-name="Tableau30.A1" office:value-type="string">
            <text:p text:style-name="P36">20.10</text:p>
          </table:table-cell>
        </table:table-row>
        <table:table-row>
          <table:table-cell table:style-name="Tableau30.A1" office:value-type="string">
            <text:p text:style-name="P36">Reverse proxy</text:p>
          </table:table-cell>
          <table:table-cell table:style-name="Tableau30.A1" office:value-type="string">
            <text:p text:style-name="P36">Proxy inverse</text:p>
          </table:table-cell>
          <table:table-cell table:style-name="Tableau30.A1" office:value-type="string">
            <text:p text:style-name="P36">RPX (Nginx)</text:p>
          </table:table-cell>
          <table:table-cell table:style-name="Tableau30.A1" office:value-type="string">
            <text:p text:style-name="P36">1.21</text:p>
          </table:table-cell>
        </table:table-row>
        <table:table-row>
          <table:table-cell table:style-name="Tableau30.A1" office:value-type="string">
            <text:p text:style-name="P36">Reverse proxy</text:p>
          </table:table-cell>
          <table:table-cell table:style-name="Tableau30.A1" office:value-type="string">
            <text:p text:style-name="P36">Système d’exploitation</text:p>
          </table:table-cell>
          <table:table-cell table:style-name="Tableau30.A1" office:value-type="string">
            <text:p text:style-name="P36">Debian</text:p>
          </table:table-cell>
          <table:table-cell table:style-name="Tableau30.A1" office:value-type="string">
            <text:p text:style-name="P36">11</text:p>
          </table:table-cell>
        </table:table-row>
        <table:table-row>
          <table:table-cell table:style-name="Tableau30.A1" office:value-type="string">
            <text:p text:style-name="P36">Frontend</text:p>
          </table:table-cell>
          <table:table-cell table:style-name="Tableau30.A1" office:value-type="string">
            <text:p text:style-name="P36">Serveur web</text:p>
          </table:table-cell>
          <table:table-cell table:style-name="Tableau30.A1" office:value-type="string">
            <text:p text:style-name="P36">Apache</text:p>
          </table:table-cell>
          <table:table-cell table:style-name="Tableau30.A1" office:value-type="string">
            <text:p text:style-name="P36">2.4</text:p>
          </table:table-cell>
        </table:table-row>
        <table:table-row>
          <table:table-cell table:style-name="Tableau30.A1" office:value-type="string">
            <text:p text:style-name="P36">Frontend</text:p>
          </table:table-cell>
          <table:table-cell table:style-name="Tableau30.A1" office:value-type="string">
            <text:p text:style-name="P36">Framework frontend Javascript</text:p>
          </table:table-cell>
          <table:table-cell table:style-name="Tableau30.A1" office:value-type="string">
            <text:p text:style-name="P37"/>
          </table:table-cell>
          <table:table-cell table:style-name="Tableau30.A1" office:value-type="string">
            <text:p text:style-name="P37"/>
          </table:table-cell>
        </table:table-row>
        <table:table-row>
          <table:table-cell table:style-name="Tableau30.A1" office:value-type="string">
            <text:p text:style-name="P36">Frontend</text:p>
          </table:table-cell>
          <table:table-cell table:style-name="Tableau30.A1" office:value-type="string">
            <text:p text:style-name="P36">Framework frontend CSS</text:p>
          </table:table-cell>
          <table:table-cell table:style-name="Tableau30.A1" office:value-type="string">
            <text:p text:style-name="P37"/>
          </table:table-cell>
          <table:table-cell table:style-name="Tableau30.A1" office:value-type="string">
            <text:p text:style-name="P37"/>
          </table:table-cell>
        </table:table-row>
        <table:table-row>
          <table:table-cell table:style-name="Tableau30.A1" office:value-type="string">
            <text:p text:style-name="P36">Backend</text:p>
          </table:table-cell>
          <table:table-cell table:style-name="Tableau30.A1" office:value-type="string">
            <text:p text:style-name="P36">Serveur web</text:p>
          </table:table-cell>
          <table:table-cell table:style-name="Tableau30.A1" office:value-type="string">
            <text:p text:style-name="P37"/>
          </table:table-cell>
          <table:table-cell table:style-name="Tableau30.A1" office:value-type="string">
            <text:p text:style-name="P37"/>
          </table:table-cell>
        </table:table-row>
        <table:table-row>
          <table:table-cell table:style-name="Tableau30.A1" office:value-type="string">
            <text:p text:style-name="P36">Backend</text:p>
          </table:table-cell>
          <table:table-cell table:style-name="Tableau30.A1" office:value-type="string">
            <text:p text:style-name="P36">Langage</text:p>
          </table:table-cell>
          <table:table-cell table:style-name="Tableau30.A1" office:value-type="string">
            <text:p text:style-name="P37"/>
          </table:table-cell>
          <table:table-cell table:style-name="Tableau30.A1" office:value-type="string">
            <text:p text:style-name="P37"/>
          </table:table-cell>
        </table:table-row>
        <table:table-row>
          <table:table-cell table:style-name="Tableau30.A1" office:value-type="string">
            <text:p text:style-name="P36">Backend</text:p>
          </table:table-cell>
          <table:table-cell table:style-name="Tableau30.A1" office:value-type="string">
            <text:p text:style-name="P36">Framework</text:p>
          </table:table-cell>
          <table:table-cell table:style-name="Tableau30.A1" office:value-type="string">
            <text:p text:style-name="P37"/>
          </table:table-cell>
          <table:table-cell table:style-name="Tableau30.A1" office:value-type="string">
            <text:p text:style-name="P37"/>
          </table:table-cell>
        </table:table-row>
        <table:table-row>
          <table:table-cell table:style-name="Tableau30.A1" office:value-type="string">
            <text:p text:style-name="P36">Backend</text:p>
          </table:table-cell>
          <table:table-cell table:style-name="Tableau30.A1" office:value-type="string">
            <text:p text:style-name="P36">Système d’exploitation</text:p>
          </table:table-cell>
          <table:table-cell table:style-name="Tableau30.A1" office:value-type="string">
            <text:p text:style-name="P36">Debian</text:p>
          </table:table-cell>
          <table:table-cell table:style-name="Tableau30.A1" office:value-type="string">
            <text:p text:style-name="P36">11</text:p>
          </table:table-cell>
        </table:table-row>
        <text:soft-page-break/>
        <table:table-row>
          <table:table-cell table:style-name="Tableau30.A1" office:value-type="string">
            <text:p text:style-name="P36">Base de données</text:p>
          </table:table-cell>
          <table:table-cell table:style-name="Tableau30.A1" office:value-type="string">
            <text:p text:style-name="P36">Serveur de base de données</text:p>
          </table:table-cell>
          <table:table-cell table:style-name="Tableau30.A1" office:value-type="string">
            <text:p text:style-name="P36">PostgreSQL</text:p>
          </table:table-cell>
          <table:table-cell table:style-name="Tableau30.A1" office:value-type="string">
            <text:p text:style-name="P36">13</text:p>
          </table:table-cell>
        </table:table-row>
        <table:table-row>
          <table:table-cell table:style-name="Tableau30.A1" office:value-type="string">
            <text:p text:style-name="P36">Base de données</text:p>
          </table:table-cell>
          <table:table-cell table:style-name="Tableau30.A1" office:value-type="string">
            <text:p text:style-name="P36">Système d’exploitation</text:p>
          </table:table-cell>
          <table:table-cell table:style-name="Tableau30.A1" office:value-type="string">
            <text:p text:style-name="P36">Debian</text:p>
          </table:table-cell>
          <table:table-cell table:style-name="Tableau30.A1" office:value-type="string">
            <text:p text:style-name="P36">11</text:p>
          </table:table-cell>
        </table:table-row>
        <table:table-row>
          <table:table-cell table:style-name="Tableau30.A1" office:value-type="string">
            <text:p text:style-name="P36">Proxy Out</text:p>
          </table:table-cell>
          <table:table-cell table:style-name="Tableau30.A1" office:value-type="string">
            <text:p text:style-name="P36">Proxy inverse</text:p>
          </table:table-cell>
          <table:table-cell table:style-name="Tableau30.A1" office:value-type="string">
            <text:p text:style-name="P36">RPX (Nginx)</text:p>
          </table:table-cell>
          <table:table-cell table:style-name="Tableau30.A1" office:value-type="string">
            <text:p text:style-name="P36">1.21</text:p>
          </table:table-cell>
        </table:table-row>
        <table:table-row>
          <table:table-cell table:style-name="Tableau30.A1" office:value-type="string">
            <text:p text:style-name="P36">Proxy Out</text:p>
          </table:table-cell>
          <table:table-cell table:style-name="Tableau30.A1" office:value-type="string">
            <text:p text:style-name="P36">Système d’exploitation</text:p>
          </table:table-cell>
          <table:table-cell table:style-name="Tableau30.A1" office:value-type="string">
            <text:p text:style-name="P36">Debian</text:p>
          </table:table-cell>
          <table:table-cell table:style-name="Tableau30.A1" office:value-type="string">
            <text:p text:style-name="P36">11</text:p>
          </table:table-cell>
        </table:table-row>
        <table:table-row>
          <table:table-cell table:style-name="Tableau30.A1" office:value-type="string">
            <text:p text:style-name="P36">Logs</text:p>
          </table:table-cell>
          <table:table-cell table:style-name="Tableau30.A1" office:value-type="string">
            <text:p text:style-name="P36">Collecte des logs</text:p>
          </table:table-cell>
          <table:table-cell table:style-name="Tableau30.A1" office:value-type="string">
            <text:p text:style-name="P36">Fluentd</text:p>
          </table:table-cell>
          <table:table-cell table:style-name="Tableau30.A1" office:value-type="string">
            <text:p text:style-name="P36">1.14</text:p>
          </table:table-cell>
        </table:table-row>
        <table:table-row>
          <table:table-cell table:style-name="Tableau30.A1" office:value-type="string">
            <text:p text:style-name="P36">Logs</text:p>
          </table:table-cell>
          <table:table-cell table:style-name="Tableau30.A1" office:value-type="string">
            <text:p text:style-name="P36">Indexation des logs</text:p>
          </table:table-cell>
          <table:table-cell table:style-name="Tableau30.A1" office:value-type="string">
            <text:p text:style-name="P36">ElasticSearch</text:p>
          </table:table-cell>
          <table:table-cell table:style-name="Tableau30.A1" office:value-type="string">
            <text:p text:style-name="P36">8.3</text:p>
          </table:table-cell>
        </table:table-row>
        <table:table-row>
          <table:table-cell table:style-name="Tableau30.A1" office:value-type="string">
            <text:p text:style-name="P36">Logs</text:p>
          </table:table-cell>
          <table:table-cell table:style-name="Tableau30.A1" office:value-type="string">
            <text:p text:style-name="P36">Tableaux de bord des logs</text:p>
          </table:table-cell>
          <table:table-cell table:style-name="Tableau30.A1" office:value-type="string">
            <text:p text:style-name="P36">Kibana</text:p>
          </table:table-cell>
          <table:table-cell table:style-name="Tableau30.A1" office:value-type="string">
            <text:p text:style-name="P36">8.2</text:p>
          </table:table-cell>
        </table:table-row>
        <table:table-row>
          <table:table-cell table:style-name="Tableau30.A1" office:value-type="string">
            <text:p text:style-name="P36">Logs</text:p>
          </table:table-cell>
          <table:table-cell table:style-name="Tableau30.A1" office:value-type="string">
            <text:p text:style-name="P36">Système d’exploitation</text:p>
          </table:table-cell>
          <table:table-cell table:style-name="Tableau30.A1" office:value-type="string">
            <text:p text:style-name="P36">Debian</text:p>
          </table:table-cell>
          <table:table-cell table:style-name="Tableau30.A1" office:value-type="string">
            <text:p text:style-name="P36">11</text:p>
          </table:table-cell>
        </table:table-row>
      </table:table>
      <text:p text:style-name="Normal"/>
      <text:h text:style-name="Heading_20_2" text:outline-level="2"><text:bookmark-start text:name="_Toc177660710"/><text:bookmark-start text:name="_Toc177652589"/><text:bookmark-start text:name="_Toc177652125"/><text:bookmark-start text:name="_Toc177568946"/><text:bookmark-start text:name="__RefHeading___Toc9910_1783990655"/>Tâches planifiées<text:bookmark-end text:name="_Toc177660710"/><text:bookmark-end text:name="_Toc177652589"/><text:bookmark-end text:name="_Toc177652125"/><text:bookmark-end text:name="_Toc177568946"/><text:bookmark-end text:name="__RefHeading___Toc9910_1783990655"/></text:h>
      <text:p text:style-name="P103">{exemple}</text:p>
      <table:table table:name="Tableau31" table:style-name="Tableau31">
        <table:table-column table:style-name="Tableau31.A" table:number-columns-repeated="2"/>
        <table:table-column table:style-name="Tableau31.C" table:number-columns-repeated="3"/>
        <table:table-row>
          <table:table-cell table:style-name="Tableau31.A1" office:value-type="string">
            <text:p text:style-name="P35">Description</text:p>
          </table:table-cell>
          <table:table-cell table:style-name="Tableau31.A1" office:value-type="string">
            <text:p text:style-name="P35">Scripts</text:p>
          </table:table-cell>
          <table:table-cell table:style-name="Tableau31.A1" office:value-type="string">
            <text:p text:style-name="P35">Outils associés</text:p>
          </table:table-cell>
          <table:table-cell table:style-name="Tableau31.A1" office:value-type="string">
            <text:p text:style-name="P35">Cycle</text:p>
          </table:table-cell>
          <table:table-cell table:style-name="Tableau31.A1" office:value-type="string">
            <text:p text:style-name="P35">Serveur responsable</text:p>
          </table:table-cell>
        </table:table-row>
        <table:table-row>
          <table:table-cell table:style-name="Tableau31.A1" office:value-type="string">
            <text:p text:style-name="P36">sauvegarde des base de données</text:p>
          </table:table-cell>
          <table:table-cell table:style-name="Tableau31.A1" office:value-type="string">
            <text:p text:style-name="P52"><text:span text:style-name="T72">{</text:span>backup-db.sh<text:span text:style-name="T72">}</text:span></text:p>
          </table:table-cell>
          <table:table-cell table:style-name="Tableau31.A1" office:value-type="string">
            <text:p text:style-name="P36">rClone</text:p>
          </table:table-cell>
          <table:table-cell table:style-name="Tableau31.A1" office:value-type="string">
            <text:p text:style-name="western2"><text:a xlink:type="simple" xlink:href="#_pra" office:target-frame-name="_top" xlink:show="replace" text:style-name="Internet_20_link" text:visited-style-name="Visited_20_Internet_20_Link"><text:span text:style-name="Lien_20_hypertexte"><text:span text:style-name="T23">PRA</text:span></text:span></text:a></text:p>
          </table:table-cell>
          <table:table-cell table:style-name="Tableau31.A1" office:value-type="string">
            <text:p text:style-name="P36">base de données maître</text:p>
          </table:table-cell>
        </table:table-row>
        <table:table-row>
          <table:table-cell table:style-name="Tableau31.A1" office:value-type="string">
            <text:p text:style-name="P36">sauvegarde des fichiers</text:p>
          </table:table-cell>
          <table:table-cell table:style-name="Tableau31.A1" office:value-type="string">
            <text:p text:style-name="P52"><text:span text:style-name="T72">{</text:span>backup-db.sh<text:span text:style-name="T72">}</text:span></text:p>
          </table:table-cell>
          <table:table-cell table:style-name="Tableau31.A1" office:value-type="string">
            <text:p text:style-name="P36">rClone</text:p>
          </table:table-cell>
          <table:table-cell table:style-name="Tableau31.A1" office:value-type="string">
            <text:p text:style-name="western2"><text:a xlink:type="simple" xlink:href="#_pra" office:target-frame-name="_top" xlink:show="replace" text:style-name="Internet_20_link" text:visited-style-name="Visited_20_Internet_20_Link"><text:span text:style-name="Lien_20_hypertexte"><text:span text:style-name="T23">PRA</text:span></text:span></text:a></text:p>
          </table:table-cell>
          <table:table-cell table:style-name="Tableau31.A1" office:value-type="string">
            <text:p text:style-name="P36">backend</text:p>
          </table:table-cell>
        </table:table-row>
        <table:table-row>
          <table:table-cell table:style-name="Tableau31.A1" office:value-type="string">
            <text:p text:style-name="P36">sauvegarde des logs</text:p>
          </table:table-cell>
          <table:table-cell table:style-name="Tableau31.A1" office:value-type="string">
            <text:p text:style-name="P52"><text:span text:style-name="T72">{</text:span>backup-db.sh<text:span text:style-name="T72">}</text:span></text:p>
          </table:table-cell>
          <table:table-cell table:style-name="Tableau31.A1" office:value-type="string">
            <text:p text:style-name="P36">rClone</text:p>
          </table:table-cell>
          <table:table-cell table:style-name="Tableau31.A1" office:value-type="string">
            <text:p text:style-name="western2"><text:a xlink:type="simple" xlink:href="#_pra" office:target-frame-name="_top" xlink:show="replace" text:style-name="Internet_20_link" text:visited-style-name="Visited_20_Internet_20_Link"><text:span text:style-name="Lien_20_hypertexte"><text:span text:style-name="T23">PRA</text:span></text:span></text:a></text:p>
          </table:table-cell>
          <table:table-cell table:style-name="Tableau31.A1" office:value-type="string">
            <text:p text:style-name="P36">serveur de centralisation des logs</text:p>
          </table:table-cell>
        </table:table-row>
      </table:table>
      <text:p text:style-name="Normal"/>
      <text:h text:style-name="Heading_20_2" text:outline-level="2"><text:bookmark-start text:name="_Toc177568947"/><text:bookmark-start text:name="_Toc177652126"/><text:bookmark-start text:name="_Toc177652590"/><text:bookmark-start text:name="__RefHeading___Toc9912_1783990655"/><text:bookmark-start text:name="_Toc177660711"/>Docker<text:bookmark-end text:name="_Toc177568947"/><text:bookmark-end text:name="_Toc177652126"/><text:bookmark-end text:name="_Toc177652590"/><text:bookmark-end text:name="__RefHeading___Toc9912_1783990655"/><text:bookmark-end text:name="_Toc177660711"/></text:h>
      <text:list text:style-name="L6">
        <text:list-item>
          <text:p text:style-name="P136">Chaque service applicatif est construit dans une image docker indépendante (frontend, backend, etc) afin de standardiser les environnements et faciliter le processus de CI/CD.</text:p>
        </text:list-item>
        <text:list-item>
          <text:p text:style-name="P136">Les images utilisées doivent se baser sur les versions allégées des systèmes d’exploitation <text:span text:style-name="T59">et rootless ;</text:span></text:p>
        </text:list-item>
        <text:list-item>
          <text:p text:style-name="P136">Les images docker construites doivent contenir toutes les sources nécessaires et ne doivent pas avoir à changer selon les environnements ;</text:p>
        </text:list-item>
        <text:list-item>
          <text:p text:style-name="P136">Toutes les configurations spécifiques aux environnements doivent gérées grâce aux volumes et aux variables d’environnement ;</text:p>
        </text:list-item>
        <text:list-item>
          <text:p text:style-name="P136">Les Dockerfile et les configurations doivent être livrés en même temps que les sources du projet à chaque nouvelle version</text:p>
        </text:list-item>
      </text:list>
      <text:p text:style-name="Normal"/>
      <text:h text:style-name="Heading_20_2" text:outline-level="2"><text:bookmark-start text:name="_Toc177568948"/><text:bookmark-start text:name="_Toc177652127"/><text:bookmark-start text:name="_Toc177652591"/><text:bookmark-start text:name="__RefHeading___Toc9914_1783990655"/><text:bookmark-start text:name="_Toc177660712"/><text:soft-page-break/>Systèmes d'exploitation<text:bookmark-end text:name="_Toc177568948"/><text:bookmark-end text:name="_Toc177652127"/><text:bookmark-end text:name="_Toc177652591"/><text:bookmark-end text:name="__RefHeading___Toc9914_1783990655"/><text:bookmark-end text:name="_Toc177660712"/></text:h>
      <text:p text:style-name="Normal"><text:span text:style-name="T32">{contexte cloud pi IAAS }</text:span>Les images docker déployées se basent sur les images des systèmes d’exploitation validées et durcies par l’équipe ForgeImage</text:p>
      <text:p text:style-name="Normal"/>
      <text:h text:style-name="Heading_20_2" text:outline-level="2"><text:bookmark-start text:name="_Toc177568949"/><text:bookmark-start text:name="_Toc177652128"/><text:bookmark-start text:name="_Toc177652592"/><text:bookmark-start text:name="__RefHeading___Toc9916_1783990655"/><text:bookmark-start text:name="_Toc177660713"/>Gestion des librairies<text:bookmark-end text:name="_Toc177568949"/><text:bookmark-end text:name="_Toc177652128"/><text:bookmark-end text:name="_Toc177652592"/><text:bookmark-end text:name="__RefHeading___Toc9916_1783990655"/><text:bookmark-end text:name="_Toc177660713"/></text:h>
      <text:p text:style-name="Normal">Les librairies sont gérées et installées dans les projets en utilisant des gestionnaires de dépendances.</text:p>
      <text:p text:style-name="Normal">Lors de la construction des images docker, les librairies sur récupérées par l’intermédiaire du serveur Nexus de la Forge qui les garde en cache.</text:p>
      <text:h text:style-name="Heading_20_2" text:outline-level="2"><text:bookmark-start text:name="__RefHeading___Toc9918_1783990655"/><text:s/><text:bookmark-start text:name="_Toc177568950"/><text:bookmark-start text:name="_Toc177652129"/><text:bookmark-start text:name="_Toc177652593"/><text:bookmark-start text:name="_Toc177660714"/>Version des codes sources<text:bookmark-end text:name="__RefHeading___Toc9918_1783990655"/><text:bookmark-end text:name="_Toc177568950"/><text:bookmark-end text:name="_Toc177652129"/><text:bookmark-end text:name="_Toc177652593"/><text:bookmark-end text:name="_Toc177660714"/></text:h>
      <table:table table:name="Tableau32" table:style-name="Tableau32">
        <table:table-column table:style-name="Tableau32.A" table:number-columns-repeated="2"/>
        <table:table-row>
          <table:table-cell table:style-name="Tableau32.A1" office:value-type="string">
            <text:p text:style-name="P35">Type</text:p>
          </table:table-cell>
          <table:table-cell table:style-name="Tableau32.A1" office:value-type="string">
            <text:p text:style-name="P35">Valeur</text:p>
          </table:table-cell>
        </table:table-row>
        <table:table-row>
          <table:table-cell table:style-name="Tableau32.A1" office:value-type="string">
            <text:p text:style-name="P36">Outil de gestion des versions</text:p>
          </table:table-cell>
          <table:table-cell table:style-name="Tableau32.A1" office:value-type="string">
            <text:p text:style-name="P36">GIT</text:p>
          </table:table-cell>
        </table:table-row>
        <table:table-row>
          <table:table-cell table:style-name="Tableau32.A1" office:value-type="string">
            <text:p text:style-name="P36">Workflow</text:p>
          </table:table-cell>
          <table:table-cell table:style-name="Tableau32.A1" office:value-type="string">
            <text:p text:style-name="P36">TBD (Trunk Based Development)<text:line-break/>Gitlab Flow<text:line-break/>Github Flow<text:line-break/>GIT Flow</text:p>
          </table:table-cell>
        </table:table-row>
      </table:table>
      <text:p text:style-name="Normal"/>
      <text:h text:style-name="Heading_20_2" text:outline-level="2"><text:bookmark-start text:name="_Toc177568951"/><text:bookmark-start text:name="_Toc177652130"/><text:bookmark-start text:name="_Toc177652594"/><text:bookmark-start text:name="__RefHeading___Toc9920_1783990655"/><text:bookmark-start text:name="_Toc177660715"/>Architecture logicielle<text:bookmark-end text:name="_Toc177568951"/><text:bookmark-end text:name="_Toc177652130"/><text:bookmark-end text:name="_Toc177652594"/><text:bookmark-end text:name="__RefHeading___Toc9920_1783990655"/><text:bookmark-end text:name="_Toc177660715"/></text:h>
      <text:p text:style-name="Normal"/>
      <text:p text:style-name="Normal"/>
      <text:h text:style-name="Heading_20_1" text:outline-level="1"><text:bookmark-start text:name="_Toc177660716"/><text:bookmark-start text:name="_Toc177652595"/><text:bookmark-start text:name="_Toc177652131"/><text:bookmark-start text:name="__RefHeading___Toc9922_1783990655"/><text:bookmark-start text:name="_Toc177568952"/>Services transverses et technique<text:bookmark-end text:name="_Toc177660716"/><text:bookmark-end text:name="_Toc177652595"/><text:bookmark-end text:name="_Toc177652131"/><text:bookmark-end text:name="__RefHeading___Toc9922_1783990655"/><text:bookmark-end text:name="_Toc177568952"/></text:h>
      <text:p text:style-name="Normal"/>
      <text:h text:style-name="Heading_20_2" text:outline-level="2"><text:bookmark-start text:name="_Toc177660717"/><text:bookmark-start text:name="_Toc177652596"/><text:bookmark-start text:name="_Toc177652132"/><text:bookmark-start text:name="__RefHeading___Toc9924_1783990655"/><text:bookmark-start text:name="_Toc177568953"/>Services impl<text:span text:style-name="T60">é</text:span>ment<text:span text:style-name="T60">é</text:span>s<text:bookmark-end text:name="_Toc177660717"/><text:bookmark-end text:name="_Toc177652596"/><text:bookmark-end text:name="_Toc177652132"/><text:bookmark-end text:name="__RefHeading___Toc9924_1783990655"/><text:bookmark-end text:name="_Toc177568953"/></text:h>
      <table:table table:name="Tableau33" table:style-name="Tableau33">
        <table:table-column table:style-name="Tableau33.A" table:number-columns-repeated="4"/>
        <table:table-header-rows>
          <table:table-row>
            <table:table-cell table:style-name="Tableau33.A1" office:value-type="string">
              <text:p text:style-name="P35">Service</text:p>
            </table:table-cell>
            <table:table-cell table:style-name="Tableau33.A1" office:value-type="string">
              <text:p text:style-name="P35">Solution</text:p>
            </table:table-cell>
            <table:table-cell table:style-name="Tableau33.A1" office:value-type="string">
              <text:p text:style-name="P35">Porteur</text:p>
            </table:table-cell>
            <table:table-cell table:style-name="Tableau33.A1" office:value-type="string">
              <text:p text:style-name="P35">QoS</text:p>
            </table:table-cell>
          </table:table-row>
        </table:table-header-rows>
        <table:table-row>
          <table:table-cell table:style-name="Tableau33.A1" office:value-type="string">
            <text:p text:style-name="P36">Relai SMTP (courriels)</text:p>
          </table:table-cell>
          <table:table-cell table:style-name="Tableau33.A1" office:value-type="string">
            <text:p text:style-name="P36">ICASSO</text:p>
          </table:table-cell>
          <table:table-cell table:style-name="Tableau33.A1" office:value-type="string">
            <text:p text:style-name="P36">service transverse (D<text:span text:style-name="T94">T</text:span>NUM MI)</text:p>
          </table:table-cell>
          <table:table-cell table:style-name="Tableau33.A1" office:value-type="string">
            <text:p text:style-name="P37"/>
          </table:table-cell>
        </table:table-row>
        <table:table-row>
          <table:table-cell table:style-name="Tableau33.A1" office:value-type="string">
            <text:p text:style-name="P36">Relai SMS</text:p>
          </table:table-cell>
          <table:table-cell table:style-name="Tableau33.A1" office:value-type="string">
            <text:p text:style-name="P36">Opache</text:p>
          </table:table-cell>
          <table:table-cell table:style-name="Tableau33.A1" office:value-type="string">
            <text:p text:style-name="P36">service transverse (D<text:span text:style-name="T94">T</text:span>NUM MI)</text:p>
          </table:table-cell>
          <table:table-cell table:style-name="Tableau33.A1" office:value-type="string">
            <text:p text:style-name="P37"/>
          </table:table-cell>
        </table:table-row>
        <table:table-row>
          <table:table-cell table:style-name="Tableau33.A1" office:value-type="string">
            <text:p text:style-name="P36">Passerelle API inter-applications</text:p>
          </table:table-cell>
          <table:table-cell table:style-name="Tableau33.A1" office:value-type="string">
            <text:p text:style-name="P36">INES-API</text:p>
          </table:table-cell>
          <table:table-cell table:style-name="Tableau33.A1" office:value-type="string">
            <text:p text:style-name="P36">service transverse (D<text:span text:style-name="T94">T</text:span>NUM MI)</text:p>
          </table:table-cell>
          <table:table-cell table:style-name="Tableau33.A1" office:value-type="string">
            <text:p text:style-name="P37"/>
          </table:table-cell>
        </table:table-row>
        <table:table-row>
          <table:table-cell table:style-name="Tableau33.A1" office:value-type="string">
            <text:p text:style-name="P36">Passerelle API inter-applications</text:p>
          </table:table-cell>
          <table:table-cell table:style-name="Tableau33.A1" office:value-type="string">
            <text:p text:style-name="P36">INES-SE</text:p>
          </table:table-cell>
          <table:table-cell table:style-name="Tableau33.A1" office:value-type="string">
            <text:p text:style-name="P36">service transverse (D<text:span text:style-name="T94">T</text:span>NUM MI)</text:p>
          </table:table-cell>
          <table:table-cell table:style-name="Tableau33.A1" office:value-type="string">
            <text:p text:style-name="P37"/>
          </table:table-cell>
        </table:table-row>
        <table:table-row>
          <table:table-cell table:style-name="Tableau33.A1" office:value-type="string">
            <text:p text:style-name="P36">Passerelle d’échange de fichiers inter-applications</text:p>
          </table:table-cell>
          <table:table-cell table:style-name="Tableau33.A1" office:value-type="string">
            <text:p text:style-name="P36">INES-SAS</text:p>
          </table:table-cell>
          <table:table-cell table:style-name="Tableau33.A1" office:value-type="string">
            <text:p text:style-name="P36">service transverse (D<text:span text:style-name="T94">T</text:span>NUM MI)</text:p>
          </table:table-cell>
          <table:table-cell table:style-name="Tableau33.A1" office:value-type="string">
            <text:p text:style-name="P37"/>
          </table:table-cell>
        </table:table-row>
        <table:table-row>
          <table:table-cell table:style-name="Tableau33.A1" office:value-type="string">
            <text:p text:style-name="P36">SSO - Ministère de l’Intérieur (RIE)</text:p>
          </table:table-cell>
          <table:table-cell table:style-name="Tableau33.A1" office:value-type="string">
            <text:p text:style-name="P36">Passage2</text:p>
          </table:table-cell>
          <table:table-cell table:style-name="Tableau33.A1" office:value-type="string">
            <text:p text:style-name="P36">service transverse (D<text:span text:style-name="T94">T</text:span>NUM MI)</text:p>
          </table:table-cell>
          <table:table-cell table:style-name="Tableau33.A1" office:value-type="string">
            <text:p text:style-name="P37"/>
          </table:table-cell>
        </table:table-row>
        <text:soft-page-break/>
        <table:table-row>
          <table:table-cell table:style-name="Tableau33.A1" office:value-type="string">
            <text:p text:style-name="P36">SSO – Citoyens</text:p>
          </table:table-cell>
          <table:table-cell table:style-name="Tableau33.A1" office:value-type="string">
            <text:p text:style-name="P36">FranceConnect</text:p>
          </table:table-cell>
          <table:table-cell table:style-name="Tableau33.A1" office:value-type="string">
            <text:p text:style-name="P36">service transverse (DiNUM)</text:p>
          </table:table-cell>
          <table:table-cell table:style-name="Tableau33.A1" office:value-type="string">
            <text:p text:style-name="P37"/>
          </table:table-cell>
        </table:table-row>
        <table:table-row>
          <table:table-cell table:style-name="Tableau33.A1" office:value-type="string">
            <text:p text:style-name="P36">SSO – Agents interministériel</text:p>
          </table:table-cell>
          <table:table-cell table:style-name="Tableau33.A1" office:value-type="string">
            <text:p text:style-name="P36">AgentConnect</text:p>
          </table:table-cell>
          <table:table-cell table:style-name="Tableau33.A1" office:value-type="string">
            <text:p text:style-name="P36">service transverse (DiNUM)</text:p>
          </table:table-cell>
          <table:table-cell table:style-name="Tableau33.A1" office:value-type="string">
            <text:p text:style-name="P37"/>
          </table:table-cell>
        </table:table-row>
        <table:table-row>
          <table:table-cell table:style-name="Tableau33.A1" office:value-type="string">
            <text:p text:style-name="P36">Pare-feu applicatif</text:p>
          </table:table-cell>
          <table:table-cell table:style-name="Tableau33.A1" office:value-type="string">
            <text:p text:style-name="P36">WAF-CDS</text:p>
          </table:table-cell>
          <table:table-cell table:style-name="Tableau33.A1" office:value-type="string">
            <text:p text:style-name="P36">Service cloud (CDS)</text:p>
          </table:table-cell>
          <table:table-cell table:style-name="Tableau33.A1" office:value-type="string">
            <text:p text:style-name="P37"/>
          </table:table-cell>
        </table:table-row>
        <table:table-row>
          <table:table-cell table:style-name="Tableau33.A1" office:value-type="string">
            <text:p text:style-name="P36">Répartition de charge</text:p>
          </table:table-cell>
          <table:table-cell table:style-name="Tableau33.A1" office:value-type="string">
            <text:p text:style-name="P36">LoadBalancer CDS</text:p>
          </table:table-cell>
          <table:table-cell table:style-name="Tableau33.A1" office:value-type="string">
            <text:p text:style-name="P36">Service cloud (CDS)</text:p>
          </table:table-cell>
          <table:table-cell table:style-name="Tableau33.A1" office:value-type="string">
            <text:p text:style-name="P37"/>
          </table:table-cell>
        </table:table-row>
        <table:table-row>
          <table:table-cell table:style-name="Tableau33.A1" office:value-type="string">
            <text:p text:style-name="P36">Serveur de certificat de nom de domaine</text:p>
          </table:table-cell>
          <table:table-cell table:style-name="Tableau33.A1" office:value-type="string">
            <text:p text:style-name="P36">PKI DNUM</text:p>
          </table:table-cell>
          <table:table-cell table:style-name="Tableau33.A1" office:value-type="string">
            <text:p text:style-name="P36">Service cloud (CDS)</text:p>
          </table:table-cell>
          <table:table-cell table:style-name="Tableau33.A1" office:value-type="string">
            <text:p text:style-name="P37"/>
          </table:table-cell>
        </table:table-row>
        <table:table-row>
          <table:table-cell table:style-name="Tableau33.A1" office:value-type="string">
            <text:p text:style-name="P36">Analyse anti-virus des téléversements</text:p>
          </table:table-cell>
          <table:table-cell table:style-name="Tableau33.A1" office:value-type="string">
            <text:p text:style-name="P36">ClamAV</text:p>
          </table:table-cell>
          <table:table-cell table:style-name="Tableau33.A1" office:value-type="string">
            <text:p text:style-name="P36">Service cloud (CDS)</text:p>
          </table:table-cell>
          <table:table-cell table:style-name="Tableau33.A1" office:value-type="string">
            <text:p text:style-name="P37"/>
          </table:table-cell>
        </table:table-row>
        <table:table-row>
          <table:table-cell table:style-name="Tableau33.A1" office:value-type="string">
            <text:p text:style-name="P36">Synchronisation d’horloge</text:p>
          </table:table-cell>
          <table:table-cell table:style-name="Tableau33.A1" office:value-type="string">
            <text:p text:style-name="P36">Serveur NTP</text:p>
          </table:table-cell>
          <table:table-cell table:style-name="Tableau33.A1" office:value-type="string">
            <text:p text:style-name="P36">Service cloud</text:p>
          </table:table-cell>
          <table:table-cell table:style-name="Tableau33.A1" office:value-type="string">
            <text:p text:style-name="P37"/>
          </table:table-cell>
        </table:table-row>
        <table:table-row>
          <table:table-cell table:style-name="Tableau33.A1" office:value-type="string">
            <text:p text:style-name="P36">DNS interne</text:p>
          </table:table-cell>
          <table:table-cell table:style-name="Tableau33.A1" office:value-type="string">
            <text:p text:style-name="P36">Dezignet</text:p>
          </table:table-cell>
          <table:table-cell table:style-name="Tableau33.A1" office:value-type="string">
            <text:p text:style-name="P36">Service cloud</text:p>
          </table:table-cell>
          <table:table-cell table:style-name="Tableau33.A1" office:value-type="string">
            <text:p text:style-name="P37"/>
          </table:table-cell>
        </table:table-row>
        <table:table-row>
          <table:table-cell table:style-name="Tableau33.A1" office:value-type="string">
            <text:p text:style-name="P36">Stockage block</text:p>
          </table:table-cell>
          <table:table-cell table:style-name="Tableau33.A1" office:value-type="string">
            <text:p text:style-name="P36">Cinder</text:p>
          </table:table-cell>
          <table:table-cell table:style-name="Tableau33.A1" office:value-type="string">
            <text:p text:style-name="P36">Service cloud</text:p>
          </table:table-cell>
          <table:table-cell table:style-name="Tableau33.A1" office:value-type="string">
            <text:p text:style-name="P37"/>
          </table:table-cell>
        </table:table-row>
        <table:table-row>
          <table:table-cell table:style-name="Tableau33.A1" office:value-type="string">
            <text:p text:style-name="P36">Stockage objet simple</text:p>
          </table:table-cell>
          <table:table-cell table:style-name="Tableau33.A1" office:value-type="string">
            <text:p text:style-name="P36">SWIFT-CEPH</text:p>
          </table:table-cell>
          <table:table-cell table:style-name="Tableau33.A1" office:value-type="string">
            <text:p text:style-name="P36">Service cloud</text:p>
          </table:table-cell>
          <table:table-cell table:style-name="Tableau33.A1" office:value-type="string">
            <text:p text:style-name="P37"/>
          </table:table-cell>
        </table:table-row>
        <table:table-row>
          <table:table-cell table:style-name="Tableau33.A1" office:value-type="string">
            <text:p text:style-name="P36">Stockage objet inter-régions</text:p>
          </table:table-cell>
          <table:table-cell table:style-name="Tableau33.A1" office:value-type="string">
            <text:p text:style-name="P36">SWIFT-S3</text:p>
          </table:table-cell>
          <table:table-cell table:style-name="Tableau33.A1" office:value-type="string">
            <text:p text:style-name="P36">Service cloud</text:p>
          </table:table-cell>
          <table:table-cell table:style-name="Tableau33.A1" office:value-type="string">
            <text:p text:style-name="P37"/>
          </table:table-cell>
        </table:table-row>
        <table:table-row>
          <table:table-cell table:style-name="Tableau33.A1" office:value-type="string">
            <text:p text:style-name="P36">Sauvegarde</text:p>
          </table:table-cell>
          <table:table-cell table:style-name="Tableau33.A1" office:value-type="string">
            <text:p text:style-name="P36">Netbackup</text:p>
          </table:table-cell>
          <table:table-cell table:style-name="Tableau33.A1" office:value-type="string">
            <text:p text:style-name="P36">Service cloud</text:p>
          </table:table-cell>
          <table:table-cell table:style-name="Tableau33.A1" office:value-type="string">
            <text:p text:style-name="P37"/>
          </table:table-cell>
        </table:table-row>
      </table:table>
      <text:p text:style-name="Normal"/>
      <text:h text:style-name="Heading_20_2" text:outline-level="2"><text:bookmark-start text:name="__RefHeading___Toc9926_1783990655"/><text:s/><text:bookmark-start text:name="_Toc177568954"/><text:bookmark-start text:name="_Toc177652133"/><text:bookmark-start text:name="_Toc177652597"/><text:bookmark-start text:name="_Toc177660718"/>SSO – Passage2<text:bookmark-end text:name="__RefHeading___Toc9926_1783990655"/><text:bookmark-end text:name="_Toc177568954"/><text:bookmark-end text:name="_Toc177652133"/><text:bookmark-end text:name="_Toc177652597"/><text:bookmark-end text:name="_Toc177660718"/></text:h>
      <text:p text:style-name="first-paragraph">Passage2 est le SSO permettant aux agents du Ministère de l’Intérieur de se connecter de façon sécurisée.</text:p>
      <text:p text:style-name="western">Le système d’authentification de Passage2 est basé sur <text:a xlink:type="simple" xlink:href="https://fr.wikipedia.org/wiki/OpenID_Connect" office:target-frame-name="_top" xlink:show="replace" text:style-name="Internet_20_link" text:visited-style-name="Visited_20_Internet_20_Link"><text:span text:style-name="Lien_20_hypertexte"><text:span text:style-name="T3">Open ID Connect</text:span></text:span></text:a> qui lui même utilise <text:a xlink:type="simple" xlink:href="https://fr.wikipedia.org/wiki/OAuth" office:target-frame-name="_top" xlink:show="replace" text:style-name="Internet_20_link" text:visited-style-name="Visited_20_Internet_20_Link"><text:span text:style-name="Lien_20_hypertexte"><text:span text:style-name="T3">OAuth2</text:span></text:span></text:a></text:p>
      <text:p text:style-name="Normal"/>
      <text:p text:style-name="Normal"><text:span text:style-name="Police_20_par_20_défaut"><text:span text:style-name="T1"><draw:frame draw:style-name="fr2" draw:name="Image 6" text:anchor-type="as-char" svg:y="0cm" svg:width="17.246cm" style:rel-width="scale" svg:height="8.438cm" style:rel-height="scale" draw:z-index="4"><draw:image xlink:href="Pictures/1000000100000522000002836FC8437E.png" xlink:type="simple" xlink:show="embed" xlink:actuate="onLoad" draw:mime-type="image/png"/></draw:frame></text:span></text:span></text:p>
      <text:p text:style-name="P9"><text:soft-page-break/>Diagramme des échanges</text:p>
      <table:table table:name="Tableau34" table:style-name="Tableau34">
        <table:table-column table:style-name="Tableau34.A"/>
        <table:table-column table:style-name="Tableau34.B" table:number-columns-repeated="2"/>
        <table:table-row>
          <table:table-cell table:style-name="Tableau34.A1" office:value-type="string">
            <text:p text:style-name="P35">Minint</text:p>
          </table:table-cell>
          <table:table-cell table:style-name="Tableau34.A1" office:value-type="string">
            <text:p text:style-name="P35">RIE</text:p>
          </table:table-cell>
          <table:table-cell table:style-name="Tableau34.A1" office:value-type="string">
            <text:p text:style-name="P35">Internet</text:p>
          </table:table-cell>
        </table:table-row>
        <table:table-row>
          <table:table-cell table:style-name="Tableau34.A1" office:value-type="string">
            <text:p text:style-name="P36">Oui</text:p>
          </table:table-cell>
          <table:table-cell table:style-name="Tableau34.A1" office:value-type="string">
            <text:p text:style-name="P36">Oui</text:p>
          </table:table-cell>
          <table:table-cell table:style-name="Tableau34.A1" office:value-type="string">
            <text:p text:style-name="P36">Non</text:p>
          </table:table-cell>
        </table:table-row>
      </table:table>
      <text:p text:style-name="Normal"/>
      <text:p text:style-name="P55"><text:span text:style-name="Police_20_par_20_défaut"><text:span text:style-name="T14">Options implémentées</text:span></text:span></text:p>
      <table:table table:name="Tableau35" table:style-name="Tableau35">
        <table:table-column table:style-name="Tableau35.A"/>
        <table:table-column table:style-name="Tableau35.B" table:number-columns-repeated="2"/>
        <table:table-row>
          <table:table-cell table:style-name="Tableau35.A1" office:value-type="string">
            <text:p text:style-name="Sans_20_interligne">Protocole</text:p>
          </table:table-cell>
          <table:table-cell table:style-name="Tableau35.A1" office:value-type="string">
            <text:p text:style-name="Sans_20_interligne">OIDC<text:line-break/>SAMLv2</text:p>
          </table:table-cell>
          <table:table-cell table:style-name="Tableau35.A1" office:value-type="string">
            <text:p text:style-name="Sans_20_interligne"/>
          </table:table-cell>
        </table:table-row>
        <table:table-row>
          <table:table-cell table:style-name="Tableau35.A1" office:value-type="string">
            <text:p text:style-name="Sans_20_interligne">Alimentation</text:p>
          </table:table-cell>
          <table:table-cell table:style-name="Tableau35.A1" office:value-type="string">
            <text:p text:style-name="Sans_20_interligne">Au fil de l’eau<text:line-break/>Manuelle par fichier CSV<text:line-break/>Automatique par fichier CSV</text:p>
          </table:table-cell>
          <table:table-cell table:style-name="Tableau35.A1" office:value-type="string">
            <text:p text:style-name="Sans_20_interligne"/>
          </table:table-cell>
        </table:table-row>
        <table:table-row>
          <table:table-cell table:style-name="Tableau35.A1" office:value-type="string">
            <text:p text:style-name="Sans_20_interligne">Authentification par login + mot de passe</text:p>
          </table:table-cell>
          <table:table-cell table:style-name="Tableau35.A1" office:value-type="string">
            <text:p text:style-name="Sans_20_interligne">Oui / Non</text:p>
          </table:table-cell>
          <table:table-cell table:style-name="Tableau35.A1" office:value-type="string">
            <text:p text:style-name="Sans_20_interligne">[ périmètre ]</text:p>
          </table:table-cell>
        </table:table-row>
        <table:table-row>
          <table:table-cell table:style-name="Tableau35.A1" office:value-type="string">
            <text:p text:style-name="Sans_20_interligne">Authentification par carte agent</text:p>
          </table:table-cell>
          <table:table-cell table:style-name="Tableau35.A1" office:value-type="string">
            <text:p text:style-name="Sans_20_interligne">Oui / Non</text:p>
          </table:table-cell>
          <table:table-cell table:style-name="Tableau35.A1" office:value-type="string">
            <text:p text:style-name="Sans_20_interligne">[ périmètre ]</text:p>
          </table:table-cell>
        </table:table-row>
        <table:table-row>
          <table:table-cell table:style-name="Tableau35.A1" office:value-type="string">
            <text:p text:style-name="Sans_20_interligne">Utilisation de GDRolex</text:p>
          </table:table-cell>
          <table:table-cell table:style-name="Tableau35.A1" office:value-type="string">
            <text:p text:style-name="Sans_20_interligne">Oui / Non</text:p>
          </table:table-cell>
          <table:table-cell table:style-name="Tableau35.A1" office:value-type="string">
            <text:p text:style-name="Sans_20_interligne"/>
          </table:table-cell>
        </table:table-row>
      </table:table>
      <text:p text:style-name="Normal"/>
      <text:p text:style-name="P55"><text:span text:style-name="Police_20_par_20_défaut"><text:span text:style-name="T14">Données du profil utilisateur</text:span></text:span></text:p>
      <table:table table:name="Tableau36" table:style-name="Tableau36">
        <table:table-column table:style-name="Tableau36.A" table:number-columns-repeated="2"/>
        <table:table-row>
          <table:table-cell table:style-name="Tableau36.A1" office:value-type="string">
            <text:p text:style-name="Sans_20_interligne">uid</text:p>
          </table:table-cell>
          <table:table-cell table:style-name="Tableau36.A1" office:value-type="string">
            <text:p text:style-name="Sans_20_interligne">RIO</text:p>
          </table:table-cell>
        </table:table-row>
        <table:table-row>
          <table:table-cell table:style-name="Tableau36.A1" office:value-type="string">
            <text:p text:style-name="Sans_20_interligne">displayname</text:p>
          </table:table-cell>
          <table:table-cell table:style-name="Tableau36.A1" office:value-type="string">
            <text:p text:style-name="Sans_20_interligne">Prénom et nom de l’agent</text:p>
          </table:table-cell>
        </table:table-row>
        <table:table-row>
          <table:table-cell table:style-name="Tableau36.A1" office:value-type="string">
            <text:p text:style-name="Sans_20_interligne">Auth-Mode</text:p>
          </table:table-cell>
          <table:table-cell table:style-name="Tableau36.A1" office:value-type="string">
            <text:p text:style-name="Sans_20_interligne">Mode d’authentification (Carte ou LDAP)</text:p>
          </table:table-cell>
        </table:table-row>
        <table:table-row>
          <table:table-cell table:style-name="Tableau36.A1" office:value-type="string">
            <text:p text:style-name="Sans_20_interligne">mail</text:p>
          </table:table-cell>
          <table:table-cell table:style-name="Tableau36.A1" office:value-type="string">
            <text:p text:style-name="Sans_20_interligne">E-mail de l’agent</text:p>
          </table:table-cell>
        </table:table-row>
        <table:table-row>
          <table:table-cell table:style-name="Tableau36.A1" office:value-type="string">
            <text:p text:style-name="Sans_20_interligne">libelle_long</text:p>
          </table:table-cell>
          <table:table-cell table:style-name="Tableau36.A1" office:value-type="string">
            <text:p text:style-name="Sans_20_interligne">Libellé long du département de l’agent</text:p>
          </table:table-cell>
        </table:table-row>
        <table:table-row>
          <table:table-cell table:style-name="Tableau36.A1" office:value-type="string">
            <text:p text:style-name="Sans_20_interligne">sn</text:p>
          </table:table-cell>
          <table:table-cell table:style-name="Tableau36.A1" office:value-type="string">
            <text:p text:style-name="Sans_20_interligne">Nom de famille</text:p>
          </table:table-cell>
        </table:table-row>
        <table:table-row>
          <table:table-cell table:style-name="Tableau36.A1" office:value-type="string">
            <text:p text:style-name="Sans_20_interligne">premierPrenom</text:p>
          </table:table-cell>
          <table:table-cell table:style-name="Tableau36.A1" office:value-type="string">
            <text:p text:style-name="Sans_20_interligne">Premier prénom</text:p>
          </table:table-cell>
        </table:table-row>
        <table:table-row>
          <table:table-cell table:style-name="Tableau36.A1" office:value-type="string">
            <text:p text:style-name="Sans_20_interligne">departmentNumber</text:p>
          </table:table-cell>
          <table:table-cell table:style-name="Tableau36.A1" office:value-type="string">
            <text:p text:style-name="Sans_20_interligne">Département de l’agent</text:p>
          </table:table-cell>
        </table:table-row>
        <table:table-row table:style-name="Tableau36.9">
          <table:table-cell table:style-name="Tableau36.A1" office:value-type="string">
            <text:p text:style-name="Sans_20_interligne">Auth-Role</text:p>
          </table:table-cell>
          <table:table-cell table:style-name="Tableau36.A1" office:value-type="string">
            <text:p text:style-name="Sans_20_interligne">Rôle de l’agent au sein de l’application</text:p>
          </table:table-cell>
        </table:table-row>
      </table:table>
      <text:p text:style-name="Normal"/>
      <text:h text:style-name="Heading_20_2" text:outline-level="2"><text:bookmark-start text:name="_Toc177660719"/><text:bookmark-start text:name="_Toc177652598"/><text:bookmark-start text:name="_Toc177652134"/><text:bookmark-start text:name="__RefHeading___Toc9928_1783990655"/><text:bookmark-start text:name="_Toc177568955"/>France Connect<text:bookmark-end text:name="_Toc177660719"/><text:bookmark-end text:name="_Toc177652598"/><text:bookmark-end text:name="_Toc177652134"/><text:bookmark-end text:name="__RefHeading___Toc9928_1783990655"/><text:bookmark-end text:name="_Toc177568955"/></text:h>
      <text:p text:style-name="P11">FranceConnect est le SSO de l’état permettant aux citoyens de se connecter de façon sécurisée.</text:p>
      <text:p text:style-name="P9">Disponibilité de FranceConnect sur les différents réseaux d’accès :</text:p>
      <text:p text:style-name="P55"><text:span text:style-name="Police_20_par_20_défaut"><text:span text:style-name="T14">Disponibilité sur les réseaux d’accès</text:span></text:span></text:p>
      <table:table table:name="Tableau37" table:style-name="Tableau37">
        <table:table-column table:style-name="Tableau37.A"/>
        <table:table-column table:style-name="Tableau37.B" table:number-columns-repeated="2"/>
        <table:table-row>
          <table:table-cell table:style-name="Tableau37.A1" office:value-type="string">
            <text:p text:style-name="P35">Minint</text:p>
          </table:table-cell>
          <table:table-cell table:style-name="Tableau37.A1" office:value-type="string">
            <text:p text:style-name="P35">RIE</text:p>
          </table:table-cell>
          <table:table-cell table:style-name="Tableau37.A1" office:value-type="string">
            <text:p text:style-name="P35">Internet</text:p>
          </table:table-cell>
        </table:table-row>
        <table:table-row>
          <table:table-cell table:style-name="Tableau37.A1" office:value-type="string">
            <text:p text:style-name="P36">non</text:p>
          </table:table-cell>
          <table:table-cell table:style-name="Tableau37.A1" office:value-type="string">
            <text:p text:style-name="P36">oui</text:p>
          </table:table-cell>
          <table:table-cell table:style-name="Tableau37.A1" office:value-type="string">
            <text:p text:style-name="P36">oui</text:p>
          </table:table-cell>
        </table:table-row>
      </table:table>
      <text:p text:style-name="Normal"/>
      <text:p text:style-name="first-paragraph">Le système d’authentification de FranceConnect est basé sur <text:a xlink:type="simple" xlink:href="https://fr.wikipedia.org/wiki/OpenID_Connect" office:target-frame-name="_top" xlink:show="replace" text:style-name="Internet_20_link" text:visited-style-name="Visited_20_Internet_20_Link"><text:span text:style-name="Lien_20_hypertexte"><text:span text:style-name="T7">Open</text:span></text:span><text:bookmark-start text:name="_Hlt177551086"/><text:bookmark-start text:name="_Hlt177551087"/><text:span text:style-name="Lien_20_hypertexte"><text:span text:style-name="T7"> </text:span></text:span><text:bookmark-end text:name="_Hlt177551086"/><text:bookmark-end text:name="_Hlt177551087"/><text:span text:style-name="Lien_20_hypertexte"><text:span text:style-name="T7">ID Connect</text:span></text:span></text:a> qui lui-même utilise <text:a xlink:type="simple" xlink:href="https://fr.wikipedia.org/wiki/OAuth" office:target-frame-name="_top" xlink:show="replace" text:style-name="Internet_20_link" text:visited-style-name="Visited_20_Internet_20_Link"><text:span text:style-name="Lien_20_hypertexte"><text:span text:style-name="T7">OAuth</text:span></text:span><text:bookmark-start text:name="_Hlt177551097"/><text:bookmark-start text:name="_Hlt177551098"/><text:span text:style-name="Lien_20_hypertexte"><text:span text:style-name="T7">2</text:span></text:span></text:a><text:bookmark-end text:name="_Hlt177551097"/><text:bookmark-end text:name="_Hlt177551098"/>.</text:p>
      <text:p text:style-name="western">Pour la documentation d’intégration, consulter :</text:p>
      <text:p text:style-name="western"><text:a xlink:type="simple" xlink:href="https://docs.partenaires.franceconnect.gouv.fr/" office:target-frame-name="_top" xlink:show="replace" text:style-name="Internet_20_link" text:visited-style-name="Visited_20_Internet_20_Link"><text:span text:style-name="Lien_20_hypertexte">https://docs.partenaires.franceconnect.gou</text:span><text:bookmark-start text:name="_Hlt177551183"/><text:span text:style-name="Lien_20_hypertexte">v</text:span><text:bookmark-end text:name="_Hlt177551183"/><text:span text:style-name="Lien_20_hypertexte">.fr/</text:span></text:a></text:p>
      <text:p text:style-name="western"/>
      <text:h text:style-name="Heading_20_2" text:outline-level="2"><text:bookmark-start text:name="__RefHeading___Toc9930_1783990655"/><text:span text:style-name="T96">Pro</text:span><text:bookmark-start text:name="_Toc177660720"/><text:bookmark-start text:name="_Toc177652599"/><text:bookmark-start text:name="_Toc177652135"/><text:bookmark-start text:name="_Toc177568956"/>Connect<text:bookmark-end text:name="__RefHeading___Toc9930_1783990655"/><text:bookmark-end text:name="_Toc177660720"/><text:bookmark-end text:name="_Toc177652599"/><text:bookmark-end text:name="_Toc177652135"/><text:bookmark-end text:name="_Toc177568956"/></text:h>
      <text:p text:style-name="Normal"><text:span text:style-name="T97">Pro</text:span>Connect est le SSO interministériel permettant aux agents des différents ministères de se connecter de façon sécurisée.</text:p>
      <text:p text:style-name="Normal">Il offre deux niveau d’authentification :</text:p>
      <text:list text:style-name="L7">
        <text:list-item>
          <text:p text:style-name="P143">par login, mot de passe</text:p>
        </text:list-item>
        <text:list-item>
          <text:p text:style-name="P143"><text:soft-page-break/>par login, mot de passe + carte agent</text:p>
        </text:list-item>
      </text:list>
      <text:p text:style-name="P55"><text:span text:style-name="Police_20_par_20_défaut"><text:span text:style-name="T14">Disponibilité sur les réseaux d’accès</text:span></text:span></text:p>
      <table:table table:name="Tableau38" table:style-name="Tableau38">
        <table:table-column table:style-name="Tableau38.A"/>
        <table:table-column table:style-name="Tableau38.B" table:number-columns-repeated="2"/>
        <table:table-row>
          <table:table-cell table:style-name="Tableau38.A1" office:value-type="string">
            <text:p text:style-name="P35">Minint</text:p>
          </table:table-cell>
          <table:table-cell table:style-name="Tableau38.A1" office:value-type="string">
            <text:p text:style-name="P35">RIE</text:p>
          </table:table-cell>
          <table:table-cell table:style-name="Tableau38.A1" office:value-type="string">
            <text:p text:style-name="P35">Internet</text:p>
          </table:table-cell>
        </table:table-row>
        <table:table-row>
          <table:table-cell table:style-name="Tableau38.A1" office:value-type="string">
            <text:p text:style-name="P36">non</text:p>
          </table:table-cell>
          <table:table-cell table:style-name="Tableau38.A1" office:value-type="string">
            <text:p text:style-name="P36">oui</text:p>
          </table:table-cell>
          <table:table-cell table:style-name="Tableau38.A1" office:value-type="string">
            <text:p text:style-name="P36">oui</text:p>
          </table:table-cell>
        </table:table-row>
      </table:table>
      <text:p text:style-name="Normal"/>
      <text:p text:style-name="Normal">Le système d’authentification de FranceConnect est basé sur <text:a xlink:type="simple" xlink:href="https://fr.wikipedia.org/wiki/OpenID_Connect" office:target-frame-name="_top" xlink:show="replace" text:style-name="Internet_20_link" text:visited-style-name="Visited_20_Internet_20_Link"><text:span text:style-name="Lien_20_hypertexte"><text:span text:style-name="T7">Open ID Connect</text:span></text:span></text:a> qui lui même utilise <text:a xlink:type="simple" xlink:href="https://fr.wikipedia.org/wiki/OAuth" office:target-frame-name="_top" xlink:show="replace" text:style-name="Internet_20_link" text:visited-style-name="Visited_20_Internet_20_Link"><text:span text:style-name="Lien_20_hypertexte"><text:span text:style-name="T7">OAuth2</text:span></text:span></text:a>.</text:p>
      <text:p text:style-name="Normal">Pour les détails d’intégration, consulter :<text:line-break/>Le système d’authentification de FranceConnect est basé sur <text:a xlink:type="simple" xlink:href="https://fr.wikipedia.org/wiki/OpenID_Connect" office:target-frame-name="_top" xlink:show="replace" text:style-name="Internet_20_link" text:visited-style-name="Visited_20_Internet_20_Link"><text:span text:style-name="Lien_20_hypertexte"><text:span text:style-name="T7">Open ID Connect</text:span></text:span></text:a> qui lui même utilise <text:a xlink:type="simple" xlink:href="https://fr.wikipedia.org/wiki/OAuth" office:target-frame-name="_top" xlink:show="replace" text:style-name="Internet_20_link" text:visited-style-name="Visited_20_Internet_20_Link"><text:span text:style-name="Lien_20_hypertexte"><text:span text:style-name="T7">OAuth2</text:span></text:span></text:a>.</text:p>
      <text:p text:style-name="Normal">Pour les détails d’intégration, consulter :<text:line-break/><text:a xlink:type="simple" xlink:href="https://github.com/france-connect/Documentation-AgentConnect/blob/main/doc-fs.md" office:target-frame-name="_top" xlink:show="replace" text:style-name="Internet_20_link" text:visited-style-name="Visited_20_Internet_20_Link"><text:span text:style-name="Lien_20_hypertexte"><text:span text:style-name="T3">github.com/france-connect/Documentation-AgentConnect/blob/main/doc-fs.md</text:span></text:span></text:a></text:p>
      <text:p text:style-name="Normal"/>
      <text:h text:style-name="Heading_20_2" text:outline-level="2"><text:bookmark-start text:name="_Toc177660721"/><text:bookmark-start text:name="_Toc177652600"/><text:bookmark-start text:name="_Toc177652136"/><text:bookmark-start text:name="__RefHeading___Toc9932_1783990655"/><text:bookmark-start text:name="_Toc177568957"/>Serveur relais d'envoi d'e-mail<text:bookmark-end text:name="_Toc177660721"/><text:bookmark-end text:name="_Toc177652600"/><text:bookmark-end text:name="_Toc177652136"/><text:bookmark-end text:name="__RefHeading___Toc9932_1783990655"/><text:bookmark-end text:name="_Toc177568957"/></text:h>
      <text:p text:style-name="Normal">L’envoi d’email vers l’extérieur se fait par le biais du serveur de relais SMTP ICASSO.<text:line-break/>Ce service est géré par les services transverses de la <text:span text:style-name="T33">SDENTAT</text:span></text:p>
      <text:p text:style-name="Normal"/>
      <text:h text:style-name="Heading_20_2" text:outline-level="2"><text:bookmark-start text:name="_Toc177660722"/><text:bookmark-start text:name="_Toc177652601"/><text:bookmark-start text:name="_Toc177652137"/><text:bookmark-start text:name="__RefHeading___Toc9934_1783990655"/><text:bookmark-start text:name="_Toc177568958"/>Passerelle API<text:bookmark-end text:name="_Toc177660722"/><text:bookmark-end text:name="_Toc177652601"/><text:bookmark-end text:name="_Toc177652137"/><text:bookmark-end text:name="__RefHeading___Toc9934_1783990655"/><text:bookmark-end text:name="_Toc177568958"/></text:h>
      <text:p text:style-name="P107">L<text:span text:style-name="T64">es</text:span> passerelle<text:span text:style-name="T64">s</text:span> API (API Gateway) utilisée<text:span text:style-name="T64">s</text:span> sur le projet est le service transverse <text:span text:style-name="T63">[</text:span>INES-API <text:span text:style-name="T61">ou INES-SE</text:span><text:span text:style-name="T63">]</text:span>.</text:p>
      <text:p text:style-name="P107"><text:line-break/><text:span text:style-name="T62">Ces</text:span> passerelle<text:span text:style-name="T62">s</text:span> <text:span text:style-name="T62">sont</text:span> utilisée<text:span text:style-name="T62">s</text:span> pour les communications inter-applications sous forme d’API sur les réseaux ou la solution est disponible.</text:p>
      <text:p text:style-name="P55"><text:span text:style-name="Police_20_par_20_défaut"><text:span text:style-name="T14">Disponibilité sur les réseaux d’accès</text:span></text:span></text:p>
      <table:table table:name="Tableau39" table:style-name="Tableau39">
        <table:table-column table:style-name="Tableau39.A"/>
        <table:table-column table:style-name="Tableau39.B" table:number-columns-repeated="2"/>
        <table:table-row>
          <table:table-cell table:style-name="Tableau39.A1" office:value-type="string">
            <text:p text:style-name="P35">Minint</text:p>
          </table:table-cell>
          <table:table-cell table:style-name="Tableau39.A1" office:value-type="string">
            <text:p text:style-name="P35">RIE</text:p>
          </table:table-cell>
          <table:table-cell table:style-name="Tableau39.A1" office:value-type="string">
            <text:p text:style-name="P35">Internet</text:p>
          </table:table-cell>
        </table:table-row>
        <table:table-row>
          <table:table-cell table:style-name="Tableau39.A1" office:value-type="string">
            <text:p text:style-name="P36">oui</text:p>
          </table:table-cell>
          <table:table-cell table:style-name="Tableau39.A1" office:value-type="string">
            <text:p text:style-name="P36">oui</text:p>
          </table:table-cell>
          <table:table-cell table:style-name="Tableau39.A1" office:value-type="string">
            <text:p text:style-name="P36">non</text:p>
          </table:table-cell>
        </table:table-row>
      </table:table>
      <text:p text:style-name="P55"><text:span text:style-name="Police_20_par_20_défaut"><text:span text:style-name="T14">Environnements</text:span></text:span></text:p>
      <table:table table:name="Tableau40" table:style-name="Tableau40">
        <table:table-column table:style-name="Tableau40.A"/>
        <table:table-column table:style-name="Tableau40.B" table:number-columns-repeated="2"/>
        <table:table-row>
          <table:table-cell table:style-name="Tableau40.A1" office:value-type="string">
            <text:p text:style-name="Sans_20_interligne"/>
          </table:table-cell>
          <table:table-cell table:style-name="Tableau40.A1" office:value-type="string">
            <text:p text:style-name="Sans_20_interligne">Production</text:p>
          </table:table-cell>
          <table:table-cell table:style-name="Tableau40.A1" office:value-type="string">
            <text:p text:style-name="Sans_20_interligne">Hors Production</text:p>
          </table:table-cell>
        </table:table-row>
        <table:table-row>
          <table:table-cell table:style-name="Tableau40.A1" office:value-type="string">
            <text:p text:style-name="Sans_20_interligne">Minint</text:p>
          </table:table-cell>
          <table:table-cell table:style-name="Tableau40.A1" office:value-type="string">
            <text:p text:style-name="Sans_20_interligne">ines-cds.dsic.minint.fr</text:p>
          </table:table-cell>
          <table:table-cell table:style-name="Tableau40.A1" office:value-type="string">
            <text:p text:style-name="Sans_20_interligne">qualification.ines-cds.dsic.minint.fr</text:p>
          </table:table-cell>
        </table:table-row>
        <table:table-row>
          <table:table-cell table:style-name="Tableau40.A1" office:value-type="string">
            <text:p text:style-name="Sans_20_interligne">RIE</text:p>
          </table:table-cell>
          <table:table-cell table:style-name="Tableau40.A1" office:value-type="string">
            <text:p text:style-name="Sans_20_interligne">ines-cds.dsic.interieur.rie.gouv.fr</text:p>
          </table:table-cell>
          <table:table-cell table:style-name="Tableau40.A1" office:value-type="string">
            <text:p text:style-name="Sans_20_interligne">qualification.ines-cds.dsic.interieur.rie.gouv.fr</text:p>
          </table:table-cell>
        </table:table-row>
      </table:table>
      <text:p text:style-name="Normal"/>
      <text:h text:style-name="Heading_20_2" text:outline-level="2"><text:bookmark-start text:name="_Toc177660723"/><text:bookmark-start text:name="_Toc177652602"/><text:bookmark-start text:name="_Toc177652138"/><text:bookmark-start text:name="__RefHeading___Toc9936_1783990655"/><text:bookmark-start text:name="_Toc177568959"/>INES SAS<text:bookmark-end text:name="_Toc177660723"/><text:bookmark-end text:name="_Toc177652602"/><text:bookmark-end text:name="_Toc177652138"/><text:bookmark-end text:name="__RefHeading___Toc9936_1783990655"/><text:bookmark-end text:name="_Toc177568959"/></text:h>
      <text:p text:style-name="P16">La passerelle de fichiers (File Gateway) utilisée sur le projet est le service transverse INES-SAS. Cette passerelle est utilisée pour toutes les communications inter-applications sous forme de fichier sur les réseaux ou la solution est disponible.</text:p>
      <text:p text:style-name="P16"/>
      <text:p text:style-name="P55"><text:span text:style-name="Police_20_par_20_défaut"><text:span text:style-name="T14">Disponibilité sur les réseaux d’accès</text:span></text:span></text:p>
      <table:table table:name="Tableau41" table:style-name="Tableau41">
        <table:table-column table:style-name="Tableau41.A"/>
        <table:table-column table:style-name="Tableau41.B" table:number-columns-repeated="2"/>
        <table:table-row>
          <table:table-cell table:style-name="Tableau41.A1" office:value-type="string">
            <text:p text:style-name="P35">Minint</text:p>
          </table:table-cell>
          <table:table-cell table:style-name="Tableau41.A1" office:value-type="string">
            <text:p text:style-name="P35">RIE</text:p>
          </table:table-cell>
          <table:table-cell table:style-name="Tableau41.A1" office:value-type="string">
            <text:p text:style-name="P35">Internet</text:p>
          </table:table-cell>
        </table:table-row>
        <table:table-row>
          <table:table-cell table:style-name="Tableau41.A1" office:value-type="string">
            <text:p text:style-name="P36">oui<text:soft-page-break/></text:p>
          </table:table-cell>
          <table:table-cell table:style-name="Tableau41.A1" office:value-type="string">
            <text:p text:style-name="P36">oui</text:p>
          </table:table-cell>
          <table:table-cell table:style-name="Tableau41.A1" office:value-type="string">
            <text:p text:style-name="P36">Non<text:soft-page-break/></text:p>
            <text:p text:style-name="P36"/>
          </table:table-cell>
        </table:table-row>
      </table:table>
      <text:p text:style-name="P55"><text:span text:style-name="Police_20_par_20_défaut"><text:span text:style-name="T14"/></text:span></text:p>
      <text:p text:style-name="P55"><text:span text:style-name="Police_20_par_20_défaut"><text:span text:style-name="T14">Environnements</text:span></text:span></text:p>
      <table:table table:name="Tableau42" table:style-name="Tableau42">
        <table:table-column table:style-name="Tableau42.A"/>
        <table:table-column table:style-name="Tableau42.B" table:number-columns-repeated="2"/>
        <table:table-row>
          <table:table-cell table:style-name="Tableau42.A1" office:value-type="string">
            <text:p text:style-name="P35">Réseau d’accès</text:p>
          </table:table-cell>
          <table:table-cell table:style-name="Tableau42.A1" office:value-type="string">
            <text:p text:style-name="P35">Production</text:p>
          </table:table-cell>
          <table:table-cell table:style-name="Tableau42.A1" office:value-type="string">
            <text:p text:style-name="P35">Hors Production</text:p>
          </table:table-cell>
        </table:table-row>
        <table:table-row>
          <table:table-cell table:style-name="Tableau42.A1" office:value-type="string">
            <text:p text:style-name="P36">Minint</text:p>
          </table:table-cell>
          <table:table-cell table:style-name="Tableau42.A1" office:value-type="string">
            <text:p text:style-name="P36">ines-se-cds.dsic.minint.fr</text:p>
          </table:table-cell>
          <table:table-cell table:style-name="Tableau42.A1" office:value-type="string">
            <text:p text:style-name="P36">qualification.ines-se-cds.dsic.minint.fr</text:p>
          </table:table-cell>
        </table:table-row>
        <table:table-row>
          <table:table-cell table:style-name="Tableau42.A1" office:value-type="string">
            <text:p text:style-name="P36">RIE</text:p>
          </table:table-cell>
          <table:table-cell table:style-name="Tableau42.A1" office:value-type="string">
            <text:p text:style-name="P36">ines-se-cds.dsic.interieur.rie.gouv.fr</text:p>
          </table:table-cell>
          <table:table-cell table:style-name="Tableau42.A1" office:value-type="string">
            <text:p text:style-name="P36">qualification.ines-se-cds.dsic.interieur.rie.gouv.fr</text:p>
          </table:table-cell>
        </table:table-row>
      </table:table>
      <text:p text:style-name="Normal"/>
      <text:h text:style-name="Heading_20_2" text:outline-level="2"><text:bookmark-start text:name="_Toc177660724"/><text:bookmark-start text:name="_Toc177652603"/><text:bookmark-start text:name="_Toc177652139"/><text:bookmark-start text:name="__RefHeading___Toc9938_1783990655"/><text:bookmark-start text:name="_Toc177568960"/>Horodatage<text:bookmark-end text:name="_Toc177660724"/><text:bookmark-end text:name="_Toc177652603"/><text:bookmark-end text:name="_Toc177652139"/><text:bookmark-end text:name="__RefHeading___Toc9938_1783990655"/><text:bookmark-end text:name="_Toc177568960"/></text:h>
      <text:p text:style-name="P87">{ A compléter si nécessaire }</text:p>
      <text:h text:style-name="Heading_20_2" text:outline-level="2"><text:bookmark-start text:name="_Toc177660725"/><text:bookmark-start text:name="_Toc177652604"/><text:bookmark-start text:name="_Toc177652140"/><text:bookmark-start text:name="__RefHeading___Toc9940_1783990655"/><text:bookmark-start text:name="_Toc177568961"/>Signature électronique<text:bookmark-end text:name="_Toc177660725"/><text:bookmark-end text:name="_Toc177652604"/><text:bookmark-end text:name="_Toc177652140"/><text:bookmark-end text:name="__RefHeading___Toc9940_1783990655"/><text:bookmark-end text:name="_Toc177568961"/></text:h>
      <text:p text:style-name="P87">{ A compléter si nécessaire }</text:p>
      <text:p text:style-name="Normal"/>
      <text:p text:style-name="Normal"/>
      <text:h text:style-name="Heading_20_1" text:outline-level="1"><text:bookmark-start text:name="_Toc177660726"/><text:bookmark-start text:name="_Toc177652605"/><text:bookmark-start text:name="_Toc177652141"/><text:bookmark-start text:name="__RefHeading___Toc9942_1783990655"/><text:bookmark-start text:name="_Toc177568962"/>Données<text:bookmark-end text:name="_Toc177660726"/><text:bookmark-end text:name="_Toc177652605"/><text:bookmark-end text:name="_Toc177652141"/><text:bookmark-end text:name="__RefHeading___Toc9942_1783990655"/><text:bookmark-end text:name="_Toc177568962"/></text:h>
      <text:p text:style-name="P72"/>
      <text:h text:style-name="Heading_20_2" text:outline-level="2"><text:bookmark-start text:name="_Toc177660727"/><text:bookmark-start text:name="_Toc177652606"/><text:bookmark-start text:name="_Toc177652142"/><text:bookmark-start text:name="__RefHeading___Toc9944_1783990655"/><text:bookmark-start text:name="_Toc177568963"/>Modèle Conceptuel des Données<text:bookmark-end text:name="_Toc177660727"/><text:bookmark-end text:name="_Toc177652606"/><text:bookmark-end text:name="_Toc177652142"/><text:bookmark-end text:name="__RefHeading___Toc9944_1783990655"/><text:bookmark-end text:name="_Toc177568963"/></text:h>
      <text:p text:style-name="P71"/>
      <text:p text:style-name="Normal"><text:span text:style-name="Police_20_par_20_défaut"><text:span text:style-name="T1"><draw:frame draw:style-name="fr2" draw:name="Image 7" text:anchor-type="as-char" svg:y="0cm" svg:width="16.025cm" style:rel-width="scale" svg:height="6.16cm" style:rel-height="scale" draw:z-index="5"><draw:image xlink:href="Pictures/100000000000050D000001F17B112235.png" xlink:type="simple" xlink:show="embed" xlink:actuate="onLoad" draw:mime-type="image/png"/></draw:frame></text:span></text:span></text:p>
      <text:p text:style-name="Normal"/>
      <text:h text:style-name="Heading_20_2" text:outline-level="2"><text:bookmark-start text:name="_Toc177660728"/><text:bookmark-start text:name="_Toc177652607"/><text:bookmark-start text:name="_Toc177652143"/><text:bookmark-start text:name="__RefHeading___Toc9946_1783990655"/><text:bookmark-start text:name="_Toc177568964"/>Modèle Logique des Données<text:bookmark-end text:name="_Toc177660728"/><text:bookmark-end text:name="_Toc177652607"/><text:bookmark-end text:name="_Toc177652143"/><text:bookmark-end text:name="__RefHeading___Toc9946_1783990655"/><text:bookmark-end text:name="_Toc177568964"/></text:h>
      <text:p text:style-name="P72"/>
      <text:p text:style-name="Normal"><text:soft-page-break/><text:span text:style-name="Police_20_par_20_défaut"><text:span text:style-name="T1"><draw:frame draw:style-name="fr2" draw:name="Image 8" text:anchor-type="as-char" svg:y="0cm" svg:width="16.145cm" style:rel-width="scale" svg:height="6.205cm" style:rel-height="scale" draw:z-index="6"><draw:image xlink:href="Pictures/100000000000050D000001F17B112235.png" xlink:type="simple" xlink:show="embed" xlink:actuate="onLoad" draw:mime-type="image/png"/></draw:frame></text:span></text:span></text:p>
      <text:p text:style-name="Normal"/>
      <text:h text:style-name="Heading_20_2" text:outline-level="2"><text:bookmark-start text:name="_Toc177660729"/><text:bookmark-start text:name="_Toc177652608"/><text:bookmark-start text:name="_Toc177652144"/><text:bookmark-start text:name="__RefHeading___Toc9948_1783990655"/><text:bookmark-start text:name="_Toc177568965"/>Modèle Physique des Données<text:bookmark-end text:name="_Toc177660729"/><text:bookmark-end text:name="_Toc177652608"/><text:bookmark-end text:name="_Toc177652144"/><text:bookmark-end text:name="__RefHeading___Toc9948_1783990655"/><text:bookmark-end text:name="_Toc177568965"/></text:h>
      <text:p text:style-name="P72"/>
      <text:p text:style-name="Normal"><text:span text:style-name="Police_20_par_20_défaut"><text:span text:style-name="T1"><draw:frame draw:style-name="fr2" draw:name="Image 9" text:anchor-type="as-char" svg:y="0cm" svg:width="16.369cm" style:rel-width="scale" svg:height="9.53cm" style:rel-height="scale" draw:z-index="7"><draw:image xlink:href="Pictures/1000000000000A7B0000061ACC8D3189.png" xlink:type="simple" xlink:show="embed" xlink:actuate="onLoad" draw:mime-type="image/png"/></draw:frame></text:span></text:span></text:p>
      <text:p text:style-name="Normal"/>
      <text:h text:style-name="Heading_20_2" text:outline-level="2"><text:bookmark-start text:name="_Toc177660735"/><text:bookmark-start text:name="_Toc177652614"/><text:bookmark-start text:name="_Toc177652150"/><text:bookmark-start text:name="__RefHeading___Toc9960_1783990655"/><text:bookmark-start text:name="_Toc177568971"/>Volume des bases de données<text:bookmark-end text:name="_Toc177660735"/><text:bookmark-end text:name="_Toc177652614"/><text:bookmark-end text:name="_Toc177652150"/><text:bookmark-end text:name="__RefHeading___Toc9960_1783990655"/><text:bookmark-end text:name="_Toc177568971"/></text:h>
      <table:table table:name="Tableau44" table:style-name="Tableau44">
        <table:table-column table:style-name="Tableau44.A"/>
        <table:table-column table:style-name="Tableau44.B" table:number-columns-repeated="2"/>
        <table:table-row>
          <table:table-cell table:style-name="Tableau44.A1" office:value-type="string">
            <text:p text:style-name="western1">Schéma</text:p>
          </table:table-cell>
          <table:table-cell table:style-name="Tableau44.A1" office:value-type="string">
            <text:p text:style-name="western1">Volume Initial</text:p>
          </table:table-cell>
          <table:table-cell table:style-name="Tableau44.A1" office:value-type="string">
            <text:p text:style-name="western1">Volume incrémental</text:p>
          </table:table-cell>
        </table:table-row>
        <table:table-row>
          <table:table-cell table:style-name="Tableau44.A1" office:value-type="string">
            <text:p text:style-name="P73"/>
          </table:table-cell>
          <table:table-cell table:style-name="Tableau44.A1" office:value-type="string">
            <text:p text:style-name="western2">XX [Mo, Go]</text:p>
          </table:table-cell>
          <table:table-cell table:style-name="Tableau44.A1" office:value-type="string">
            <text:p text:style-name="western2">XX / [ semaine, mois, année ]</text:p>
          </table:table-cell>
        </table:table-row>
      </table:table>
      <text:p text:style-name="Normal"/>
      <text:h text:style-name="Heading_20_2" text:outline-level="2"><text:bookmark-start text:name="__RefHeading___Toc9962_1783990655"/><text:s/><text:bookmark-start text:name="_Toc177568972"/><text:bookmark-start text:name="_Toc177652151"/><text:bookmark-start text:name="_Toc177652615"/><text:bookmark-start text:name="_Toc177660736"/>Migration des données<text:bookmark-end text:name="__RefHeading___Toc9962_1783990655"/><text:bookmark-end text:name="_Toc177568972"/><text:bookmark-end text:name="_Toc177652151"/><text:bookmark-end text:name="_Toc177652615"/><text:bookmark-end text:name="_Toc177660736"/></text:h>
      <text:p text:style-name="P21"><text:span text:style-name="Police_20_par_20_défaut"><text:span text:style-name="T24">Contexte</text:span></text:span></text:p>
      <table:table table:name="Tableau45" table:style-name="Tableau45">
        <table:table-column table:style-name="Tableau45.A" table:number-columns-repeated="2"/>
        <table:table-row>
          <table:table-cell table:style-name="Tableau45.A1" office:value-type="string">
            <text:p text:style-name="Sans_20_interligne">option de mise en maintenance de l’application</text:p>
          </table:table-cell>
          <table:table-cell table:style-name="Tableau45.A1" office:value-type="string">
            <text:p text:style-name="Sans_20_interligne">oui</text:p>
          </table:table-cell>
        </table:table-row>
        <table:table-row>
          <table:table-cell table:style-name="Tableau45.A1" office:value-type="string">
            <text:p text:style-name="Sans_20_interligne">sauvegarde pré-migration</text:p>
          </table:table-cell>
          <table:table-cell table:style-name="Tableau45.A1" office:value-type="string">
            <text:p text:style-name="Sans_20_interligne">non</text:p>
          </table:table-cell>
        </table:table-row>
        <table:table-row>
          <table:table-cell table:style-name="Tableau45.A1" office:value-type="string">
            <text:p text:style-name="Sans_20_interligne">scripts ascendant</text:p>
          </table:table-cell>
          <table:table-cell table:style-name="Tableau45.A1" office:value-type="string">
            <text:p text:style-name="Sans_20_interligne">oui</text:p>
          </table:table-cell>
        </table:table-row>
        <table:table-row>
          <table:table-cell table:style-name="Tableau45.A1" office:value-type="string">
            <text:p text:style-name="Sans_20_interligne">scripts descendant</text:p>
          </table:table-cell>
          <table:table-cell table:style-name="Tableau45.A1" office:value-type="string">
            <text:p text:style-name="Sans_20_interligne">oui</text:p>
          </table:table-cell>
        </table:table-row>
        <text:soft-page-break/>
        <table:table-row>
          <table:table-cell table:style-name="Tableau45.A1" office:value-type="string">
            <text:p text:style-name="Sans_20_interligne">outil de migration</text:p>
          </table:table-cell>
          <table:table-cell table:style-name="Tableau45.A1" office:value-type="string">
            <text:p text:style-name="Sans_20_interligne">Liquibase</text:p>
          </table:table-cell>
        </table:table-row>
        <table:table-row>
          <table:table-cell table:style-name="Tableau45.A1" office:value-type="string">
            <text:p text:style-name="Sans_20_interligne">environnements concernés</text:p>
          </table:table-cell>
          <table:table-cell table:style-name="Tableau45.A1" office:value-type="string">
            <text:p text:style-name="Sans_20_interligne">Production, Formation</text:p>
          </table:table-cell>
        </table:table-row>
        <table:table-row>
          <table:table-cell table:style-name="Tableau45.A1" office:value-type="string">
            <text:p text:style-name="Sans_20_interligne">démarrage des migrations</text:p>
          </table:table-cell>
          <table:table-cell table:style-name="Tableau45.A1" office:value-type="string">
            <text:p text:style-name="Sans_20_interligne">Première mise en service de l’application</text:p>
          </table:table-cell>
        </table:table-row>
      </table:table>
      <text:p text:style-name="Sans_20_interligne"><text:span text:style-name="Police_20_par_20_défaut"><text:span text:style-name="T24">Etapes</text:span></text:span></text:p>
      <table:table table:name="Tableau46" table:style-name="Tableau46">
        <table:table-column table:style-name="Tableau46.A"/>
        <table:table-row>
          <table:table-cell table:style-name="Tableau46.A1" office:value-type="string">
            <text:p text:style-name="Sans_20_interligne">Mise en maintenance de l’application</text:p>
          </table:table-cell>
        </table:table-row>
        <table:table-row>
          <table:table-cell table:style-name="Tableau46.A1" office:value-type="string">
            <text:p text:style-name="Sans_20_interligne">Exécution des scripts SQL de migration ascendant du schéma</text:p>
          </table:table-cell>
        </table:table-row>
        <table:table-row>
          <table:table-cell table:style-name="Tableau46.A1" office:value-type="string">
            <text:p text:style-name="Sans_20_interligne">Import des lots de données</text:p>
          </table:table-cell>
        </table:table-row>
        <table:table-row>
          <table:table-cell table:style-name="Tableau46.A1" office:value-type="string">
            <text:p text:style-name="Sans_20_interligne">Tests</text:p>
          </table:table-cell>
        </table:table-row>
        <table:table-row>
          <table:table-cell table:style-name="Tableau46.A1" office:value-type="string">
            <text:p text:style-name="Sans_20_interligne">Désactivation du mode maintenance de l’application</text:p>
          </table:table-cell>
        </table:table-row>
        <table:table-row>
          <table:table-cell table:style-name="Tableau46.A1" office:value-type="string">
            <text:p text:style-name="Sans_20_interligne"/>
            <text:p text:style-name="Sans_20_interligne"/>
          </table:table-cell>
        </table:table-row>
      </table:table>
      <text:h text:style-name="Heading_20_2" text:outline-level="2"><text:bookmark-start text:name="_Toc177568973"/><text:bookmark-start text:name="_Toc177652152"/><text:bookmark-start text:name="_Toc177652616"/><text:bookmark-start text:name="__RefHeading___Toc9964_1783990655"/><text:bookmark-start text:name="_Toc177660737"/>Reprise des données<text:bookmark-end text:name="_Toc177568973"/><text:bookmark-end text:name="_Toc177652152"/><text:bookmark-end text:name="_Toc177652616"/><text:bookmark-end text:name="__RefHeading___Toc9964_1783990655"/><text:bookmark-end text:name="_Toc177660737"/></text:h>
      <text:p text:style-name="P81">{ A compléter si nécessaire }</text:p>
      <text:p text:style-name="Normal"/>
      <text:h text:style-name="Heading_20_2" text:outline-level="2"><text:bookmark-start text:name="_Toc177568974"/><text:bookmark-start text:name="_Toc177652153"/><text:bookmark-start text:name="_Toc177652617"/><text:bookmark-start text:name="__RefHeading___Toc9966_1783990655"/><text:bookmark-start text:name="_Toc177660738"/>Données anonymisées<text:bookmark-end text:name="_Toc177568974"/><text:bookmark-end text:name="_Toc177652153"/><text:bookmark-end text:name="_Toc177652617"/><text:bookmark-end text:name="__RefHeading___Toc9966_1783990655"/><text:bookmark-end text:name="_Toc177660738"/></text:h>
      <text:p text:style-name="P81">{ A compléter si nécessaire }</text:p>
      <text:p text:style-name="Normal"/>
      <text:h text:style-name="Heading_20_2" text:outline-level="2"><text:bookmark-start text:name="_Toc177568975"/><text:bookmark-start text:name="_Toc177652154"/><text:bookmark-start text:name="_Toc177652618"/><text:bookmark-start text:name="__RefHeading___Toc9968_1783990655"/><text:bookmark-start text:name="_Toc177660739"/>Chiffrement<text:bookmark-end text:name="_Toc177568975"/><text:bookmark-end text:name="_Toc177652154"/><text:bookmark-end text:name="_Toc177652618"/><text:bookmark-end text:name="__RefHeading___Toc9968_1783990655"/><text:bookmark-end text:name="_Toc177660739"/></text:h>
      <text:p text:style-name="P86">{ A compléter si nécessaire }</text:p>
      <text:p text:style-name="Normal"/>
      <text:p text:style-name="P97">{exemple}</text:p>
      <text:p text:style-name="Normal">Le fichier d’import des données doit être chiffré et importé de façon sécurisée dans la base de données. Les clés de sécurité des agents doivent être chiffrées dans la base de données de l’application.</text:p>
      <text:p text:style-name="Normal"/>
      <text:h text:style-name="P131" text:outline-level="2"><text:bookmark-start text:name="_Toc177660730"/><text:bookmark-start text:name="_Toc177652609"/><text:bookmark-start text:name="_Toc177652145"/><text:bookmark-start text:name="_Toc177568966"/><text:bookmark-start text:name="__RefHeading___Toc9950_1783990655"/>API consommées<text:bookmark-end text:name="_Toc177660730"/><text:bookmark-end text:name="_Toc177652609"/><text:bookmark-end text:name="_Toc177652145"/><text:bookmark-end text:name="_Toc177568966"/><text:bookmark-end text:name="__RefHeading___Toc9950_1783990655"/></text:h>
      <text:p text:style-name="P85">{ A compléter si nécessaire }</text:p>
      <text:h text:style-name="P131" text:outline-level="2"><text:bookmark-start text:name="__RefHeading___Toc9952_1783990655"/><text:bookmark-start text:name="_Toc177660731"/><text:bookmark-start text:name="_Toc177652610"/><text:bookmark-start text:name="_Toc177652146"/><text:bookmark-start text:name="_Toc177568967"/>API exposées<text:bookmark-end text:name="__RefHeading___Toc9952_1783990655"/><text:bookmark-end text:name="_Toc177660731"/><text:bookmark-end text:name="_Toc177652610"/><text:bookmark-end text:name="_Toc177652146"/><text:bookmark-end text:name="_Toc177568967"/></text:h>
      <text:p text:style-name="P85">{ A compléter si nécessaire }</text:p>
      <text:h text:style-name="P131" text:outline-level="2"><text:bookmark-start text:name="__RefHeading___Toc9954_1783990655"/><text:bookmark-start text:name="_Toc177660732"/><text:bookmark-start text:name="_Toc177652611"/><text:bookmark-start text:name="_Toc177652147"/><text:bookmark-start text:name="_Toc177568968"/>Fichiers d'import de données<text:bookmark-end text:name="__RefHeading___Toc9954_1783990655"/><text:bookmark-end text:name="_Toc177660732"/><text:bookmark-end text:name="_Toc177652611"/><text:bookmark-end text:name="_Toc177652147"/><text:bookmark-end text:name="_Toc177568968"/></text:h>
      <text:p text:style-name="P85">{ A compléter si nécessaire }</text:p>
      <table:table table:name="Tableau81" table:style-name="Tableau81">
        <table:table-column table:style-name="Tableau81.A" table:number-columns-repeated="2"/>
        <table:table-column table:style-name="Tableau81.C" table:number-columns-repeated="3"/>
        <table:table-row>
          <table:table-cell table:style-name="Tableau81.A1" office:value-type="string">
            <text:p text:style-name="P49">Type de données</text:p>
          </table:table-cell>
          <table:table-cell table:style-name="Tableau81.A1" office:value-type="string">
            <text:p text:style-name="P49">Extension<text:span text:style-name="T73">s</text:span> acceptées</text:p>
          </table:table-cell>
          <table:table-cell table:style-name="Tableau81.A1" office:value-type="string">
            <text:p text:style-name="P49">Taille maximale</text:p>
          </table:table-cell>
          <table:table-cell table:style-name="Tableau81.A1" office:value-type="string">
            <text:p text:style-name="P49">Quantité Initiale</text:p>
          </table:table-cell>
          <table:table-cell table:style-name="Tableau81.A1" office:value-type="string">
            <text:p text:style-name="P49">Quantité Incrémentale</text:p>
          </table:table-cell>
        </table:table-row>
        <table:table-row>
          <table:table-cell table:style-name="Tableau81.A1" office:value-type="string">
            <text:p text:style-name="P50"/>
          </table:table-cell>
          <table:table-cell table:style-name="Tableau81.A1" office:value-type="string">
            <text:p text:style-name="P51">[pdf, docx, xlsx, …]</text:p>
          </table:table-cell>
          <table:table-cell table:style-name="Tableau81.A1" office:value-type="string">
            <text:p text:style-name="P51">XX [Ko, Mo]</text:p>
          </table:table-cell>
          <table:table-cell table:style-name="Tableau81.A1" office:value-type="string">
            <text:p text:style-name="P51">XX</text:p>
          </table:table-cell>
          <table:table-cell table:style-name="Tableau81.A1" office:value-type="string">
            <text:p text:style-name="P51">XX / [ semaine, mois, année ]</text:p>
          </table:table-cell>
        </table:table-row>
      </table:table>
      <text:p text:style-name="P84"/>
      <text:h text:style-name="P131" text:outline-level="2"><text:bookmark-start text:name="__RefHeading___Toc9956_1783990655"/><text:bookmark-start text:name="_Toc177660733"/><text:bookmark-start text:name="_Toc177652612"/><text:bookmark-start text:name="_Toc177652148"/><text:bookmark-start text:name="_Toc177568969"/>Fichiers d'export de données<text:bookmark-end text:name="__RefHeading___Toc9956_1783990655"/><text:bookmark-end text:name="_Toc177660733"/><text:bookmark-end text:name="_Toc177652612"/><text:bookmark-end text:name="_Toc177652148"/><text:bookmark-end text:name="_Toc177568969"/></text:h>
      <text:p text:style-name="P85">{ A compléter si nécessaire }</text:p>
      <table:table table:name="Tableau83" table:style-name="Tableau83">
        <table:table-column table:style-name="Tableau83.A" table:number-columns-repeated="2"/>
        <table:table-column table:style-name="Tableau83.C" table:number-columns-repeated="3"/>
        <text:soft-page-break/>
        <table:table-row>
          <table:table-cell table:style-name="Tableau83.A1" office:value-type="string">
            <text:p text:style-name="P49">Type de données</text:p>
          </table:table-cell>
          <table:table-cell table:style-name="Tableau83.A1" office:value-type="string">
            <text:p text:style-name="P49">Extension<text:span text:style-name="T73">s</text:span> acceptées</text:p>
          </table:table-cell>
          <table:table-cell table:style-name="Tableau83.A1" office:value-type="string">
            <text:p text:style-name="P49">Taille maximale</text:p>
          </table:table-cell>
          <table:table-cell table:style-name="Tableau83.A1" office:value-type="string">
            <text:p text:style-name="P49">Quantité Initiale</text:p>
          </table:table-cell>
          <table:table-cell table:style-name="Tableau83.A1" office:value-type="string">
            <text:p text:style-name="P49">Quantité Incrémentale</text:p>
          </table:table-cell>
        </table:table-row>
        <table:table-row>
          <table:table-cell table:style-name="Tableau83.A1" office:value-type="string">
            <text:p text:style-name="P50"/>
          </table:table-cell>
          <table:table-cell table:style-name="Tableau83.A1" office:value-type="string">
            <text:p text:style-name="P51">[pdf, docx, xlsx, …]</text:p>
          </table:table-cell>
          <table:table-cell table:style-name="Tableau83.A1" office:value-type="string">
            <text:p text:style-name="P51">XX [Ko, Mo]</text:p>
          </table:table-cell>
          <table:table-cell table:style-name="Tableau83.A1" office:value-type="string">
            <text:p text:style-name="P51">XX</text:p>
          </table:table-cell>
          <table:table-cell table:style-name="Tableau83.A1" office:value-type="string">
            <text:p text:style-name="P51">XX / [ semaine, mois, année ]</text:p>
          </table:table-cell>
        </table:table-row>
      </table:table>
      <text:p text:style-name="P84"/>
      <text:p text:style-name="P2"/>
      <text:h text:style-name="Heading_20_1" text:outline-level="1"><text:bookmark-start text:name="_Toc177660740"/><text:bookmark-start text:name="_Toc177652619"/><text:bookmark-start text:name="_Toc177652155"/><text:bookmark-start text:name="__RefHeading___Toc9970_1783990655"/><text:bookmark-start text:name="_Toc177568976"/>Infrastructure<text:bookmark-end text:name="_Toc177660740"/><text:bookmark-end text:name="_Toc177652619"/><text:bookmark-end text:name="_Toc177652155"/><text:bookmark-end text:name="__RefHeading___Toc9970_1783990655"/><text:bookmark-end text:name="_Toc177568976"/></text:h>
      <text:p text:style-name="Normal"/>
      <text:h text:style-name="Heading_20_2" text:outline-level="2"><text:bookmark-start text:name="__RefHeading___Toc9972_1783990655"/><text:bookmark-start text:name="_Toc177568977"/><text:bookmark-start text:name="_Toc177652156"/><text:bookmark-start text:name="_Toc177652620"/><text:bookmark-start text:name="_Toc177660741"/>Environnements<text:bookmark-end text:name="__RefHeading___Toc9972_1783990655"/><text:bookmark-end text:name="_Toc177568977"/><text:bookmark-end text:name="_Toc177652156"/><text:bookmark-end text:name="_Toc177652620"/><text:bookmark-end text:name="_Toc177660741"/></text:h>
      <text:p text:style-name="P96">{exemple de descriptions des environnements}</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35">Environnement</text:p>
          </table:table-cell>
          <table:table-cell table:style-name="Tableau47.A1" office:value-type="string">
            <text:p text:style-name="P35">Région</text:p>
          </table:table-cell>
          <table:table-cell table:style-name="Tableau47.A1" office:value-type="string">
            <text:p text:style-name="P35">Zone</text:p>
          </table:table-cell>
          <table:table-cell table:style-name="Tableau47.A1" office:value-type="string">
            <text:p text:style-name="P48">ID du Tenant /</text:p>
            <text:p text:style-name="P48"><text:span text:style-name="T76">Namespace</text:span><text:span text:style-name="T77">é</text:span><text:span text:style-name="T74"> </text:span><text:span text:style-name="T75">Kubernetes</text:span></text:p>
          </table:table-cell>
          <table:table-cell table:style-name="Tableau47.A1" office:value-type="string">
            <text:p text:style-name="P35">Description</text:p>
          </table:table-cell>
        </table:table-row>
        <table:table-row>
          <table:table-cell table:style-name="Tableau47.A1" office:value-type="string">
            <text:p text:style-name="P36">DEVELOPPEMENT</text:p>
          </table:table-cell>
          <table:table-cell table:style-name="Tableau47.A1" office:value-type="string">
            <text:p text:style-name="P36">R1</text:p>
          </table:table-cell>
          <table:table-cell table:style-name="Tableau47.A1" office:value-type="string">
            <text:p text:style-name="P47">[S1 ou S2]</text:p>
          </table:table-cell>
          <table:table-cell table:style-name="Tableau47.A1" office:value-type="string">
            <text:p text:style-name="P37"/>
          </table:table-cell>
          <table:table-cell table:style-name="Tableau47.A1" office:value-type="string">
            <text:p text:style-name="P36">Développement applicatif (équipe de développement interne)</text:p>
          </table:table-cell>
        </table:table-row>
        <table:table-row>
          <table:table-cell table:style-name="Tableau47.A1" office:value-type="string">
            <text:p text:style-name="P36">INTEGRATION</text:p>
          </table:table-cell>
          <table:table-cell table:style-name="Tableau47.A1" office:value-type="string">
            <text:p text:style-name="P36">R1</text:p>
          </table:table-cell>
          <table:table-cell table:style-name="Tableau47.A1" office:value-type="string">
            <text:p text:style-name="P47">[S1 ou S2]</text:p>
          </table:table-cell>
          <table:table-cell table:style-name="Tableau47.A1" office:value-type="string">
            <text:p text:style-name="P37"/>
          </table:table-cell>
          <table:table-cell table:style-name="Tableau47.A1" office:value-type="string">
            <text:p text:style-name="P36">Développement d’intégration (intégrateur interne)</text:p>
          </table:table-cell>
        </table:table-row>
        <table:table-row>
          <table:table-cell table:style-name="Tableau47.A1" office:value-type="string">
            <text:p text:style-name="P36">INTEGRATION Secours</text:p>
          </table:table-cell>
          <table:table-cell table:style-name="Tableau47.A1" office:value-type="string">
            <text:p text:style-name="P36">R2</text:p>
          </table:table-cell>
          <table:table-cell table:style-name="Tableau47.A1" office:value-type="string">
            <text:p text:style-name="P47">[S1 ou S2]</text:p>
          </table:table-cell>
          <table:table-cell table:style-name="Tableau47.A1" office:value-type="string">
            <text:p text:style-name="P37"/>
          </table:table-cell>
          <table:table-cell table:style-name="Tableau47.A1" office:value-type="string">
            <text:p text:style-name="P36">'’</text:p>
          </table:table-cell>
        </table:table-row>
        <table:table-row>
          <table:table-cell table:style-name="Tableau47.A1" office:value-type="string">
            <text:p text:style-name="P36">QUALIFICATION</text:p>
          </table:table-cell>
          <table:table-cell table:style-name="Tableau47.A1" office:value-type="string">
            <text:p text:style-name="P36">R1</text:p>
          </table:table-cell>
          <table:table-cell table:style-name="Tableau47.A1" office:value-type="string">
            <text:p text:style-name="P36">[<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Validation fonctionnelle (chef de projet)</text:p>
          </table:table-cell>
        </table:table-row>
        <table:table-row>
          <table:table-cell table:style-name="Tableau47.A1" office:value-type="string">
            <text:p text:style-name="P36">QUALIFICATION Secours</text:p>
          </table:table-cell>
          <table:table-cell table:style-name="Tableau47.A1" office:value-type="string">
            <text:p text:style-name="P36">R2</text:p>
          </table:table-cell>
          <table:table-cell table:style-name="Tableau47.A1" office:value-type="string">
            <text:p text:style-name="P44">[<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text:p>
          </table:table-cell>
        </table:table-row>
        <table:table-row>
          <table:table-cell table:style-name="Tableau47.A1" office:value-type="string">
            <text:p text:style-name="P36">METROLOGIE</text:p>
          </table:table-cell>
          <table:table-cell table:style-name="Tableau47.A1" office:value-type="string">
            <text:p text:style-name="P36">R1</text:p>
          </table:table-cell>
          <table:table-cell table:style-name="Tableau47.A1" office:value-type="string">
            <text:p text:style-name="P44">[<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Tests de performance (dévloppeurs ou BPSA)</text:p>
          </table:table-cell>
        </table:table-row>
        <table:table-row>
          <table:table-cell table:style-name="Tableau47.A1" office:value-type="string">
            <text:p text:style-name="P36">PREPRODUCTION</text:p>
          </table:table-cell>
          <table:table-cell table:style-name="Tableau47.A1" office:value-type="string">
            <text:p text:style-name="P36">R1</text:p>
          </table:table-cell>
          <table:table-cell table:style-name="Tableau47.A1" office:value-type="string">
            <text:p text:style-name="P44">[<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Validation client (MOA)</text:p>
          </table:table-cell>
        </table:table-row>
        <table:table-row>
          <table:table-cell table:style-name="Tableau47.A1" office:value-type="string">
            <text:p text:style-name="P36">FORMATION</text:p>
          </table:table-cell>
          <table:table-cell table:style-name="Tableau47.A1" office:value-type="string">
            <text:p text:style-name="P36">R1</text:p>
          </table:table-cell>
          <table:table-cell table:style-name="Tableau47.A1" office:value-type="string">
            <text:p text:style-name="P44">[<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Environnement de formation sur l’application (agent, administration, …​)</text:p>
          </table:table-cell>
        </table:table-row>
        <table:table-row>
          <table:table-cell table:style-name="Tableau47.A1" office:value-type="string">
            <text:p text:style-name="P36">PRODUCTION</text:p>
          </table:table-cell>
          <table:table-cell table:style-name="Tableau47.A1" office:value-type="string">
            <text:p text:style-name="P36">R1</text:p>
          </table:table-cell>
          <table:table-cell table:style-name="Tableau47.A1" office:value-type="string">
            <text:p text:style-name="P45">[<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Site officiel (utilisateurs finaux)</text:p>
          </table:table-cell>
        </table:table-row>
        <table:table-row>
          <table:table-cell table:style-name="Tableau47.A1" office:value-type="string">
            <text:p text:style-name="P36">PRODUCTION Secours</text:p>
          </table:table-cell>
          <table:table-cell table:style-name="Tableau47.A1" office:value-type="string">
            <text:p text:style-name="P36">R2</text:p>
          </table:table-cell>
          <table:table-cell table:style-name="Tableau47.A1" office:value-type="string">
            <text:p text:style-name="P46">[<text:span text:style-name="T47">S1</text:span> ou <text:span text:style-name="T47">S2</text:span>]</text:p>
          </table:table-cell>
          <table:table-cell table:style-name="Tableau47.A1" office:value-type="string">
            <text:p text:style-name="P37"/>
          </table:table-cell>
          <table:table-cell table:style-name="Tableau47.A1" office:value-type="string">
            <text:p text:style-name="P36">'’</text:p>
          </table:table-cell>
        </table:table-row>
      </table:table>
      <text:p text:style-name="Normal"/>
      <text:p text:style-name="P2"/>
      <text:h text:style-name="Heading_20_2" text:outline-level="2"><text:bookmark-start text:name="_Toc177568978"/><text:bookmark-start text:name="_Toc177652157"/><text:bookmark-start text:name="_Toc177652621"/><text:bookmark-start text:name="__RefHeading___Toc9974_1783990655"/><text:bookmark-start text:name="_Toc177660742"/>Dimensionnement des « serveurs<text:bookmark-end text:name="_Toc177568978"/><text:bookmark-end text:name="_Toc177652157"/><text:bookmark-end text:name="_Toc177652621"/><text:bookmark-end text:name="_Toc177660742"/> »<text:bookmark-end text:name="__RefHeading___Toc9974_1783990655"/></text:h>
      <text:p text:style-name="first-paragraph">Le dimensionnement se réfère à la <text:a xlink:type="simple" xlink:href="https://pi.interieur.rie.gouv.fr/description-de-loffre-cloud-pi-volet-iaas/" office:target-frame-name="_top" xlink:show="replace" text:style-name="Internet_20_link" text:visited-style-name="Visited_20_Internet_20_Link"><text:span text:style-name="Lien_20_hypertexte"><text:span text:style-name="T7">liste des gabarits disponibles</text:span></text:span></text:a><text:span text:style-name="Lien_20_hypertexte"><text:span text:style-name="T7"> </text:span></text:span><text:span text:style-name="Lien_20_hypertexte"><text:span text:style-name="T13">pour le volet IAAS, ainsi que les </text:span></text:span><text:span text:style-name="Lien_20_hypertexte"><text:span text:style-name="T18">quotas</text:span></text:span><text:span text:style-name="Lien_20_hypertexte"><text:span text:style-name="T13"> référencés pour le volet </text:span></text:span><text:a xlink:type="simple" xlink:href="https://cloud-pi-native.fr/" text:style-name="Internet_20_link" text:visited-style-name="Visited_20_Internet_20_Link"><text:span text:style-name="Lien_20_hypertexte">cloud pi native</text:span></text:a><text:span text:style-name="Lien_20_hypertexte"><text:span text:style-name="T13">.</text:span></text:span></text:p>
      <text:p text:style-name="P106"><text:span text:style-name="Lien_20_hypertexte"><text:span text:style-name="T19">{exemple ci-dessous pour un environnement cloud pi iaas}</text:span></text:span></text:p>
      <text:p text:style-name="P21"><text:span text:style-name="Police_20_par_20_défaut"><text:span text:style-name="T24"/></text:span></text:p>
      <text:p text:style-name="P21"><text:span text:style-name="Police_20_par_20_défaut"><text:span text:style-name="T24">Production</text:span></text:span></text:p>
      <table:table table:name="Tableau48" table:style-name="Tableau48">
        <table:table-column table:style-name="Tableau48.A"/>
        <table:table-column table:style-name="Tableau48.B"/>
        <table:table-column table:style-name="Tableau48.C"/>
        <table:table-column table:style-name="Tableau48.D"/>
        <table:table-column table:style-name="Tableau48.B"/>
        <table:table-column table:style-name="Tableau48.F"/>
        <table:table-column table:style-name="Tableau48.G"/>
        <table:table-header-rows>
          <table:table-row>
            <table:table-cell table:style-name="Tableau48.A1" office:value-type="string">
              <text:p text:style-name="P35">Type de serveur</text:p>
            </table:table-cell>
            <table:table-cell table:style-name="Tableau48.A1" office:value-type="string">
              <text:p text:style-name="P35">Quantité</text:p>
            </table:table-cell>
            <table:table-cell table:style-name="Tableau48.A1" office:value-type="string">
              <text:p text:style-name="P35">vCPU</text:p>
            </table:table-cell>
            <table:table-cell table:style-name="Tableau48.A1" office:value-type="string">
              <text:p text:style-name="P35">RAM</text:p>
            </table:table-cell>
            <table:table-cell table:style-name="Tableau48.A1" office:value-type="string">
              <text:p text:style-name="P35">Système (Go)</text:p>
            </table:table-cell>
            <table:table-cell table:style-name="Tableau48.A1" office:value-type="string">
              <text:p text:style-name="P35">Données (Go)</text:p>
            </table:table-cell>
            <table:table-cell table:style-name="Tableau48.A1" office:value-type="string">
              <text:p text:style-name="P35">Stockage Objet</text:p>
            </table:table-cell>
          </table:table-row>
        </table:table-header-rows>
        <table:table-row>
          <table:table-cell table:style-name="Tableau48.A1" office:value-type="string">
            <text:p text:style-name="P36">Reverse proxy</text:p>
          </table:table-cell>
          <table:table-cell table:style-name="Tableau48.A1" office:value-type="string">
            <text:p text:style-name="P36">1</text:p>
          </table:table-cell>
          <table:table-cell table:style-name="Tableau48.A1" office:value-type="string">
            <text:p text:style-name="P36">1</text:p>
          </table:table-cell>
          <table:table-cell table:style-name="Tableau48.A1" office:value-type="string">
            <text:p text:style-name="P36">2</text:p>
          </table:table-cell>
          <table:table-cell table:style-name="Tableau48.A1" office:value-type="string">
            <text:p text:style-name="P36">20</text:p>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Frontend</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Backend</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Batch</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Base de données</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row>
        <table:table-row>
          <table:table-cell table:style-name="Tableau48.A1" office:value-type="string">
            <text:p text:style-name="P36">Proxy out</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Proxy admin</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DNS</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Logs</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row>
        <table:table-row>
          <table:table-cell table:style-name="Tableau48.A1" office:value-type="string">
            <text:p text:style-name="P36">Métriques Supervision</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Notification Supervision</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row>
          <table:table-cell table:style-name="Tableau48.A1" office:value-type="string">
            <text:p text:style-name="P36">Interfaces Supervision</text:p>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6"/>
          </table:table-cell>
          <table:table-cell table:style-name="Tableau48.A1" office:value-type="string">
            <text:p text:style-name="P37"/>
          </table:table-cell>
          <table:table-cell table:style-name="Tableau48.A1" office:value-type="string">
            <text:p text:style-name="P37"/>
          </table:table-cell>
        </table:table-row>
      </table:table>
      <text:p text:style-name="Normal"/>
      <text:p text:style-name="P98">{Exemple ci-dessous pour le cloud pi native}</text:p>
      <text:p text:style-name="P117"><text:span text:style-name="T6">{environnement}</text:span> </text:p>
      <table:table table:name="Tableau43" table:style-name="Tableau43">
        <table:table-column table:style-name="Tableau43.A" table:number-columns-repeated="3"/>
        <table:table-row>
          <table:table-cell table:style-name="Tableau43.A1" office:value-type="string">
            <text:p text:style-name="P121">Quota Name</text:p>
          </table:table-cell>
          <table:table-cell table:style-name="Tableau43.A1" office:value-type="string">
            <text:p text:style-name="P121">CPU</text:p>
          </table:table-cell>
          <table:table-cell table:style-name="Tableau43.C1" office:value-type="string">
            <text:p text:style-name="P121">RAM</text:p>
          </table:table-cell>
        </table:table-row>
        <table:table-row>
          <table:table-cell table:style-name="Tableau43.A2" office:value-type="string">
            <text:p text:style-name="P121">Small</text:p>
          </table:table-cell>
          <table:table-cell table:style-name="Tableau43.A2" office:value-type="string">
            <text:p text:style-name="P121">2</text:p>
          </table:table-cell>
          <table:table-cell table:style-name="Tableau43.C2" office:value-type="string">
            <text:p text:style-name="P121">4</text:p>
          </table:table-cell>
        </table:table-row>
        <table:table-row>
          <table:table-cell table:style-name="Tableau43.A2" office:value-type="string">
            <text:p text:style-name="P121">Medium</text:p>
          </table:table-cell>
          <table:table-cell table:style-name="Tableau43.A2" office:value-type="string">
            <text:p text:style-name="P121">4</text:p>
          </table:table-cell>
          <table:table-cell table:style-name="Tableau43.C2" office:value-type="string">
            <text:p text:style-name="P121">8</text:p>
          </table:table-cell>
        </table:table-row>
        <table:table-row>
          <table:table-cell table:style-name="Tableau43.A2" office:value-type="string">
            <text:p text:style-name="P123">Large‍</text:p>
          </table:table-cell>
          <table:table-cell table:style-name="Tableau43.A2" office:value-type="string">
            <text:p text:style-name="P123">6</text:p>
          </table:table-cell>
          <table:table-cell table:style-name="Tableau43.C2" office:value-type="string">
            <text:p text:style-name="P123">12</text:p>
          </table:table-cell>
        </table:table-row>
        <table:table-row>
          <table:table-cell table:style-name="Tableau43.A2" office:value-type="string">
            <text:p text:style-name="P121">Xlarge‍</text:p>
          </table:table-cell>
          <table:table-cell table:style-name="Tableau43.A2" office:value-type="string">
            <text:p text:style-name="P121">8</text:p>
          </table:table-cell>
          <table:table-cell table:style-name="Tableau43.C2" office:value-type="string">
            <text:p text:style-name="P121">16</text:p>
          </table:table-cell>
        </table:table-row>
        <table:table-row>
          <table:table-cell table:style-name="Tableau43.A2" office:value-type="string">
            <text:p text:style-name="P122">Xxlarge</text:p>
          </table:table-cell>
          <table:table-cell table:style-name="Tableau43.A2" office:value-type="string">
            <text:p text:style-name="P122">16</text:p>
          </table:table-cell>
          <table:table-cell table:style-name="Tableau43.C2" office:value-type="string">
            <text:p text:style-name="P122">16</text:p>
          </table:table-cell>
        </table:table-row>
      </table:table>
      <text:p text:style-name="P115"><text:soft-page-break/><text:s/></text:p>
      <text:h text:style-name="Heading_20_1" text:outline-level="1"><text:bookmark-start text:name="_Toc177568979"/><text:bookmark-start text:name="_Toc177652158"/><text:bookmark-start text:name="_Toc177652622"/><text:bookmark-start text:name="_Toc177660743"/><text:bookmark-start text:name="__RefHeading___Toc9976_1783990655"/>DNS, certificats et CDS<text:bookmark-end text:name="_Toc177568979"/><text:bookmark-end text:name="_Toc177652158"/><text:bookmark-end text:name="_Toc177652622"/><text:bookmark-end text:name="_Toc177660743"/><text:bookmark-end text:name="__RefHeading___Toc9976_1783990655"/></text:h>
      <text:p text:style-name="P114"><text:span text:style-name="Lien_20_hypertexte"><text:span text:style-name="T19">{</text:span></text:span><text:span text:style-name="Lien_20_hypertexte"><text:span text:style-name="T20">A compléter en fonction des environnements mis en oeuvre </text:span></text:span><text:span text:style-name="Lien_20_hypertexte"><text:span text:style-name="T19">}</text:span></text:span></text:p>
      <table:table table:name="Tableau49" table:style-name="Tableau49">
        <table:table-column table:style-name="Tableau49.A"/>
        <table:table-column table:style-name="Tableau49.B"/>
        <table:table-column table:style-name="Tableau49.C"/>
        <table:table-column table:style-name="Tableau49.D"/>
        <table:table-column table:style-name="Tableau49.C"/>
        <table:table-column table:style-name="Tableau49.F"/>
        <table:table-column table:style-name="Tableau49.C"/>
        <table:table-header-rows>
          <table:table-row>
            <table:table-cell table:style-name="Tableau49.A1" office:value-type="string">
              <text:p text:style-name="P40">Environnement</text:p>
            </table:table-cell>
            <table:table-cell table:style-name="Tableau49.A1" office:value-type="string">
              <text:p text:style-name="P40">Internet</text:p>
            </table:table-cell>
            <table:table-cell table:style-name="Tableau49.A1" office:value-type="string">
              <text:p text:style-name="P40">Expiration</text:p>
            </table:table-cell>
            <table:table-cell table:style-name="Tableau49.A1" office:value-type="string">
              <text:p text:style-name="P40">RIE</text:p>
            </table:table-cell>
            <table:table-cell table:style-name="Tableau49.A1" office:value-type="string">
              <text:p text:style-name="P40">Expiration</text:p>
            </table:table-cell>
            <table:table-cell table:style-name="Tableau49.A1" office:value-type="string">
              <text:p text:style-name="P40">Minint</text:p>
            </table:table-cell>
            <table:table-cell table:style-name="Tableau49.A1" office:value-type="string">
              <text:p text:style-name="P40">Expiration</text:p>
            </table:table-cell>
          </table:table-row>
        </table:table-header-rows>
        <table:table-row>
          <table:table-cell table:style-name="Tableau49.A1" office:value-type="string">
            <text:p text:style-name="P41">DEVELOPPEMENT</text:p>
          </table:table-cell>
          <table:table-cell table:style-name="Tableau49.A1" office:value-type="string">
            <text:p text:style-name="P41">dev.[application].interieur.gouv.fr</text:p>
          </table:table-cell>
          <table:table-cell table:style-name="Tableau49.A1" office:value-type="string">
            <text:p text:style-name="P42"/>
          </table:table-cell>
          <table:table-cell table:style-name="Tableau49.A1" office:value-type="string">
            <text:p text:style-name="P41">dev.[application].interieur.rie.gouv.fr</text:p>
          </table:table-cell>
          <table:table-cell table:style-name="Tableau49.A1" office:value-type="string">
            <text:p text:style-name="P42"/>
          </table:table-cell>
          <table:table-cell table:style-name="Tableau49.A1" office:value-type="string">
            <text:p text:style-name="P41">dev.[application].minint.fr</text:p>
          </table:table-cell>
          <table:table-cell table:style-name="Tableau49.A1" office:value-type="string">
            <text:p text:style-name="P42"/>
          </table:table-cell>
        </table:table-row>
        <table:table-row>
          <table:table-cell table:style-name="Tableau49.A1" office:value-type="string">
            <text:p text:style-name="P41">INTEGRATION</text:p>
          </table:table-cell>
          <table:table-cell table:style-name="Tableau49.A1" office:value-type="string">
            <text:p text:style-name="P41">integration.[application].interieur.gouv.fr</text:p>
          </table:table-cell>
          <table:table-cell table:style-name="Tableau49.A1" office:value-type="string">
            <text:p text:style-name="P42"/>
          </table:table-cell>
          <table:table-cell table:style-name="Tableau49.A1" office:value-type="string">
            <text:p text:style-name="P41">integration.[application].interieur.rie.gouv.fr</text:p>
          </table:table-cell>
          <table:table-cell table:style-name="Tableau49.A1" office:value-type="string">
            <text:p text:style-name="P42"/>
          </table:table-cell>
          <table:table-cell table:style-name="Tableau49.A1" office:value-type="string">
            <text:p text:style-name="P41">integration.[application].minint.fr</text:p>
          </table:table-cell>
          <table:table-cell table:style-name="Tableau49.A1" office:value-type="string">
            <text:p text:style-name="P42"/>
          </table:table-cell>
        </table:table-row>
        <table:table-row>
          <table:table-cell table:style-name="Tableau49.A1" office:value-type="string">
            <text:p text:style-name="P41">QUALIFICATION</text:p>
          </table:table-cell>
          <table:table-cell table:style-name="Tableau49.A1" office:value-type="string">
            <text:p text:style-name="P41">qualification.[application].interieur.gouv.fr</text:p>
          </table:table-cell>
          <table:table-cell table:style-name="Tableau49.A1" office:value-type="string">
            <text:p text:style-name="P42"/>
          </table:table-cell>
          <table:table-cell table:style-name="Tableau49.A1" office:value-type="string">
            <text:p text:style-name="P41">qualification.[application].interieur.rie.gouv.fr</text:p>
          </table:table-cell>
          <table:table-cell table:style-name="Tableau49.A1" office:value-type="string">
            <text:p text:style-name="P42"/>
          </table:table-cell>
          <table:table-cell table:style-name="Tableau49.A1" office:value-type="string">
            <text:p text:style-name="P41">qualification.[application].minint.fr</text:p>
          </table:table-cell>
          <table:table-cell table:style-name="Tableau49.A1" office:value-type="string">
            <text:p text:style-name="P42"/>
          </table:table-cell>
        </table:table-row>
        <table:table-row>
          <table:table-cell table:style-name="Tableau49.A1" office:value-type="string">
            <text:p text:style-name="P41">METROLOGIE</text:p>
          </table:table-cell>
          <table:table-cell table:style-name="Tableau49.A1" office:value-type="string">
            <text:p text:style-name="P41">metrologie.[application].interieur.gouv.fr</text:p>
          </table:table-cell>
          <table:table-cell table:style-name="Tableau49.A1" office:value-type="string">
            <text:p text:style-name="P42"/>
          </table:table-cell>
          <table:table-cell table:style-name="Tableau49.A1" office:value-type="string">
            <text:p text:style-name="P41">metrologie.[application].interieur.rie.gouv.fr</text:p>
          </table:table-cell>
          <table:table-cell table:style-name="Tableau49.A1" office:value-type="string">
            <text:p text:style-name="P42"/>
          </table:table-cell>
          <table:table-cell table:style-name="Tableau49.A1" office:value-type="string">
            <text:p text:style-name="P41">metrologie.[application].minint.fr</text:p>
          </table:table-cell>
          <table:table-cell table:style-name="Tableau49.A1" office:value-type="string">
            <text:p text:style-name="P42"/>
          </table:table-cell>
        </table:table-row>
        <table:table-row>
          <table:table-cell table:style-name="Tableau49.A1" office:value-type="string">
            <text:p text:style-name="P41">PREPRODUCTION</text:p>
          </table:table-cell>
          <table:table-cell table:style-name="Tableau49.A1" office:value-type="string">
            <text:p text:style-name="P41">preproduction.[application].interieur.gouv.fr</text:p>
          </table:table-cell>
          <table:table-cell table:style-name="Tableau49.A1" office:value-type="string">
            <text:p text:style-name="P42"/>
          </table:table-cell>
          <table:table-cell table:style-name="Tableau49.A1" office:value-type="string">
            <text:p text:style-name="P41">preproduction.[application].interieur.rie.gouv.fr</text:p>
          </table:table-cell>
          <table:table-cell table:style-name="Tableau49.A1" office:value-type="string">
            <text:p text:style-name="P42"/>
          </table:table-cell>
          <table:table-cell table:style-name="Tableau49.A1" office:value-type="string">
            <text:p text:style-name="P41">preproduction.[application].minint.fr</text:p>
          </table:table-cell>
          <table:table-cell table:style-name="Tableau49.A1" office:value-type="string">
            <text:p text:style-name="P42"/>
          </table:table-cell>
        </table:table-row>
        <table:table-row>
          <table:table-cell table:style-name="Tableau49.A1" office:value-type="string">
            <text:p text:style-name="P41">FORMATION</text:p>
          </table:table-cell>
          <table:table-cell table:style-name="Tableau49.A1" office:value-type="string">
            <text:p text:style-name="P41">formation.[application].interieur.gouv.fr</text:p>
          </table:table-cell>
          <table:table-cell table:style-name="Tableau49.A1" office:value-type="string">
            <text:p text:style-name="P42"/>
          </table:table-cell>
          <table:table-cell table:style-name="Tableau49.A1" office:value-type="string">
            <text:p text:style-name="P41">formation.[application].interieur.rie.gouv.fr</text:p>
          </table:table-cell>
          <table:table-cell table:style-name="Tableau49.A1" office:value-type="string">
            <text:p text:style-name="P42"/>
          </table:table-cell>
          <table:table-cell table:style-name="Tableau49.A1" office:value-type="string">
            <text:p text:style-name="P41">formation.[application].minint.fr</text:p>
          </table:table-cell>
          <table:table-cell table:style-name="Tableau49.A1" office:value-type="string">
            <text:p text:style-name="P42"/>
          </table:table-cell>
        </table:table-row>
        <table:table-row>
          <table:table-cell table:style-name="Tableau49.A1" office:value-type="string">
            <text:p text:style-name="P41">PRODUCTION</text:p>
          </table:table-cell>
          <table:table-cell table:style-name="Tableau49.A1" office:value-type="string">
            <text:p text:style-name="P41">[application].interieur.gouv.fr</text:p>
          </table:table-cell>
          <table:table-cell table:style-name="Tableau49.A1" office:value-type="string">
            <text:p text:style-name="P42"/>
          </table:table-cell>
          <table:table-cell table:style-name="Tableau49.A1" office:value-type="string">
            <text:p text:style-name="P41">[application].interieur.rie.gouv.fr</text:p>
          </table:table-cell>
          <table:table-cell table:style-name="Tableau49.A1" office:value-type="string">
            <text:p text:style-name="P42"/>
          </table:table-cell>
          <table:table-cell table:style-name="Tableau49.A1" office:value-type="string">
            <text:p text:style-name="P41">[application].minint.fr</text:p>
          </table:table-cell>
          <table:table-cell table:style-name="Tableau49.A1" office:value-type="string">
            <text:p text:style-name="P42"/>
          </table:table-cell>
        </table:table-row>
      </table:table>
      <text:p text:style-name="P2"/>
      <text:h text:style-name="Heading_20_2" text:outline-level="2"><text:bookmark-start text:name="_Toc177660744"/><text:bookmark-start text:name="_Toc177652623"/><text:bookmark-start text:name="_Toc177652159"/><text:bookmark-start text:name="_Toc177568980"/><text:bookmark-start text:name="__RefHeading___Toc9978_1783990655"/>Flux<text:bookmark-end text:name="_Toc177660744"/><text:bookmark-end text:name="_Toc177652623"/><text:bookmark-end text:name="_Toc177652159"/><text:bookmark-end text:name="_Toc177568980"/><text:bookmark-end text:name="__RefHeading___Toc9978_1783990655"/></text:h>
      <text:p text:style-name="P114"><text:span text:style-name="Lien_20_hypertexte"><text:span text:style-name="T19">{</text:span></text:span><text:span text:style-name="Lien_20_hypertexte"><text:span text:style-name="T20">A compléter en fonction de votre architecture applicative</text:span></text:span><text:span text:style-name="Lien_20_hypertexte"><text:span text:style-name="T19">}</text:span></text:span></text:p>
      <text:p text:style-name="P128"><text:span text:style-name="Lien_20_hypertexte"><text:span text:style-name="T21">{exemple}</text:span></text:span></text:p>
      <table:table table:name="Tableau50" table:style-name="Tableau50">
        <table:table-column table:style-name="Tableau50.A"/>
        <table:table-column table:style-name="Tableau50.B"/>
        <table:table-column table:style-name="Tableau50.C"/>
        <table:table-column table:style-name="Tableau50.D"/>
        <table:table-column table:style-name="Tableau50.E"/>
        <table:table-column table:style-name="Tableau50.F"/>
        <table:table-column table:style-name="Tableau50.G"/>
        <table:table-column table:style-name="Tableau50.H"/>
        <table:table-header-rows>
          <table:table-row>
            <table:table-cell table:style-name="Tableau50.A1" office:value-type="string">
              <text:p text:style-name="P40">Source</text:p>
            </table:table-cell>
            <table:table-cell table:style-name="Tableau50.A1" office:value-type="string">
              <text:p text:style-name="P40">Intermédiaires</text:p>
            </table:table-cell>
            <table:table-cell table:style-name="Tableau50.A1" office:value-type="string">
              <text:p text:style-name="P40">Destination</text:p>
            </table:table-cell>
            <table:table-cell table:style-name="Tableau50.A1" office:value-type="string">
              <text:p text:style-name="P40">Type de flux</text:p>
            </table:table-cell>
            <table:table-cell table:style-name="Tableau50.A1" office:value-type="string">
              <text:p text:style-name="P40">Externe</text:p>
            </table:table-cell>
            <table:table-cell table:style-name="Tableau50.A1" office:value-type="string">
              <text:p text:style-name="P40">Protocole</text:p>
            </table:table-cell>
            <table:table-cell table:style-name="Tableau50.A1" office:value-type="string">
              <text:p text:style-name="P40">Port</text:p>
            </table:table-cell>
            <table:table-cell table:style-name="Tableau50.A1" office:value-type="string">
              <text:p text:style-name="P40">Description</text:p>
            </table:table-cell>
          </table:table-row>
        </table:table-header-rows>
        <table:table-row>
          <table:table-cell table:style-name="Tableau50.A1" office:value-type="string">
            <text:p text:style-name="P39">Navigateur Web</text:p>
          </table:table-cell>
          <table:table-cell table:style-name="Tableau50.A1" office:value-type="string">
            <text:p text:style-name="P39">CDS &gt; Reverse Proxy</text:p>
          </table:table-cell>
          <table:table-cell table:style-name="Tableau50.A1" office:value-type="string">
            <text:p text:style-name="P39">Frontend</text:p>
          </table:table-cell>
          <table:table-cell table:style-name="Tableau50.A1" office:value-type="string">
            <text:p text:style-name="P39">Web</text:p>
          </table:table-cell>
          <table:table-cell table:style-name="Tableau50.A1" office:value-type="string">
            <text:p text:style-name="P39">oui</text:p>
          </table:table-cell>
          <table:table-cell table:style-name="Tableau50.A1" office:value-type="string">
            <text:p text:style-name="P39">HTTP</text:p>
          </table:table-cell>
          <table:table-cell table:style-name="Tableau50.A1" office:value-type="string">
            <text:p text:style-name="P39">80,443</text:p>
          </table:table-cell>
          <table:table-cell table:style-name="Tableau50.A1" office:value-type="string">
            <text:p text:style-name="P39">Interfaces frontend</text:p>
          </table:table-cell>
        </table:table-row>
        <table:table-row>
          <table:table-cell table:style-name="Tableau50.A1" office:value-type="string">
            <text:p text:style-name="P39">Navigateur Web</text:p>
          </table:table-cell>
          <table:table-cell table:style-name="Tableau50.A1" office:value-type="string">
            <text:p text:style-name="P39">CDS &gt; Reverse Proxy</text:p>
          </table:table-cell>
          <table:table-cell table:style-name="Tableau50.A1" office:value-type="string">
            <text:p text:style-name="P39">Backend</text:p>
          </table:table-cell>
          <table:table-cell table:style-name="Tableau50.A1" office:value-type="string">
            <text:p text:style-name="P39">API Web</text:p>
          </table:table-cell>
          <table:table-cell table:style-name="Tableau50.A1" office:value-type="string">
            <text:p text:style-name="P39">oui</text:p>
          </table:table-cell>
          <table:table-cell table:style-name="Tableau50.A1" office:value-type="string">
            <text:p text:style-name="P39">HTTP</text:p>
          </table:table-cell>
          <table:table-cell table:style-name="Tableau50.A1" office:value-type="string">
            <text:p text:style-name="P39">80,443</text:p>
          </table:table-cell>
          <table:table-cell table:style-name="Tableau50.A1" office:value-type="string">
            <text:p text:style-name="P39">API backend</text:p>
          </table:table-cell>
        </table:table-row>
        <table:table-row>
          <table:table-cell table:style-name="Tableau50.A1" office:value-type="string">
            <text:p text:style-name="P39">Reverse Proxy</text:p>
          </table:table-cell>
          <table:table-cell table:style-name="Tableau50.A1" office:value-type="string">
            <text:p text:style-name="P39">CDS</text:p>
          </table:table-cell>
          <table:table-cell table:style-name="Tableau50.A1" office:value-type="string">
            <text:p text:style-name="P39">SSO</text:p>
          </table:table-cell>
          <table:table-cell table:style-name="Tableau50.A1" office:value-type="string">
            <text:p text:style-name="P39">API Web</text:p>
          </table:table-cell>
          <table:table-cell table:style-name="Tableau50.A1" office:value-type="string">
            <text:p text:style-name="P39">oui</text:p>
          </table:table-cell>
          <table:table-cell table:style-name="Tableau50.A1" office:value-type="string">
            <text:p text:style-name="P39">HTTP</text:p>
          </table:table-cell>
          <table:table-cell table:style-name="Tableau50.A1" office:value-type="string">
            <text:p text:style-name="P39">443</text:p>
          </table:table-cell>
          <table:table-cell table:style-name="Tableau50.A1" office:value-type="string">
            <text:p text:style-name="P39">Authentification et Récupération de profil</text:p>
          </table:table-cell>
        </table:table-row>
        <table:table-row>
          <table:table-cell table:style-name="Tableau50.A1" office:value-type="string">
            <text:p text:style-name="P39">Backend</text:p>
          </table:table-cell>
          <table:table-cell table:style-name="Tableau50.A1" office:value-type="string">
            <text:p text:style-name="P39">Proxy IO</text:p>
          </table:table-cell>
          <table:table-cell table:style-name="Tableau50.A1" office:value-type="string">
            <text:p text:style-name="P39">ICASSO</text:p>
          </table:table-cell>
          <table:table-cell table:style-name="Tableau50.A1" office:value-type="string">
            <text:p text:style-name="P39">Mail</text:p>
          </table:table-cell>
          <table:table-cell table:style-name="Tableau50.A1" office:value-type="string">
            <text:p text:style-name="P39">oui</text:p>
          </table:table-cell>
          <table:table-cell table:style-name="Tableau50.A1" office:value-type="string">
            <text:p text:style-name="P39">SMTP</text:p>
          </table:table-cell>
          <table:table-cell table:style-name="Tableau50.A1" office:value-type="string">
            <text:p text:style-name="P39">25</text:p>
          </table:table-cell>
          <table:table-cell table:style-name="Tableau50.A1" office:value-type="string">
            <text:p text:style-name="P39">Envoi de mail</text:p>
          </table:table-cell>
        </table:table-row>
        <table:table-row>
          <table:table-cell table:style-name="Tableau50.A1" office:value-type="string">
            <text:p text:style-name="P39">Backend</text:p>
          </table:table-cell>
          <table:table-cell table:style-name="Tableau50.A1" office:value-type="string">
            <text:p text:style-name="P39">Proxy IO &gt; INES-API</text:p>
          </table:table-cell>
          <table:table-cell table:style-name="Tableau50.A1" office:value-type="string">
            <text:p text:style-name="P39">Application externe</text:p>
          </table:table-cell>
          <table:table-cell table:style-name="Tableau50.A1" office:value-type="string">
            <text:p text:style-name="P39">API Web</text:p>
          </table:table-cell>
          <table:table-cell table:style-name="Tableau50.A1" office:value-type="string">
            <text:p text:style-name="P39">oui</text:p>
          </table:table-cell>
          <table:table-cell table:style-name="Tableau50.A1" office:value-type="string">
            <text:p text:style-name="P39">HTTP</text:p>
          </table:table-cell>
          <table:table-cell table:style-name="Tableau50.A1" office:value-type="string">
            <text:p text:style-name="P39">80,443</text:p>
          </table:table-cell>
          <table:table-cell table:style-name="Tableau50.A1" office:value-type="string">
            <text:p text:style-name="P39">Appel API d’applications externes</text:p>
          </table:table-cell>
        </table:table-row>
        <table:table-row>
          <table:table-cell table:style-name="Tableau50.A1" office:value-type="string">
            <text:p text:style-name="P39">Backend</text:p>
          </table:table-cell>
          <table:table-cell table:style-name="Tableau50.A1" office:value-type="string">
            <text:p text:style-name="P38"/>
          </table:table-cell>
          <table:table-cell table:style-name="Tableau50.A1" office:value-type="string">
            <text:p text:style-name="P39">Database</text:p>
          </table:table-cell>
          <table:table-cell table:style-name="Tableau50.A1" office:value-type="string">
            <text:p text:style-name="P39">ODBC</text:p>
          </table:table-cell>
          <table:table-cell table:style-name="Tableau50.A1" office:value-type="string">
            <text:p text:style-name="P39">non</text:p>
          </table:table-cell>
          <table:table-cell table:style-name="Tableau50.A1" office:value-type="string">
            <text:p text:style-name="P39">SQL</text:p>
          </table:table-cell>
          <table:table-cell table:style-name="Tableau50.A1" office:value-type="string">
            <text:p text:style-name="P39">5432</text:p>
          </table:table-cell>
          <table:table-cell table:style-name="Tableau50.A1" office:value-type="string">
            <text:p text:style-name="P38"/>
          </table:table-cell>
        </table:table-row>
        <table:table-row>
          <table:table-cell table:style-name="Tableau50.A1" office:value-type="string">
            <text:p text:style-name="P39">Database</text:p>
          </table:table-cell>
          <table:table-cell table:style-name="Tableau50.A1" office:value-type="string">
            <text:p text:style-name="P38"/>
          </table:table-cell>
          <table:table-cell table:style-name="Tableau50.A1" office:value-type="string">
            <text:p text:style-name="P39">Service de sauvegarde</text:p>
          </table:table-cell>
          <table:table-cell table:style-name="Tableau50.A1" office:value-type="string">
            <text:p text:style-name="P38"/>
          </table:table-cell>
          <table:table-cell table:style-name="Tableau50.A1" office:value-type="string">
            <text:p text:style-name="P39">non</text:p>
          </table:table-cell>
          <table:table-cell table:style-name="Tableau50.A1" office:value-type="string">
            <text:p text:style-name="P38"/>
          </table:table-cell>
          <table:table-cell table:style-name="Tableau50.A1" office:value-type="string">
            <text:p text:style-name="P38"/>
          </table:table-cell>
          <table:table-cell table:style-name="Tableau50.A1" office:value-type="string">
            <text:p text:style-name="P39">Sauvegarde des données</text:p>
          </table:table-cell>
        </table:table-row>
        <table:table-row>
          <table:table-cell table:style-name="Tableau50.A1" office:value-type="string">
            <text:p text:style-name="P39">Batch</text:p>
          </table:table-cell>
          <table:table-cell table:style-name="Tableau50.A1" office:value-type="string">
            <text:p text:style-name="P38"/>
          </table:table-cell>
          <table:table-cell table:style-name="Tableau50.A1" office:value-type="string">
            <text:p text:style-name="P39">Database</text:p>
          </table:table-cell>
          <table:table-cell table:style-name="Tableau50.A1" office:value-type="string">
            <text:p text:style-name="P39">API Web</text:p>
          </table:table-cell>
          <table:table-cell table:style-name="Tableau50.A1" office:value-type="string">
            <text:p text:style-name="P39">oui</text:p>
          </table:table-cell>
          <table:table-cell table:style-name="Tableau50.A1" office:value-type="string">
            <text:p text:style-name="P39">HTTP</text:p>
          </table:table-cell>
          <table:table-cell table:style-name="Tableau50.A1" office:value-type="string">
            <text:p text:style-name="P39">443</text:p>
          </table:table-cell>
          <table:table-cell table:style-name="Tableau50.A1" office:value-type="string">
            <text:p text:style-name="P39">Archivage des données</text:p>
          </table:table-cell>
        </table:table-row>
        <table:table-row>
          <table:table-cell table:style-name="Tableau50.A1" office:value-type="string">
            <text:p text:style-name="P39">Application externe</text:p>
          </table:table-cell>
          <table:table-cell table:style-name="Tableau50.A1" office:value-type="string">
            <text:p text:style-name="P39">INES-API &gt; Proxy IO</text:p>
          </table:table-cell>
          <table:table-cell table:style-name="Tableau50.A1" office:value-type="string">
            <text:p text:style-name="P39">Backend</text:p>
          </table:table-cell>
          <table:table-cell table:style-name="Tableau50.A1" office:value-type="string">
            <text:p text:style-name="P39">API Web</text:p>
          </table:table-cell>
          <table:table-cell table:style-name="Tableau50.A1" office:value-type="string">
            <text:p text:style-name="P39">non</text:p>
          </table:table-cell>
          <table:table-cell table:style-name="Tableau50.A1" office:value-type="string">
            <text:p text:style-name="P39">HTTP</text:p>
          </table:table-cell>
          <table:table-cell table:style-name="Tableau50.A1" office:value-type="string">
            <text:p text:style-name="P39">80,443</text:p>
          </table:table-cell>
          <table:table-cell table:style-name="Tableau50.A1" office:value-type="string">
            <text:p text:style-name="P39">Consommation des API par des applications externes</text:p>
          </table:table-cell>
        </table:table-row>
        <table:table-row>
          <table:table-cell table:style-name="Tableau50.A1" office:value-type="string">
            <text:p text:style-name="P39">Application externe</text:p>
          </table:table-cell>
          <table:table-cell table:style-name="Tableau50.A1" office:value-type="string">
            <text:p text:style-name="P39">INES-SAS &gt; Proxy IO</text:p>
          </table:table-cell>
          <table:table-cell table:style-name="Tableau50.A1" office:value-type="string">
            <text:p text:style-name="P39">Batch</text:p>
          </table:table-cell>
          <table:table-cell table:style-name="Tableau50.A1" office:value-type="string">
            <text:p text:style-name="P39">Echange de fichier</text:p>
          </table:table-cell>
          <table:table-cell table:style-name="Tableau50.A1" office:value-type="string">
            <text:p text:style-name="P39">oui</text:p>
          </table:table-cell>
          <table:table-cell table:style-name="Tableau50.A1" office:value-type="string">
            <text:p text:style-name="P39">FTPS</text:p>
          </table:table-cell>
          <table:table-cell table:style-name="Tableau50.A1" office:value-type="string">
            <text:p text:style-name="P39">21</text:p>
          </table:table-cell>
          <table:table-cell table:style-name="Tableau50.A1" office:value-type="string">
            <text:p text:style-name="P39">Consommation des API par des applications externes</text:p>
          </table:table-cell>
        </table:table-row>
        <table:table-row>
          <table:table-cell table:style-name="Tableau50.A1" office:value-type="string">
            <text:p text:style-name="P39">*</text:p>
          </table:table-cell>
          <table:table-cell table:style-name="Tableau50.A1" office:value-type="string">
            <text:p text:style-name="P39">Proxy IO</text:p>
          </table:table-cell>
          <table:table-cell table:style-name="Tableau50.A1" office:value-type="string">
            <text:p text:style-name="P39">Serveur NTP</text:p>
          </table:table-cell>
          <table:table-cell table:style-name="Tableau50.A1" office:value-type="string">
            <text:p text:style-name="P39">Synchronisation d’horloge</text:p>
          </table:table-cell>
          <table:table-cell table:style-name="Tableau50.A1" office:value-type="string">
            <text:p text:style-name="P39">oui</text:p>
          </table:table-cell>
          <table:table-cell table:style-name="Tableau50.A1" office:value-type="string">
            <text:p text:style-name="P39">NTP</text:p>
          </table:table-cell>
          <table:table-cell table:style-name="Tableau50.A1" office:value-type="string">
            <text:p text:style-name="P39">123</text:p>
          </table:table-cell>
          <table:table-cell table:style-name="Tableau50.A1" office:value-type="string">
            <text:p text:style-name="P39">Mise à jour de l’heure des serveurs</text:p>
          </table:table-cell>
        </table:table-row>
        <table:table-row>
          <table:table-cell table:style-name="Tableau50.A1" office:value-type="string">
            <text:p text:style-name="P39">* (SkyDNS)</text:p>
          </table:table-cell>
          <table:table-cell table:style-name="Tableau50.A1" office:value-type="string">
            <text:p text:style-name="P38"/>
          </table:table-cell>
          <table:table-cell table:style-name="Tableau50.A1" office:value-type="string">
            <text:p text:style-name="P39">DNS (ETCD)</text:p>
          </table:table-cell>
          <table:table-cell table:style-name="Tableau50.A1" office:value-type="string">
            <text:p text:style-name="P39">Propagation DNS</text:p>
          </table:table-cell>
          <table:table-cell table:style-name="Tableau50.A1" office:value-type="string">
            <text:p text:style-name="P39">non</text:p>
          </table:table-cell>
          <table:table-cell table:style-name="Tableau50.A1" office:value-type="string">
            <text:p text:style-name="P39">HTTP</text:p>
          </table:table-cell>
          <table:table-cell table:style-name="Tableau50.A1" office:value-type="string">
            <text:p text:style-name="P39">80,443</text:p>
          </table:table-cell>
          <table:table-cell table:style-name="Tableau50.A1" office:value-type="string">
            <text:p text:style-name="P39">Mise à jour et récupération de la configuration DNS interne</text:p>
          </table:table-cell>
        </table:table-row>
        <table:table-row>
          <table:table-cell table:style-name="Tableau50.A1" office:value-type="string">
            <text:p text:style-name="P39">Poste d’administrati<text:soft-page-break/>on</text:p>
          </table:table-cell>
          <table:table-cell table:style-name="Tableau50.A1" office:value-type="string">
            <text:p text:style-name="P39">Bastion &gt; Proxy admin</text:p>
          </table:table-cell>
          <table:table-cell table:style-name="Tableau50.A1" office:value-type="string">
            <text:p text:style-name="P39">*</text:p>
          </table:table-cell>
          <table:table-cell table:style-name="Tableau50.A1" office:value-type="string">
            <text:p text:style-name="P39">SSH</text:p>
          </table:table-cell>
          <table:table-cell table:style-name="Tableau50.A1" office:value-type="string">
            <text:p text:style-name="P39">oui</text:p>
          </table:table-cell>
          <table:table-cell table:style-name="Tableau50.A1" office:value-type="string">
            <text:p text:style-name="P39">SSH</text:p>
          </table:table-cell>
          <table:table-cell table:style-name="Tableau50.A1" office:value-type="string">
            <text:p text:style-name="P39">22</text:p>
          </table:table-cell>
          <table:table-cell table:style-name="Tableau50.A1" office:value-type="string">
            <text:p text:style-name="P39">Administration du tenant <text:soft-page-break/>par SSH</text:p>
          </table:table-cell>
        </table:table-row>
        <table:table-row>
          <table:table-cell table:style-name="Tableau50.A1" office:value-type="string">
            <text:p text:style-name="P39">Navigateur</text:p>
          </table:table-cell>
          <table:table-cell table:style-name="Tableau50.A1" office:value-type="string">
            <text:p text:style-name="P39">Bastion &gt; Proxy admin</text:p>
          </table:table-cell>
          <table:table-cell table:style-name="Tableau50.A1" office:value-type="string">
            <text:p text:style-name="P39">Graphana</text:p>
          </table:table-cell>
          <table:table-cell table:style-name="Tableau50.A1" office:value-type="string">
            <text:p text:style-name="P39">Web</text:p>
          </table:table-cell>
          <table:table-cell table:style-name="Tableau50.A1" office:value-type="string">
            <text:p text:style-name="P39">oui</text:p>
          </table:table-cell>
          <table:table-cell table:style-name="Tableau50.A1" office:value-type="string">
            <text:p text:style-name="P39">HTTP</text:p>
          </table:table-cell>
          <table:table-cell table:style-name="Tableau50.A1" office:value-type="string">
            <text:p text:style-name="P39">80,443</text:p>
          </table:table-cell>
          <table:table-cell table:style-name="Tableau50.A1" office:value-type="string">
            <text:p text:style-name="P39">Interfaces d’administration des serveurs</text:p>
          </table:table-cell>
        </table:table-row>
      </table:table>
      <text:p text:style-name="Normal"/>
      <text:h text:style-name="Heading_20_2" text:outline-level="2"><text:bookmark-start text:name="__RefHeading___Toc9980_1783990655"/><text:s/><text:bookmark-start text:name="_Toc177568981"/><text:bookmark-start text:name="_Toc177652160"/><text:bookmark-start text:name="_Toc177652624"/><text:bookmark-start text:name="_Toc177660745"/>Security Groups<text:bookmark-end text:name="__RefHeading___Toc9980_1783990655"/><text:bookmark-end text:name="_Toc177568981"/><text:bookmark-end text:name="_Toc177652160"/><text:bookmark-end text:name="_Toc177652624"/><text:bookmark-end text:name="_Toc177660745"/></text:h>
      <text:p text:style-name="P88">{ A compléter <text:span text:style-name="T38">pour un environnement de type cloud pi iaas</text:span>}</text:p>
      <table:table table:name="Tableau51" table:style-name="Tableau51">
        <table:table-column table:style-name="Tableau51.A"/>
        <table:table-column table:style-name="Tableau51.B"/>
        <table:table-column table:style-name="Tableau51.C" table:number-columns-repeated="2"/>
        <table:table-column table:style-name="Tableau51.E"/>
        <table:table-column table:style-name="Tableau51.F"/>
        <table:table-column table:style-name="Tableau51.G"/>
        <table:table-column table:style-name="Tableau51.H"/>
        <table:table-header-rows>
          <table:table-row>
            <table:table-cell table:style-name="Tableau51.A1" office:value-type="string">
              <text:p text:style-name="P40">Security group</text:p>
            </table:table-cell>
            <table:table-cell table:style-name="Tableau51.A1" office:value-type="string">
              <text:p text:style-name="P40">Nom</text:p>
            </table:table-cell>
            <table:table-cell table:style-name="Tableau51.A1" office:value-type="string">
              <text:p text:style-name="P40">Règles</text:p>
            </table:table-cell>
            <table:table-cell table:style-name="Tableau51.A1" office:value-type="string">
              <text:p text:style-name="P40">Type</text:p>
            </table:table-cell>
            <table:table-cell table:style-name="Tableau51.A1" office:value-type="string">
              <text:p text:style-name="P40">Protocole</text:p>
            </table:table-cell>
            <table:table-cell table:style-name="Tableau51.A1" office:value-type="string">
              <text:p text:style-name="P40">Port min</text:p>
            </table:table-cell>
            <table:table-cell table:style-name="Tableau51.A1" office:value-type="string">
              <text:p text:style-name="P40">Port max</text:p>
            </table:table-cell>
            <table:table-cell table:style-name="Tableau51.A1" office:value-type="string">
              <text:p text:style-name="P40">IP distante</text:p>
            </table:table-cell>
          </table:table-row>
        </table:table-header-rows>
        <table:table-row>
          <table:table-cell table:style-name="Tableau51.A1" office:value-type="string">
            <text:p text:style-name="P39">security_group_rp_internet</text:p>
          </table:table-cell>
          <table:table-cell table:style-name="Tableau51.A1" office:value-type="string">
            <text:p text:style-name="P39">proxy-internet</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loadbalancer-cds-internet}</text:p>
          </table:table-cell>
        </table:table-row>
        <table:table-row>
          <table:table-cell table:style-name="Tableau51.A1" office:value-type="string">
            <text:p text:style-name="P39">security_group_rp_rie</text:p>
          </table:table-cell>
          <table:table-cell table:style-name="Tableau51.A1" office:value-type="string">
            <text:p text:style-name="P39">proxy-rie</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loadbalancer-cds-rie}</text:p>
          </table:table-cell>
        </table:table-row>
        <table:table-row>
          <table:table-cell table:style-name="Tableau51.A1" office:value-type="string">
            <text:p text:style-name="P39">security_group_rp_minint</text:p>
          </table:table-cell>
          <table:table-cell table:style-name="Tableau51.A1" office:value-type="string">
            <text:p text:style-name="P39">proxy-minint</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loadbalancer-cds-minint}</text:p>
          </table:table-cell>
        </table:table-row>
        <table:table-row>
          <table:table-cell table:style-name="Tableau51.A1" office:value-type="string">
            <text:p text:style-name="P39">security_group_pio</text:p>
          </table:table-cell>
          <table:table-cell table:style-name="Tableau51.A1" office:value-type="string">
            <text:p text:style-name="P39">proxy-io</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backend-et-batch}</text:p>
          </table:table-cell>
        </table:table-row>
        <table:table-row>
          <table:table-cell table:style-name="Tableau51.A1" office:value-type="string">
            <text:p text:style-name="P39">security_group_pio</text:p>
          </table:table-cell>
          <table:table-cell table:style-name="Tableau51.A1" office:value-type="string">
            <text:p text:style-name="P39">proxy-io</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ines-api-sas-se}</text:p>
          </table:table-cell>
        </table:table-row>
        <table:table-row>
          <table:table-cell table:style-name="Tableau51.A1" office:value-type="string">
            <text:p text:style-name="P39">security_group_padm</text:p>
          </table:table-cell>
          <table:table-cell table:style-name="Tableau51.A1" office:value-type="string">
            <text:p text:style-name="P39">proxy-adm</text:p>
          </table:table-cell>
          <table:table-cell table:style-name="Tableau51.A1" office:value-type="string">
            <text:p text:style-name="P39">ssh</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22</text:p>
          </table:table-cell>
          <table:table-cell table:style-name="Tableau51.A1" office:value-type="string">
            <text:p text:style-name="P39">22</text:p>
          </table:table-cell>
          <table:table-cell table:style-name="Tableau51.A1" office:value-type="string">
            <text:p text:style-name="P39">{ip-bastion}</text:p>
          </table:table-cell>
        </table:table-row>
        <table:table-row>
          <table:table-cell table:style-name="Tableau51.A1" office:value-type="string">
            <text:p text:style-name="P39">security_group_padm</text:p>
          </table:table-cell>
          <table:table-cell table:style-name="Tableau51.A1" office:value-type="string">
            <text:p text:style-name="P39">proxy-adm</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bastion}</text:p>
          </table:table-cell>
        </table:table-row>
        <table:table-row>
          <table:table-cell table:style-name="Tableau51.A1" office:value-type="string">
            <text:p text:style-name="P39">security_group_padm</text:p>
          </table:table-cell>
          <table:table-cell table:style-name="Tableau51.A1" office:value-type="string">
            <text:p text:style-name="P39">proxy-adm</text:p>
          </table:table-cell>
          <table:table-cell table:style-name="Tableau51.A1" office:value-type="string">
            <text:p text:style-name="P39">https</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443</text:p>
          </table:table-cell>
          <table:table-cell table:style-name="Tableau51.A1" office:value-type="string">
            <text:p text:style-name="P39">443</text:p>
          </table:table-cell>
          <table:table-cell table:style-name="Tableau51.A1" office:value-type="string">
            <text:p text:style-name="P39">{ip-lbastion}</text:p>
          </table:table-cell>
        </table:table-row>
        <table:table-row>
          <table:table-cell table:style-name="Tableau51.A1" office:value-type="string">
            <text:p text:style-name="P39">security_group_front</text:p>
          </table:table-cell>
          <table:table-cell table:style-name="Tableau51.A1" office:value-type="string">
            <text:p text:style-name="P39">frontend</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proxys}</text:p>
          </table:table-cell>
        </table:table-row>
        <table:table-row>
          <table:table-cell table:style-name="Tableau51.A1" office:value-type="string">
            <text:p text:style-name="P39">security_group_back</text:p>
          </table:table-cell>
          <table:table-cell table:style-name="Tableau51.A1" office:value-type="string">
            <text:p text:style-name="P39">backend</text:p>
          </table:table-cell>
          <table:table-cell table:style-name="Tableau51.A1" office:value-type="string">
            <text:p text:style-name="P39">http</text:p>
          </table:table-cell>
          <table:table-cell table:style-name="Tableau51.A1" office:value-type="string">
            <text:p text:style-name="P39">entrant</text:p>
          </table:table-cell>
          <table:table-cell table:style-name="Tableau51.A1" office:value-type="string">
            <text:p text:style-name="P39">TCP</text:p>
          </table:table-cell>
          <table:table-cell table:style-name="Tableau51.A1" office:value-type="string">
            <text:p text:style-name="P39">80</text:p>
          </table:table-cell>
          <table:table-cell table:style-name="Tableau51.A1" office:value-type="string">
            <text:p text:style-name="P39">80</text:p>
          </table:table-cell>
          <table:table-cell table:style-name="Tableau51.A1" office:value-type="string">
            <text:p text:style-name="P39">{ip-proxys}</text:p>
          </table:table-cell>
        </table:table-row>
        <table:table-row>
          <table:table-cell table:style-name="Tableau51.A1" office:value-type="string">
            <text:p text:style-name="P39">security_group_bdd</text:p>
          </table:table-cell>
          <table:table-cell table:style-name="Tableau51.A1" office:value-type="string">
            <text:p text:style-name="P39">bdd</text:p>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9">{ip-backends}</text:p>
          </table:table-cell>
        </table:table-row>
        <table:table-row>
          <table:table-cell table:style-name="Tableau51.A1" office:value-type="string">
            <text:p text:style-name="P39">security_group_batch</text:p>
          </table:table-cell>
          <table:table-cell table:style-name="Tableau51.A1" office:value-type="string">
            <text:p text:style-name="P39">batch</text:p>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row>
        <table:table-row>
          <table:table-cell table:style-name="Tableau51.A1" office:value-type="string">
            <text:p text:style-name="P39">security_group_dns</text:p>
          </table:table-cell>
          <table:table-cell table:style-name="Tableau51.A1" office:value-type="string">
            <text:p text:style-name="P39">dns</text:p>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row>
        <table:table-row>
          <table:table-cell table:style-name="Tableau51.A1" office:value-type="string">
            <text:p text:style-name="P39">security_group_logs</text:p>
          </table:table-cell>
          <table:table-cell table:style-name="Tableau51.A1" office:value-type="string">
            <text:p text:style-name="P39">logs</text:p>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row>
        <table:table-row>
          <table:table-cell table:style-name="Tableau51.A1" office:value-type="string">
            <text:p text:style-name="P39">security_group_spv</text:p>
          </table:table-cell>
          <table:table-cell table:style-name="Tableau51.A1" office:value-type="string">
            <text:p text:style-name="P39">supervision</text:p>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cell table:style-name="Tableau51.A1" office:value-type="string">
            <text:p text:style-name="P38"/>
          </table:table-cell>
        </table:table-row>
      </table:table>
      <text:p text:style-name="Normal"/>
      <text:p text:style-name="Normal"/>
      <text:p text:style-name="Normal"><text:soft-page-break/></text:p>
      <text:h text:style-name="Heading_20_2" text:outline-level="2"><text:bookmark-start text:name="__RefHeading___Toc9982_1783990655"/><text:s/><text:bookmark-start text:name="_Toc177568982"/><text:bookmark-start text:name="_Toc177652161"/><text:bookmark-start text:name="_Toc177652625"/><text:bookmark-start text:name="_Toc177660746"/>Réseaux<text:bookmark-end text:name="__RefHeading___Toc9982_1783990655"/><text:bookmark-end text:name="_Toc177568982"/><text:bookmark-end text:name="_Toc177652161"/><text:bookmark-end text:name="_Toc177652625"/><text:bookmark-end text:name="_Toc177660746"/></text:h>
      <text:p text:style-name="P82">{ A compléter <text:span text:style-name="T88">si nécessaire </text:span><text:span text:style-name="T38">pour un environnement de type cloud pi iaas</text:span>}</text:p>
      <text:p text:style-name="Normal"><text:span text:style-name="Police_20_par_20_défaut"><text:span text:style-name="T1"><draw:frame draw:style-name="fr2" draw:name="Image 10" text:anchor-type="as-char" svg:y="0cm" svg:width="17.6cm" style:rel-width="scale" svg:height="10.481cm" style:rel-height="scale" draw:z-index="8"><draw:image xlink:href="Pictures/10000001000002A800000195FC886072.png" xlink:type="simple" xlink:show="embed" xlink:actuate="onLoad" draw:mime-type="image/png"/></draw:frame></text:span></text:span></text:p>
      <text:p text:style-name="Normal"/>
      <text:h text:style-name="Heading_20_2" text:outline-level="2"><text:bookmark-start text:name="__RefHeading___Toc9984_1783990655"/><text:s/><text:bookmark-start text:name="_Toc177568983"/><text:bookmark-start text:name="_Toc177652162"/><text:bookmark-start text:name="_Toc177652626"/><text:bookmark-start text:name="_Toc177660747"/>Server Groups<text:bookmark-end text:name="__RefHeading___Toc9984_1783990655"/><text:bookmark-end text:name="_Toc177568983"/><text:bookmark-end text:name="_Toc177652162"/><text:bookmark-end text:name="_Toc177652626"/><text:bookmark-end text:name="_Toc177660747"/></text:h>
      <text:p text:style-name="P82">{ A compléter <text:span text:style-name="T88">si nécessaire </text:span><text:span text:style-name="T38">pour un environnement de type cloud pi iaas</text:span>}</text:p>
      <table:table table:name="Tableau52" table:style-name="Tableau52">
        <table:table-column table:style-name="Tableau52.A"/>
        <table:table-column table:style-name="Tableau52.B" table:number-columns-repeated="2"/>
        <table:table-row>
          <table:table-cell table:style-name="Tableau52.A1" office:value-type="string">
            <text:p text:style-name="P74">Server group</text:p>
          </table:table-cell>
          <table:table-cell table:style-name="Tableau52.A1" office:value-type="string">
            <text:p text:style-name="P74">Règles (policies)</text:p>
          </table:table-cell>
          <table:table-cell table:style-name="Tableau52.A1" office:value-type="string">
            <text:p text:style-name="P74">Nom</text:p>
          </table:table-cell>
        </table:table-row>
        <table:table-row>
          <table:table-cell table:style-name="Tableau52.A1" office:value-type="string">
            <text:p text:style-name="Sans_20_interligne">server_group_rp_internet</text:p>
          </table:table-cell>
          <table:table-cell table:style-name="Tableau52.A1" office:value-type="string">
            <text:p text:style-name="Sans_20_interligne">anti-affinity</text:p>
          </table:table-cell>
          <table:table-cell table:style-name="Tableau52.A1" office:value-type="string">
            <text:p text:style-name="Sans_20_interligne">proxy-internet</text:p>
          </table:table-cell>
        </table:table-row>
        <table:table-row>
          <table:table-cell table:style-name="Tableau52.A1" office:value-type="string">
            <text:p text:style-name="Sans_20_interligne">server_group_rp_rie</text:p>
          </table:table-cell>
          <table:table-cell table:style-name="Tableau52.A1" office:value-type="string">
            <text:p text:style-name="Sans_20_interligne">anti-affinity</text:p>
          </table:table-cell>
          <table:table-cell table:style-name="Tableau52.A1" office:value-type="string">
            <text:p text:style-name="Sans_20_interligne">proxy-rie</text:p>
          </table:table-cell>
        </table:table-row>
        <table:table-row>
          <table:table-cell table:style-name="Tableau52.A1" office:value-type="string">
            <text:p text:style-name="Sans_20_interligne">server_group_rp_minint</text:p>
          </table:table-cell>
          <table:table-cell table:style-name="Tableau52.A1" office:value-type="string">
            <text:p text:style-name="Sans_20_interligne">anti-affinity</text:p>
          </table:table-cell>
          <table:table-cell table:style-name="Tableau52.A1" office:value-type="string">
            <text:p text:style-name="Sans_20_interligne">proxy-minint</text:p>
          </table:table-cell>
        </table:table-row>
        <table:table-row>
          <table:table-cell table:style-name="Tableau52.A1" office:value-type="string">
            <text:p text:style-name="Sans_20_interligne">server_group_pio</text:p>
          </table:table-cell>
          <table:table-cell table:style-name="Tableau52.A1" office:value-type="string">
            <text:p text:style-name="Sans_20_interligne">anti-affinity</text:p>
          </table:table-cell>
          <table:table-cell table:style-name="Tableau52.A1" office:value-type="string">
            <text:p text:style-name="Sans_20_interligne">proxy-io</text:p>
          </table:table-cell>
        </table:table-row>
        <table:table-row>
          <table:table-cell table:style-name="Tableau52.A1" office:value-type="string">
            <text:p text:style-name="Sans_20_interligne">server_group_padm</text:p>
          </table:table-cell>
          <table:table-cell table:style-name="Tableau52.A1" office:value-type="string">
            <text:p text:style-name="Sans_20_interligne">anti-affinity</text:p>
          </table:table-cell>
          <table:table-cell table:style-name="Tableau52.A1" office:value-type="string">
            <text:p text:style-name="Sans_20_interligne">proxy-adm</text:p>
          </table:table-cell>
        </table:table-row>
        <table:table-row>
          <table:table-cell table:style-name="Tableau52.A1" office:value-type="string">
            <text:p text:style-name="Sans_20_interligne">server_group_front</text:p>
          </table:table-cell>
          <table:table-cell table:style-name="Tableau52.A1" office:value-type="string">
            <text:p text:style-name="Sans_20_interligne">anti-affinity</text:p>
          </table:table-cell>
          <table:table-cell table:style-name="Tableau52.A1" office:value-type="string">
            <text:p text:style-name="Sans_20_interligne">frontend</text:p>
          </table:table-cell>
        </table:table-row>
        <table:table-row>
          <table:table-cell table:style-name="Tableau52.A1" office:value-type="string">
            <text:p text:style-name="Sans_20_interligne">server_group_back</text:p>
          </table:table-cell>
          <table:table-cell table:style-name="Tableau52.A1" office:value-type="string">
            <text:p text:style-name="Sans_20_interligne">anti-affinity</text:p>
          </table:table-cell>
          <table:table-cell table:style-name="Tableau52.A1" office:value-type="string">
            <text:p text:style-name="Sans_20_interligne">backend</text:p>
          </table:table-cell>
        </table:table-row>
        <table:table-row>
          <table:table-cell table:style-name="Tableau52.A1" office:value-type="string">
            <text:p text:style-name="Sans_20_interligne">server_group_bdd</text:p>
          </table:table-cell>
          <table:table-cell table:style-name="Tableau52.A1" office:value-type="string">
            <text:p text:style-name="Sans_20_interligne">anti-affinity</text:p>
          </table:table-cell>
          <table:table-cell table:style-name="Tableau52.A1" office:value-type="string">
            <text:p text:style-name="Sans_20_interligne">bdd</text:p>
          </table:table-cell>
        </table:table-row>
        <table:table-row>
          <table:table-cell table:style-name="Tableau52.A1" office:value-type="string">
            <text:p text:style-name="Sans_20_interligne">server_group_batch</text:p>
          </table:table-cell>
          <table:table-cell table:style-name="Tableau52.A1" office:value-type="string">
            <text:p text:style-name="Sans_20_interligne">anti-affinity</text:p>
          </table:table-cell>
          <table:table-cell table:style-name="Tableau52.A1" office:value-type="string">
            <text:p text:style-name="Sans_20_interligne">batch</text:p>
          </table:table-cell>
        </table:table-row>
        <table:table-row>
          <table:table-cell table:style-name="Tableau52.A1" office:value-type="string">
            <text:p text:style-name="Sans_20_interligne">server_group_dns</text:p>
          </table:table-cell>
          <table:table-cell table:style-name="Tableau52.A1" office:value-type="string">
            <text:p text:style-name="Sans_20_interligne">anti-affinity</text:p>
          </table:table-cell>
          <table:table-cell table:style-name="Tableau52.A1" office:value-type="string">
            <text:p text:style-name="Sans_20_interligne">dns</text:p>
          </table:table-cell>
        </table:table-row>
        <table:table-row>
          <table:table-cell table:style-name="Tableau52.A1" office:value-type="string">
            <text:p text:style-name="Sans_20_interligne">server_group_logs</text:p>
          </table:table-cell>
          <table:table-cell table:style-name="Tableau52.A1" office:value-type="string">
            <text:p text:style-name="Sans_20_interligne">anti-affinity</text:p>
          </table:table-cell>
          <table:table-cell table:style-name="Tableau52.A1" office:value-type="string">
            <text:p text:style-name="Sans_20_interligne">logs</text:p>
          </table:table-cell>
        </table:table-row>
        <table:table-row>
          <table:table-cell table:style-name="Tableau52.A1" office:value-type="string">
            <text:p text:style-name="Sans_20_interligne">server_group_spv</text:p>
          </table:table-cell>
          <table:table-cell table:style-name="Tableau52.A1" office:value-type="string">
            <text:p text:style-name="Sans_20_interligne">anti-affinity</text:p>
          </table:table-cell>
          <table:table-cell table:style-name="Tableau52.A1" office:value-type="string">
            <text:p text:style-name="Sans_20_interligne">supervision</text:p>
          </table:table-cell>
        </table:table-row>
      </table:table>
      <text:p text:style-name="Normal"/>
      <text:h text:style-name="Heading_20_2" text:outline-level="2"><text:bookmark-start text:name="_Toc177660748"/><text:bookmark-start text:name="_Toc177652627"/><text:bookmark-start text:name="_Toc177652163"/><text:bookmark-start text:name="__RefHeading___Toc9986_1783990655"/><text:bookmark-start text:name="_Toc177568984"/>Livraison<text:bookmark-end text:name="_Toc177660748"/><text:bookmark-end text:name="_Toc177652627"/><text:bookmark-end text:name="_Toc177652163"/><text:bookmark-end text:name="__RefHeading___Toc9986_1783990655"/><text:bookmark-end text:name="_Toc177568984"/></text:h>
      <text:p text:style-name="Normal">L’application étant hébergée au ministère, les codes sources sont intégrées dans les outils de versionning et CI-CD de la forge pour générer l’ensemble des applications nécessaires au projet.</text:p>
      <text:p text:style-name="Normal">Transfert des sources au ministère de l’intérieur par les équipes de développement externe</text:p>
      <text:list text:style-name="L8">
        <text:list-item>
          <text:p text:style-name="P144">les sources doivent être chiffrées (avec ZED)</text:p>
        </text:list-item>
        <text:list-item>
          <text:p text:style-name="P144"><text:soft-page-break/>puis envoyées en utilisant le service envol</text:p>
        </text:list-item>
        <text:list-item>
          <text:p text:style-name="P144">l’intégrateur ajoute ensuite la nouvelle version au gitlab interne</text:p>
        </text:list-item>
      </text:list>
      <text:p text:style-name="Normal"/>
      <text:p text:style-name="Normal"/>
      <text:h text:style-name="Heading_20_2" text:outline-level="2"><text:bookmark-start text:name="_Toc177568985"/><text:bookmark-start text:name="_Toc177652164"/><text:bookmark-start text:name="_Toc177652628"/><text:bookmark-start text:name="_Toc177660749"/><text:bookmark-start text:name="__RefHeading___Toc9988_1783990655"/>Gestion des secrets<text:bookmark-end text:name="_Toc177568985"/><text:bookmark-end text:name="_Toc177652164"/><text:bookmark-end text:name="_Toc177652628"/><text:bookmark-end text:name="_Toc177660749"/><text:bookmark-end text:name="__RefHeading___Toc9988_1783990655"/></text:h>
      <text:p text:style-name="P83">{ A compléter}</text:p>
      <text:p text:style-name="Normal"/>
      <text:h text:style-name="Heading_20_2" text:outline-level="2"><text:bookmark-start text:name="_Toc177660750"/><text:bookmark-start text:name="_Toc177652629"/><text:bookmark-start text:name="_Toc177652165"/><text:bookmark-start text:name="__RefHeading___Toc9990_1783990655"/><text:bookmark-start text:name="_Toc177568986"/>Technologies de déploiement<text:bookmark-end text:name="_Toc177660750"/><text:bookmark-end text:name="_Toc177652629"/><text:bookmark-end text:name="_Toc177652165"/><text:bookmark-end text:name="__RefHeading___Toc9990_1783990655"/><text:bookmark-end text:name="_Toc177568986"/></text:h>
      <table:table table:name="Tableau53" table:style-name="Tableau53">
        <table:table-column table:style-name="Tableau53.A" table:number-columns-repeated="2"/>
        <table:table-row>
          <table:table-cell table:style-name="Tableau53.A1" office:value-type="string">
            <text:p text:style-name="P74">Périmètre</text:p>
          </table:table-cell>
          <table:table-cell table:style-name="Tableau53.A1" office:value-type="string">
            <text:p text:style-name="P74">Technologie</text:p>
          </table:table-cell>
        </table:table-row>
        <table:table-row>
          <table:table-cell table:style-name="Tableau53.A1" office:value-type="string">
            <text:p text:style-name="Sans_20_interligne">Scripts d’infrastructure</text:p>
          </table:table-cell>
          <table:table-cell table:style-name="Tableau53.A1" office:value-type="string">
            <text:p text:style-name="Sans_20_interligne">Terraform, Heat</text:p>
          </table:table-cell>
        </table:table-row>
        <table:table-row>
          <table:table-cell table:style-name="Tableau53.A1" office:value-type="string">
            <text:p text:style-name="Sans_20_interligne">Scripts de déploiement</text:p>
          </table:table-cell>
          <table:table-cell table:style-name="Tableau53.A1" office:value-type="string">
            <text:p text:style-name="Sans_20_interligne">Ansible</text:p>
          </table:table-cell>
        </table:table-row>
        <table:table-row>
          <table:table-cell table:style-name="Tableau53.A1" office:value-type="string">
            <text:p text:style-name="Sans_20_interligne">Automatisation des pipelines</text:p>
          </table:table-cell>
          <table:table-cell table:style-name="Tableau53.A1" office:value-type="string">
            <text:p text:style-name="Sans_20_interligne">Gitlab Runner, Jenkins</text:p>
          </table:table-cell>
        </table:table-row>
        <table:table-row>
          <table:table-cell table:style-name="Tableau53.A1" office:value-type="string">
            <text:p text:style-name="Sans_20_interligne">Mode de déploiement</text:p>
          </table:table-cell>
          <table:table-cell table:style-name="Tableau53.A1" office:value-type="string">
            <text:p text:style-name="Sans_20_interligne">Blue Green (Forge), Canary, Rolling</text:p>
          </table:table-cell>
        </table:table-row>
      </table:table>
      <text:p text:style-name="Normal"/>
      <text:p text:style-name="first-paragraph">Ressources complémentaires</text:p>
      <text:list text:style-name="L9">
        <text:list-item>
          <text:p text:style-name="P154"><text:a xlink:type="simple" xlink:href="https://gitlab.forge-dc.cloudmi.minint.fr/forgedc/" office:target-frame-name="_top" xlink:show="replace" text:style-name="Internet_20_link" text:visited-style-name="Visited_20_Internet_20_Link"><text:span text:style-name="T34">Forge DC</text:span></text:a></text:p>
        </text:list-item>
        <text:list-item>
          <text:p text:style-name="P154"><text:a xlink:type="simple" xlink:href="https://gitlab.forge-dc.cloudmi.minint.fr/communautes/documentations/" office:target-frame-name="_top" xlink:show="replace" text:style-name="Internet_20_link" text:visited-style-name="Visited_20_Internet_20_Link"><text:span text:style-name="Lien_20_hypertexte"><text:span text:style-name="T3">Communautés - Documentations forge</text:span></text:span></text:a></text:p>
        </text:list-item>
        <text:list-item>
          <text:p text:style-name="P154"><text:a xlink:type="simple" xlink:href="https://gitlab.forge-dc.cloudmi.minint.fr/communautes/ateliers/" office:target-frame-name="_top" xlink:show="replace" text:style-name="Internet_20_link" text:visited-style-name="Visited_20_Internet_20_Link"><text:span text:style-name="Lien_20_hypertexte"><text:span text:style-name="T3">Communautés – Ateliers</text:span></text:span></text:a></text:p>
        </text:list-item>
        <text:list-item>
          <text:p text:style-name="P155"><text:a xlink:type="simple" xlink:href="https://cloud-pi-native.fr/guide/deployment-with-argo#deploiement-de-votre-application" text:style-name="Internet_20_link" text:visited-style-name="Visited_20_Internet_20_Link"><text:span text:style-name="Lien_20_hypertexte"><text:span text:style-name="T5">Cloud PI Native</text:span></text:span></text:a></text:p>
        </text:list-item>
      </text:list>
      <text:p text:style-name="Normal"/>
      <text:h text:style-name="Heading_20_2" text:outline-level="2"><text:bookmark-start text:name="__RefHeading___Toc9992_1783990655"/><text:s/><text:bookmark-start text:name="_Toc177568987"/><text:bookmark-start text:name="_Toc177652166"/><text:bookmark-start text:name="_Toc177652630"/><text:bookmark-start text:name="_Toc177660751"/>Maintien en condition opérationnelle<text:bookmark-end text:name="__RefHeading___Toc9992_1783990655"/><text:bookmark-end text:name="_Toc177568987"/><text:bookmark-end text:name="_Toc177652166"/><text:bookmark-end text:name="_Toc177652630"/><text:bookmark-end text:name="_Toc177660751"/></text:h>
      <text:p text:style-name="Normal"/>
      <text:h text:style-name="Heading_20_1" text:outline-level="1"><text:bookmark-start text:name="_Toc177660752"/><text:bookmark-start text:name="_Toc177652631"/><text:bookmark-start text:name="_Toc177652167"/><text:bookmark-start text:name="__RefHeading___Toc9994_1783990655"/><text:bookmark-start text:name="_Toc177568988"/>Tests<text:bookmark-end text:name="_Toc177660752"/><text:bookmark-end text:name="_Toc177652631"/><text:bookmark-end text:name="_Toc177652167"/><text:bookmark-end text:name="__RefHeading___Toc9994_1783990655"/><text:bookmark-end text:name="_Toc177568988"/></text:h>
      <text:p text:style-name="Normal"/>
      <text:h text:style-name="Heading_20_2" text:outline-level="2"><text:bookmark-start text:name="_Toc177660753"/><text:bookmark-start text:name="_Toc177652632"/><text:bookmark-start text:name="_Toc177652168"/><text:bookmark-start text:name="__RefHeading___Toc9996_1783990655"/><text:bookmark-start text:name="_Toc177568989"/>Résumé des tests<text:bookmark-end text:name="_Toc177660753"/><text:bookmark-end text:name="_Toc177652632"/><text:bookmark-end text:name="_Toc177652168"/><text:bookmark-end text:name="__RefHeading___Toc9996_1783990655"/><text:bookmark-end text:name="_Toc177568989"/></text:h>
      <table:table table:name="Tableau54" table:style-name="Tableau54">
        <table:table-column table:style-name="Tableau54.A" table:number-columns-repeated="2"/>
        <table:table-row>
          <table:table-cell table:style-name="Tableau54.A1" office:value-type="string">
            <text:p text:style-name="western1">Type de test</text:p>
          </table:table-cell>
          <table:table-cell table:style-name="Tableau54.A1" office:value-type="string">
            <text:p text:style-name="western1">Implémentation</text:p>
          </table:table-cell>
        </table:table-row>
        <table:table-row>
          <table:table-cell table:style-name="Tableau54.A1" office:value-type="string">
            <text:p text:style-name="Sans_20_interligne">Qualité de code</text:p>
          </table:table-cell>
          <table:table-cell table:style-name="Tableau54.A1" office:value-type="string">
            <text:p text:style-name="Sans_20_interligne">[oui / non] + outils</text:p>
          </table:table-cell>
        </table:table-row>
        <table:table-row>
          <table:table-cell table:style-name="Tableau54.A1" office:value-type="string">
            <text:p text:style-name="Sans_20_interligne">Tests unitaires</text:p>
          </table:table-cell>
          <table:table-cell table:style-name="Tableau54.A1" office:value-type="string">
            <text:p text:style-name="Sans_20_interligne">[oui / non] + couverture minimum</text:p>
          </table:table-cell>
        </table:table-row>
        <table:table-row>
          <table:table-cell table:style-name="Tableau54.A1" office:value-type="string">
            <text:p text:style-name="Sans_20_interligne">Tests de vulnérabilité</text:p>
          </table:table-cell>
          <table:table-cell table:style-name="Tableau54.A1" office:value-type="string">
            <text:p text:style-name="Sans_20_interligne">[oui / non] + périmètre couvert</text:p>
          </table:table-cell>
        </table:table-row>
        <table:table-row>
          <table:table-cell table:style-name="Tableau54.A1" office:value-type="string">
            <text:p text:style-name="Sans_20_interligne">Tests d’intégration</text:p>
          </table:table-cell>
          <table:table-cell table:style-name="Tableau54.A1" office:value-type="string">
            <text:p text:style-name="Sans_20_interligne">[oui / non] + périmètre couvert</text:p>
          </table:table-cell>
        </table:table-row>
        <table:table-row>
          <table:table-cell table:style-name="Tableau54.A1" office:value-type="string">
            <text:p text:style-name="Sans_20_interligne">Tests de performance</text:p>
          </table:table-cell>
          <table:table-cell table:style-name="Tableau54.A1" office:value-type="string">
            <text:p text:style-name="Sans_20_interligne">[oui / non] + périmètre couvert</text:p>
          </table:table-cell>
        </table:table-row>
        <table:table-row>
          <table:table-cell table:style-name="Tableau54.A1" office:value-type="string">
            <text:p text:style-name="Sans_20_interligne">Tests d’acceptation</text:p>
          </table:table-cell>
          <table:table-cell table:style-name="Tableau54.A1" office:value-type="string">
            <text:p text:style-name="Sans_20_interligne">[oui / non] + type</text:p>
          </table:table-cell>
        </table:table-row>
        <table:table-row>
          <table:table-cell table:style-name="Tableau54.A1" office:value-type="string">
            <text:p text:style-name="Sans_20_interligne">Tests de pénétration</text:p>
          </table:table-cell>
          <table:table-cell table:style-name="Tableau54.A1" office:value-type="string">
            <text:p text:style-name="Sans_20_interligne">[oui / non] + périmètre couvert</text:p>
          </table:table-cell>
        </table:table-row>
        <table:table-row>
          <table:table-cell table:style-name="Tableau54.A1" office:value-type="string">
            <text:p text:style-name="Sans_20_interligne">Tests de conversion</text:p>
          </table:table-cell>
          <table:table-cell table:style-name="Tableau54.A1" office:value-type="string">
            <text:p text:style-name="Sans_20_interligne">[oui / non]</text:p>
          </table:table-cell>
        </table:table-row>
      </table:table>
      <text:p text:style-name="Normal"/>
      <text:h text:style-name="Heading_20_1" text:outline-level="1"><text:bookmark-start text:name="_Toc177568990"/><text:bookmark-start text:name="_Toc177652169"/><text:bookmark-start text:name="_Toc177652633"/><text:bookmark-start text:name="__RefHeading___Toc9998_1783990655"/><text:bookmark-start text:name="_Toc177660754"/><text:soft-page-break/>Sécurité<text:bookmark-end text:name="_Toc177568990"/><text:bookmark-end text:name="_Toc177652169"/><text:bookmark-end text:name="_Toc177652633"/><text:bookmark-end text:name="__RefHeading___Toc9998_1783990655"/><text:bookmark-end text:name="_Toc177660754"/></text:h>
      <text:p text:style-name="Normal"/>
      <text:h text:style-name="Heading_20_2" text:outline-level="2"><text:bookmark-start text:name="_Toc177568991"/><text:bookmark-start text:name="_Toc177652170"/><text:bookmark-start text:name="_Toc177652634"/><text:bookmark-start text:name="__RefHeading___Toc10000_1783990655"/><text:bookmark-start text:name="_Toc177660755"/>Analyse de risque<text:bookmark-end text:name="_Toc177568991"/><text:bookmark-end text:name="_Toc177652170"/><text:bookmark-end text:name="_Toc177652634"/><text:bookmark-end text:name="__RefHeading___Toc10000_1783990655"/><text:bookmark-end text:name="_Toc177660755"/></text:h>
      <text:p text:style-name="P93">{ A compléter <text:s/>si nécessaire }</text:p>
      <text:h text:style-name="Heading_20_2" text:outline-level="2"><text:bookmark-start text:name="_Toc177568992"/><text:bookmark-start text:name="_Toc177652171"/><text:bookmark-start text:name="_Toc177652635"/><text:bookmark-start text:name="__RefHeading___Toc10002_1783990655"/><text:bookmark-start text:name="_Toc177660756"/>Homologation<text:bookmark-end text:name="_Toc177568992"/><text:bookmark-end text:name="_Toc177652171"/><text:bookmark-end text:name="_Toc177652635"/><text:bookmark-end text:name="__RefHeading___Toc10002_1783990655"/><text:bookmark-end text:name="_Toc177660756"/></text:h>
      <table:table table:name="Tableau55" table:style-name="Tableau55">
        <table:table-column table:style-name="Tableau55.A" table:number-columns-repeated="2"/>
        <table:table-row>
          <table:table-cell table:style-name="Tableau55.A1" office:value-type="string">
            <text:p text:style-name="P75">homologation</text:p>
          </table:table-cell>
          <table:table-cell table:style-name="Tableau55.A1" office:value-type="string">
            <text:p text:style-name="P75">[ élémentaire, standard, renforcée ]</text:p>
          </table:table-cell>
        </table:table-row>
      </table:table>
      <text:p text:style-name="Normal"/>
      <text:h text:style-name="Heading_20_2" text:outline-level="2"><text:bookmark-start text:name="__RefHeading___Toc10004_1783990655"/><text:s/><text:bookmark-start text:name="_Toc177568993"/><text:bookmark-start text:name="_Toc177652172"/><text:bookmark-start text:name="_Toc177652636"/><text:bookmark-start text:name="_Toc177660757"/>Chaîne de service<text:bookmark-end text:name="__RefHeading___Toc10004_1783990655"/><text:bookmark-end text:name="_Toc177568993"/><text:bookmark-end text:name="_Toc177652172"/><text:bookmark-end text:name="_Toc177652636"/><text:bookmark-end text:name="_Toc177660757"/></text:h>
      <text:p text:style-name="Normal">La chaîne de service est l’élément mutualisé qui se situe entre les réseaux d’accès (RIE et internet) et les centres d’hébergement.<text:line-break/>La chaîne de service contient les éléments comme la gestion DNS mais aussi des éléments de sécurité.</text:p>
      <text:p text:style-name="Normal">Actuellement les proxy protègent contre les attaques de DDoS et portent les certificats de chiffrement des connexions.</text:p>
      <text:p text:style-name="Normal">les pare-feu limitent l’accès aux connexions autorisées.<text:line-break/>Les IPS bloques les tentatives d’intrusion connues.<text:line-break/>Les IDS permettent de détecter les activités anormales ou suspectes.</text:p>
      <text:p text:style-name="Normal">L’application se situe derrière ces éléments de sécurité et gère les autres aspects de sécurité, communs aux applications web (comme la sécurité logicielle) et spécifiques si nécessaire.</text:p>
      <text:p text:style-name="Normal"/>
      <text:h text:style-name="Heading_20_2" text:outline-level="2"><text:bookmark-start text:name="_Toc177660758"/><text:bookmark-start text:name="_Toc177652637"/><text:bookmark-start text:name="_Toc177652173"/><text:bookmark-start text:name="_Toc177568994"/><text:bookmark-start text:name="__RefHeading___Toc10006_1783990655"/>Upload<text:bookmark-end text:name="_Toc177660758"/><text:bookmark-end text:name="_Toc177652637"/><text:bookmark-end text:name="_Toc177652173"/><text:bookmark-end text:name="_Toc177568994"/><text:bookmark-end text:name="__RefHeading___Toc10006_1783990655"/></text:h>
      <text:p text:style-name="Normal">L’ensemble des fichiers <text:span text:style-name="T39">téléchargés</text:span> vers l’application passent par l’analyse antivirus.</text:p>
      <text:p text:style-name="Normal">L’antivirus est placé au niveau de la chaîne de service et permet d’avoir uniquement des fichiers analyser arrivant dans l’application.</text:p>
      <text:p text:style-name="Normal"/>
      <text:h text:style-name="Heading_20_2" text:outline-level="2"><text:bookmark-start text:name="_Toc177568995"/><text:bookmark-start text:name="_Toc177652174"/><text:bookmark-start text:name="_Toc177652638"/><text:bookmark-start text:name="__RefHeading___Toc10008_1783990655"/><text:bookmark-start text:name="_Toc177660759"/>Librairies logicielles<text:bookmark-end text:name="_Toc177568995"/><text:bookmark-end text:name="_Toc177652174"/><text:bookmark-end text:name="_Toc177652638"/><text:bookmark-end text:name="__RefHeading___Toc10008_1783990655"/><text:bookmark-end text:name="_Toc177660759"/></text:h>
      <text:h text:style-name="Heading_20_3" text:outline-level="3"><text:bookmark-start text:name="_Toc177660760"/><text:bookmark-start text:name="_Toc177652639"/><text:bookmark-start text:name="_Toc177652175"/><text:bookmark-start text:name="__RefHeading___Toc10010_1783990655"/><text:bookmark-start text:name="_Toc177568996"/>Installation<text:bookmark-end text:name="_Toc177660760"/><text:bookmark-end text:name="_Toc177652639"/><text:bookmark-end text:name="_Toc177652175"/><text:bookmark-end text:name="__RefHeading___Toc10010_1783990655"/><text:bookmark-end text:name="_Toc177568996"/></text:h>
      <text:p text:style-name="Normal">Les images docker sont construites par les outils de CI-CD du ministère (Forge <text:span text:style-name="T40">DC pour le Cloud PI IAAS et DSO pour le Cloud PI Native</text:span>) et déployées sur les environnements hébergés par le ministère de l’intérieur.</text:p>
      <text:p text:style-name="Normal">Les librairies sont téléchargées (et gardées en cache) sur le relais de dépôts (Nexus) pour des vérifications de sécurité dont l’obsolescence des versions.</text:p>
      <text:p text:style-name="Normal">Une veille est effectuée par l’équipe de TMA avec au minimum des mises à jour trimestrielle de la pile logicielle et livraison afin d’assurer la sécurité et la pérennité de l’application.</text:p>
      <text:p text:style-name="Normal">Les composants applicatifs employés sont limités au strict nécessaire.</text:p>
      <text:p text:style-name="Normal">Les bibliothèques utilisées par l’application ne comportent pas de vulnérabilités majeures connues.</text:p>
      <text:p text:style-name="Normal">Les composants utilisés ne permettent leur identification (numéro de version).</text:p>
      <text:p text:style-name="Normal"><text:soft-page-break/>Aucun lien vers un CDN externe (css, javascript, etc.) n’est utilisé pour inclure les sources dans les pages web produites.</text:p>
      <text:p text:style-name="Normal"/>
      <text:h text:style-name="Heading_20_2" text:outline-level="2"><text:bookmark-start text:name="_Toc177568997"/><text:bookmark-start text:name="_Toc177652176"/><text:bookmark-start text:name="_Toc177652640"/><text:bookmark-start text:name="__RefHeading___Toc10012_1783990655"/><text:bookmark-start text:name="_Toc177660761"/>Gestion des comptes et mots de passe<text:bookmark-end text:name="_Toc177568997"/><text:bookmark-end text:name="_Toc177652176"/><text:bookmark-end text:name="_Toc177652640"/><text:bookmark-end text:name="__RefHeading___Toc10012_1783990655"/><text:bookmark-end text:name="_Toc177660761"/></text:h>
      <text:h text:style-name="Heading_20_3" text:outline-level="3"><text:bookmark-start text:name="_Toc177660762"/><text:bookmark-start text:name="_Toc177652641"/><text:bookmark-start text:name="_Toc177652177"/><text:bookmark-start text:name="__RefHeading___Toc10014_1783990655"/><text:bookmark-start text:name="_Toc177568998"/>Création de mot de passe<text:bookmark-end text:name="_Toc177660762"/><text:bookmark-end text:name="_Toc177652641"/><text:bookmark-end text:name="_Toc177652177"/><text:bookmark-end text:name="__RefHeading___Toc10014_1783990655"/><text:bookmark-end text:name="_Toc177568998"/></text:h>
      <text:p text:style-name="Normal">Pour les comptes standards :</text:p>
      <text:list text:style-name="L10">
        <text:list-item>
          <text:p text:style-name="P145">Les mots de passe doivent avoir une longueur minimale de 12 caractères</text:p>
        </text:list-item>
        <text:list-item>
          <text:p text:style-name="P145">Imposer plusieurs jeux de caractères mais pas forcément les 4 (majuscules, minuscules, chiffres et caractères spéciaux).</text:p>
        </text:list-item>
      </text:list>
      <text:p text:style-name="Normal">Pour les comptes ayant des privilèges élevés.</text:p>
      <text:list text:style-name="L11">
        <text:list-item>
          <text:p text:style-name="P146">Les mots de passe doivent avoir une longueur minimale de 15 caractères</text:p>
        </text:list-item>
        <text:list-item>
          <text:p text:style-name="P146">Obligation d’imposer les 4 jeux de caractères (majuscules, minuscules, chiffres et caractères spéciaux).</text:p>
        </text:list-item>
      </text:list>
      <text:p text:style-name="Normal"/>
      <text:h text:style-name="Heading_20_3" text:outline-level="3"><text:bookmark-start text:name="_Toc177660763"/><text:bookmark-start text:name="_Toc177652642"/><text:bookmark-start text:name="_Toc177652178"/><text:bookmark-start text:name="__RefHeading___Toc10016_1783990655"/><text:bookmark-start text:name="_Toc177568999"/>Tentatives de connexion<text:bookmark-end text:name="_Toc177660763"/><text:bookmark-end text:name="_Toc177652642"/><text:bookmark-end text:name="_Toc177652178"/><text:bookmark-end text:name="__RefHeading___Toc10016_1783990655"/><text:bookmark-end text:name="_Toc177568999"/></text:h>
      <text:p text:style-name="Normal">Les comptes doivent être bloqués au bout de <text:span text:style-name="T9">{X}</text:span> tentatives de connexion infructueuses ou à défaut, la possibilité de tenter une nouvelle authentification doit être interdite pendant <text:span text:style-name="T9">{X}</text:span><text:span text:style-name="T8"> minutes</text:span>.</text:p>
      <text:h text:style-name="Heading_20_3" text:outline-level="3"><text:bookmark-start text:name="_Toc177660764"/><text:bookmark-start text:name="_Toc177652643"/><text:bookmark-start text:name="_Toc177652179"/><text:bookmark-start text:name="__RefHeading___Toc10018_1783990655"/><text:bookmark-start text:name="_Toc177569000"/>Renouvellement des mots de passe<text:bookmark-end text:name="_Toc177660764"/><text:bookmark-end text:name="_Toc177652643"/><text:bookmark-end text:name="_Toc177652179"/><text:bookmark-end text:name="__RefHeading___Toc10018_1783990655"/><text:bookmark-end text:name="_Toc177569000"/></text:h>
      <text:p text:style-name="Normal">Les mots de passe doivent avoir une date de validité maximale. A partir de cette date l’utilisateur<text:line-break/>ne doit plus pouvoir s’authentifier sur le système si le mot de passe n’a pas été changé. Ceci permet<text:line-break/>de s’assurer qu’un mot de passe découvert par un utilisateur mal intentionné, ne sera pas utilisable<text:line-break/>indéfiniment dans le temps.</text:p>
      <text:h text:style-name="Heading_20_3" text:outline-level="3"><text:bookmark-start text:name="_Toc177660765"/><text:bookmark-start text:name="_Toc177652644"/><text:bookmark-start text:name="_Toc177652180"/><text:bookmark-start text:name="__RefHeading___Toc10020_1783990655"/><text:bookmark-start text:name="_Toc177569001"/>Stockage<text:bookmark-end text:name="_Toc177660765"/><text:bookmark-end text:name="_Toc177652644"/><text:bookmark-end text:name="_Toc177652180"/><text:bookmark-end text:name="__RefHeading___Toc10020_1783990655"/><text:bookmark-end text:name="_Toc177569001"/></text:h>
      <text:p text:style-name="Normal">Lorsque les mots de passe sont conservés en base de données, ils doivent être hachés en utilisant un algorithme robuste (Bcrypt, PBKF2, SHA256, SHA384 ou SHA512).</text:p>
      <text:p text:style-name="Normal">Ils doivent également être salés, en utilisant un sel aléatoire d’une longueur minimum de 20 caractères.</text:p>
      <text:h text:style-name="Heading_20_3" text:outline-level="3"><text:bookmark-start text:name="_Toc177660766"/><text:bookmark-start text:name="_Toc177652645"/><text:bookmark-start text:name="_Toc177652181"/><text:bookmark-start text:name="__RefHeading___Toc10022_1783990655"/><text:bookmark-start text:name="_Toc177569002"/>Règles complémentaires<text:bookmark-end text:name="_Toc177660766"/><text:bookmark-end text:name="_Toc177652645"/><text:bookmark-end text:name="_Toc177652181"/><text:bookmark-end text:name="__RefHeading___Toc10022_1783990655"/><text:bookmark-end text:name="_Toc177569002"/></text:h>
      <text:list text:style-name="L12">
        <text:list-item>
          <text:p text:style-name="P156">L’utilisateur doit être le seul à connaître son mot de passe ;</text:p>
        </text:list-item>
        <text:list-item>
          <text:p text:style-name="P156">L’application ne doit pas proposer de retenir le mot de passe ou de maintenir une session ouverte (se souvenir de moi) ;</text:p>
        </text:list-item>
        <text:list-item>
          <text:p text:style-name="P156">Sauf contrainte applicative, un même compte ne doit pas pouvoir ouvrir plus d’une session simultanément ;</text:p>
        </text:list-item>
        <text:list-item>
          <text:p text:style-name="P156">L’application doit disposer d’un processus de création/modification/oubli/verrouillage des comptes et des mots de passe fiable ;</text:p>
        </text:list-item>
        <text:list-item>
          <text:p text:style-name="P156">L’application ne doit fournir aucune indication sur l’existence du compte ;</text:p>
        </text:list-item>
        <text:list-item>
          <text:p text:style-name="P156">L’application doit livrer un nouveau jeton de session à chaque nouvelle authentification réussie. Il doit être échangé de façon fiable. Ce jeton ainsi que la session associée côté serveur doivent être détruits lors de la déconnexion ;</text:p>
        </text:list-item>
        <text:list-item>
          <text:p text:style-name="P156"><text:soft-page-break/>La valeur du jeton doit être robuste ;</text:p>
        </text:list-item>
        <text:list-item>
          <text:p text:style-name="P156">Stockage sécurisé du jeton de session : le jeton de session doit être stocké dans un cookie possédant les attributs HTTPONLY et SECURE.</text:p>
        </text:list-item>
        <text:list-item>
          <text:p text:style-name="P156">Si l’application propose un CAPTCHA, celui-ci doit être efficace et judicieusement positionné ;</text:p>
        </text:list-item>
        <text:list-item>
          <text:p text:style-name="P156">Activer les en-têtes Content-Security-Policy, Strict-Transport-Security, X-FrameOptions, X-Xss-Protection, Expect-CT et X-Content-Type-Options ;</text:p>
        </text:list-item>
        <text:list-item>
          <text:p text:style-name="P156">L’application doit journaliser à minima : l’IP d’origine du poste client, l’identifiant de l’utilisateur, la date/heure des communications et l’URI appelée. ;</text:p>
        </text:list-item>
      </text:list>
      <text:p text:style-name="P6"><text:span text:style-name="Police_20_par_20_défaut"><text:span text:style-name="T25">NOTE</text:span></text:span></text:p>
      <text:p text:style-name="Normal"><text:span text:style-name="T65">C</text:span>ertaines de ces vérifications peuvent être "non applicables" par rapport à l’application testée.</text:p>
      <text:p text:style-name="P6"><text:span text:style-name="Police_20_par_20_défaut"><text:span text:style-name="T25">NOTE</text:span></text:span></text:p>
      <text:p text:style-name="Normal"><text:span text:style-name="T65">D</text:span>e plus amples informations sont disponibles sur <text:a xlink:type="simple" xlink:href="https://www.ssi.gouv.fr/uploads/IMG/pdf/NP_MDP_NoteTech.pdf" office:target-frame-name="_top" xlink:show="replace" text:style-name="Internet_20_link" text:visited-style-name="Visited_20_Internet_20_Link"><text:span text:style-name="Lien_20_hypertexte"><text:span text:style-name="T26">www.ssi.gouv.fr/uploads/IMG/pdf/NP_MDP_NoteTech.pdf</text:span></text:span></text:a></text:p>
      <text:p text:style-name="Normal"/>
      <text:h text:style-name="Heading_20_2" text:outline-level="2"><text:bookmark-start text:name="__RefHeading___Toc10024_1783990655"/><text:bookmark-start text:name="_Toc177569003"/><text:bookmark-start text:name="_Toc177652182"/><text:bookmark-start text:name="_Toc177652646"/><text:bookmark-start text:name="_Toc177660767"/>Comptes utilisateurs<text:bookmark-end text:name="__RefHeading___Toc10024_1783990655"/><text:bookmark-end text:name="_Toc177569003"/><text:bookmark-end text:name="_Toc177652182"/><text:bookmark-end text:name="_Toc177652646"/><text:bookmark-end text:name="_Toc177660767"/></text:h>
      <text:p text:style-name="P94">{ A compléter}</text:p>
      <text:h text:style-name="Heading_20_2" text:outline-level="2"><text:bookmark-start text:name="_Toc177569004"/><text:bookmark-start text:name="_Toc177652183"/><text:bookmark-start text:name="_Toc177652647"/><text:bookmark-start text:name="__RefHeading___Toc10026_1783990655"/><text:bookmark-start text:name="_Toc177660768"/>Archivage de sécurité<text:bookmark-end text:name="_Toc177569004"/><text:bookmark-end text:name="_Toc177652183"/><text:bookmark-end text:name="_Toc177652647"/><text:bookmark-end text:name="__RefHeading___Toc10026_1783990655"/><text:bookmark-end text:name="_Toc177660768"/></text:h>
      <text:p text:style-name="Normal">Les traces de sécurité, c’est l’export d’information spécifiques (souvent enregistrées dans des fichiers de log) à des fins d’analyse ou de supervision.</text:p>
      <text:p text:style-name="Normal">Voir le chapitre sur les contraintes de traces.</text:p>
      <text:p text:style-name="Normal">L’archivage de sécurité à pour objectif d’exporter ces traces sur des stockages en lecture seule afin d’avoir des preuves non-altérables, même par un attaquant ayant pris contrôle du système.</text:p>
      <text:p text:style-name="Normal"/>
      <text:h text:style-name="Heading_20_2" text:outline-level="2"><text:bookmark-start text:name="_Toc177660770"/><text:bookmark-start text:name="_Toc177652649"/><text:bookmark-start text:name="_Toc177652185"/><text:bookmark-start text:name="__RefHeading___Toc10030_1783990655"/><text:bookmark-start text:name="_Toc177569006"/>Maintenance Applicative<text:bookmark-end text:name="_Toc177660770"/><text:bookmark-end text:name="_Toc177652649"/><text:bookmark-end text:name="_Toc177652185"/><text:bookmark-end text:name="__RefHeading___Toc10030_1783990655"/><text:bookmark-end text:name="_Toc177569006"/></text:h>
      <text:h text:style-name="Heading_20_3" text:outline-level="3"><text:bookmark-start text:name="_Toc177660771"/><text:bookmark-start text:name="_Toc177652650"/><text:bookmark-start text:name="_Toc177652186"/><text:bookmark-start text:name="__RefHeading___Toc10032_1783990655"/><text:bookmark-start text:name="_Toc177569007"/>Tierce maintenance applicative<text:bookmark-end text:name="_Toc177660771"/><text:bookmark-end text:name="_Toc177652650"/><text:bookmark-end text:name="_Toc177652186"/><text:bookmark-end text:name="__RefHeading___Toc10032_1783990655"/><text:bookmark-end text:name="_Toc177569007"/></text:h>
      <text:p text:style-name="Normal">La TMA comprend:</text:p>
      <text:list text:style-name="L13">
        <text:list-item>
          <text:p text:style-name="P137">Le maintien en conditions opérationnelles de l’application</text:p>
        </text:list-item>
        <text:list-item>
          <text:p text:style-name="P137">Le maintien de la connaissance sur l’application : connaissance métier et développement.</text:p>
        </text:list-item>
        <text:list-item>
          <text:p text:style-name="P137">La correction de bugs mineurs</text:p>
        </text:list-item>
        <text:list-item>
          <text:p text:style-name="P137">L’intervention rapide sur les bugs critiques</text:p>
        </text:list-item>
        <text:list-item>
          <text:p text:style-name="P137">La réalisation des évolutions (métiers, techniques, etc.)</text:p>
        </text:list-item>
        <text:list-item>
          <text:p text:style-name="P137">Le suivi des évolutions techniques (montées de version des langages, suivi des librairies, etc.)</text:p>
        </text:list-item>
      </text:list>
      <text:p text:style-name="P7"><text:span text:style-name="Police_20_par_20_défaut"><text:span text:style-name="T17">IMPORTANT</text:span></text:span></text:p>
      <text:p text:style-name="Normal">Cycle minimum de redéploiement des applications : trimestrielle ou bimestrielle.</text:p>
      <text:p text:style-name="Normal"/>
      <text:h text:style-name="Heading_20_3" text:outline-level="3"><text:bookmark-start text:name="_Toc177660772"/><text:bookmark-start text:name="_Toc177652651"/><text:bookmark-start text:name="_Toc177652187"/><text:bookmark-start text:name="__RefHeading___Toc10034_1783990655"/><text:bookmark-start text:name="_Toc177569008"/><text:soft-page-break/>Maintenance applicative<text:bookmark-end text:name="_Toc177660772"/><text:bookmark-end text:name="_Toc177652651"/><text:bookmark-end text:name="_Toc177652187"/><text:bookmark-end text:name="__RefHeading___Toc10034_1783990655"/><text:bookmark-end text:name="_Toc177569008"/></text:h>
      <text:p text:style-name="Normal">Elle correspond aux mises à jour et adaptations aux nouvelles contraintes du SI.</text:p>
      <text:p text:style-name="Normal">Les maintenances adaptatives doivent être évaluées :</text:p>
      <text:list text:style-name="L14">
        <text:list-item>
          <text:p text:style-name="P147">de façon cyclique: tous les 1 ou 2 ans au minimum</text:p>
        </text:list-item>
        <text:list-item>
          <text:p text:style-name="P147">pour suivre les évolutions techniques (montées de version majeures et mineures des langages, suivi des librairies, etc.)</text:p>
        </text:list-item>
        <text:list-item>
          <text:p text:style-name="P147">lors de remontées d’évolution du SI et de ses contraintes</text:p>
        </text:list-item>
        <text:list-item>
          <text:p text:style-name="P147">afin de pérenniser l’application et limiter la dette technique</text:p>
        </text:list-item>
      </text:list>
      <text:h text:style-name="Heading_20_3" text:outline-level="3"><text:bookmark-start text:name="_Toc177660773"/><text:bookmark-start text:name="_Toc177652652"/><text:bookmark-start text:name="_Toc177652188"/><text:bookmark-start text:name="__RefHeading___Toc10036_1783990655"/><text:bookmark-start text:name="_Toc177569009"/>Maintenance évolutive<text:bookmark-end text:name="_Toc177660773"/><text:bookmark-end text:name="_Toc177652652"/><text:bookmark-end text:name="_Toc177652188"/><text:bookmark-end text:name="__RefHeading___Toc10036_1783990655"/><text:bookmark-end text:name="_Toc177569009"/></text:h>
      <text:p text:style-name="Normal">La maintenance évolutive doivent être évaluées :</text:p>
      <text:list text:style-name="L15">
        <text:list-item>
          <text:p text:style-name="P148">de façon cyclique: tous les 1 ou 2 ans au minimum</text:p>
        </text:list-item>
        <text:list-item>
          <text:p text:style-name="P148">lors des demandes exprimées par l’équipe métier</text:p>
        </text:list-item>
      </text:list>
      <text:p text:style-name="Normal"/>
      <text:h text:style-name="Heading_20_2" text:outline-level="2"><text:bookmark-start text:name="_Toc177660774"/><text:bookmark-start text:name="_Toc177652653"/><text:bookmark-start text:name="_Toc177652189"/><text:bookmark-start text:name="__RefHeading___Toc10038_1783990655"/><text:bookmark-start text:name="_Toc177569010"/>Administration des environnements<text:bookmark-end text:name="_Toc177660774"/><text:bookmark-end text:name="_Toc177652653"/><text:bookmark-end text:name="_Toc177652189"/><text:bookmark-end text:name="__RefHeading___Toc10038_1783990655"/><text:bookmark-end text:name="_Toc177569010"/></text:h>
      <text:p text:style-name="Normal">Les environnements de développement doivent être accessibles au nombre le plus restreint possible de personnes.</text:p>
      <text:p text:style-name="Normal">La sécurisation de l’environnement de développement est à la charge du prestataire et doit correspondre au<text:span text:style-name="T71">x</text:span> règles de sécurité énoncées dans le contrat</text:p>
      <text:p text:style-name="Normal">Les environnements d’intégration, qualification, formation, préproduction</text:p>
      <text:p text:style-name="Normal"/>
      <text:h text:style-name="Heading_20_1" text:outline-level="1"><text:bookmark-start text:name="_Toc177660775"/><text:bookmark-start text:name="_Toc177652654"/><text:bookmark-start text:name="_Toc177652190"/><text:bookmark-start text:name="__RefHeading___Toc10040_1783990655"/><text:bookmark-start text:name="_Toc177569011"/>PRA<text:bookmark-end text:name="_Toc177660775"/><text:bookmark-end text:name="_Toc177652654"/><text:bookmark-end text:name="_Toc177652190"/><text:bookmark-end text:name="__RefHeading___Toc10040_1783990655"/><text:bookmark-end text:name="_Toc177569011"/></text:h>
      <text:h text:style-name="Heading_20_2" text:outline-level="2"><text:bookmark-start text:name="_Toc177569012"/><text:bookmark-start text:name="_Toc177652191"/><text:bookmark-start text:name="_Toc177652655"/><text:bookmark-start text:name="__RefHeading___Toc10042_1783990655"/><text:bookmark-start text:name="_Toc177660776"/>Stratégie de sauvegarde<text:bookmark-end text:name="_Toc177569012"/><text:bookmark-end text:name="_Toc177652191"/><text:bookmark-end text:name="_Toc177652655"/><text:bookmark-end text:name="__RefHeading___Toc10042_1783990655"/><text:bookmark-end text:name="_Toc177660776"/></text:h>
      <text:p text:style-name="Normal"/>
      <text:h text:style-name="Heading_20_2" text:outline-level="2"><text:bookmark-start text:name="_Toc177569013"/><text:bookmark-start text:name="_Toc177652192"/><text:bookmark-start text:name="_Toc177652656"/><text:bookmark-start text:name="__RefHeading___Toc10044_1783990655"/><text:bookmark-start text:name="_Toc177660777"/>Sauvegarde des bases de données<text:bookmark-end text:name="_Toc177569013"/><text:bookmark-end text:name="_Toc177652192"/><text:bookmark-end text:name="_Toc177652656"/><text:bookmark-end text:name="__RefHeading___Toc10044_1783990655"/><text:bookmark-end text:name="_Toc177660777"/></text:h>
      <text:p text:style-name="P55"><text:span text:style-name="Police_20_par_20_défaut"><text:span text:style-name="T14">Fonctionnement</text:span></text:span></text:p>
      <table:table table:name="Tableau56" table:style-name="Tableau56">
        <table:table-column table:style-name="Tableau56.A"/>
        <table:table-column table:style-name="Tableau56.B" table:number-columns-repeated="2"/>
        <table:table-row>
          <table:table-cell table:style-name="Tableau56.A1" office:value-type="string">
            <text:p text:style-name="P74"/>
          </table:table-cell>
          <table:table-cell table:style-name="Tableau56.A1" office:value-type="string">
            <text:p text:style-name="P74">Interne</text:p>
          </table:table-cell>
          <table:table-cell table:style-name="Tableau56.A1" office:value-type="string">
            <text:p text:style-name="P74">Externe</text:p>
          </table:table-cell>
        </table:table-row>
        <table:table-row>
          <table:table-cell table:style-name="Tableau56.A1" office:value-type="string">
            <text:p text:style-name="Sans_20_interligne">Porteur</text:p>
          </table:table-cell>
          <table:table-cell table:style-name="Tableau56.A1" office:value-type="string">
            <text:p text:style-name="Sans_20_interligne">Site actif</text:p>
          </table:table-cell>
          <table:table-cell table:style-name="Tableau56.A1" office:value-type="string">
            <text:p text:style-name="Sans_20_interligne">Site Passif</text:p>
          </table:table-cell>
        </table:table-row>
        <table:table-row>
          <table:table-cell table:style-name="Tableau56.A1" office:value-type="string">
            <text:p text:style-name="Sans_20_interligne">Service utilisé</text:p>
          </table:table-cell>
          <table:table-cell table:style-name="Tableau56.A1" office:value-type="string">
            <text:p text:style-name="Sans_20_interligne">Stockage objet S3</text:p>
          </table:table-cell>
          <table:table-cell table:style-name="Tableau56.A1" office:value-type="string">
            <text:p text:style-name="Sans_20_interligne">Stockage objet S3</text:p>
          </table:table-cell>
        </table:table-row>
        <table:table-row>
          <table:table-cell table:style-name="Tableau56.A1" office:value-type="string">
            <text:p text:style-name="Sans_20_interligne">Méthode</text:p>
          </table:table-cell>
          <table:table-cell table:style-name="Tableau56.A1" office:value-type="string">
            <text:p text:style-name="Sans_20_interligne">rClone</text:p>
          </table:table-cell>
          <table:table-cell table:style-name="Tableau56.A1" office:value-type="string">
            <text:p text:style-name="Sans_20_interligne">Réplication automatique S3</text:p>
          </table:table-cell>
        </table:table-row>
        <table:table-row>
          <table:table-cell table:style-name="Tableau56.A1" office:value-type="string">
            <text:p text:style-name="Sans_20_interligne">Eléments sauvegardés</text:p>
          </table:table-cell>
          <table:table-cell table:style-name="Tableau56.A1" office:value-type="string">
            <text:p text:style-name="Sans_20_interligne">Export complet (dump PostgreSQL) + Incrémentaux (logs WAL)</text:p>
          </table:table-cell>
          <table:table-cell table:style-name="Tableau56.A1" office:value-type="string">
            <text:p text:style-name="Sans_20_interligne"/>
          </table:table-cell>
        </table:table-row>
      </table:table>
      <text:p text:style-name="Normal">Cycles</text:p>
      <table:table table:name="Tableau57" table:style-name="Tableau57">
        <table:table-column table:style-name="Tableau57.A"/>
        <table:table-column table:style-name="Tableau57.B" table:number-columns-repeated="2"/>
        <table:table-row>
          <table:table-cell table:style-name="Tableau57.A1" office:value-type="string">
            <text:p text:style-name="P74">Source de données</text:p>
          </table:table-cell>
          <table:table-cell table:style-name="Tableau57.A1" office:value-type="string">
            <text:p text:style-name="P74">Sauvegarde</text:p>
          </table:table-cell>
          <table:table-cell table:style-name="Tableau57.A1" office:value-type="string">
            <text:p text:style-name="P74">Rétention</text:p>
          </table:table-cell>
        </table:table-row>
        <table:table-row>
          <table:table-cell table:style-name="Tableau57.A1" office:value-type="string">
            <text:p text:style-name="Sans_20_interligne">Base de données principale</text:p>
          </table:table-cell>
          <table:table-cell table:style-name="Tableau57.A1" office:value-type="string">
            <text:p text:style-name="Sans_20_interligne">Complète : 1 / semaine</text:p>
          </table:table-cell>
          <table:table-cell table:style-name="Tableau57.A1" office:value-type="string">
            <text:p text:style-name="Sans_20_interligne">Hebdomadaire : 4 semaines<text:line-break/>Mensuelle : 3 mois</text:p>
          </table:table-cell>
        </table:table-row>
        <table:table-row>
          <table:table-cell table:style-name="Tableau57.A1" office:value-type="string">
            <text:p text:style-name="Sans_20_interligne"/>
          </table:table-cell>
          <table:table-cell table:style-name="Tableau57.A1" office:value-type="string">
            <text:p text:style-name="Sans_20_interligne">Incrémentale : toutes les 15 minutes</text:p>
          </table:table-cell>
          <table:table-cell table:style-name="Tableau57.A1" office:value-type="string">
            <text:p text:style-name="Sans_20_interligne">Jusqu’à la prochaine sauvegarde complète</text:p>
          </table:table-cell>
        </table:table-row>
      </table:table>
      <text:p text:style-name="Normal"/>
      <text:p text:style-name="Normal"><text:soft-page-break/></text:p>
      <text:h text:style-name="Heading_20_2" text:outline-level="2"><text:bookmark-start text:name="_Toc177569014"/><text:bookmark-start text:name="_Toc177652193"/><text:bookmark-start text:name="_Toc177652657"/><text:bookmark-start text:name="__RefHeading___Toc10046_1783990655"/><text:bookmark-start text:name="_Toc177660778"/>Sauvegarde des fichiers<text:bookmark-end text:name="_Toc177569014"/><text:bookmark-end text:name="_Toc177652193"/><text:bookmark-end text:name="_Toc177652657"/><text:bookmark-end text:name="__RefHeading___Toc10046_1783990655"/><text:bookmark-end text:name="_Toc177660778"/></text:h>
      <text:p text:style-name="P55"><text:span text:style-name="Police_20_par_20_défaut"><text:span text:style-name="T14">Fonctionnement</text:span></text:span></text:p>
      <table:table table:name="Tableau58" table:style-name="Tableau58">
        <table:table-column table:style-name="Tableau58.A"/>
        <table:table-column table:style-name="Tableau58.B" table:number-columns-repeated="2"/>
        <table:table-row>
          <table:table-cell table:style-name="Tableau58.A1" office:value-type="string">
            <text:p text:style-name="P74"/>
          </table:table-cell>
          <table:table-cell table:style-name="Tableau58.A1" office:value-type="string">
            <text:p text:style-name="P74">Interne</text:p>
          </table:table-cell>
          <table:table-cell table:style-name="Tableau58.A1" office:value-type="string">
            <text:p text:style-name="P74">Externe</text:p>
          </table:table-cell>
        </table:table-row>
        <table:table-row>
          <table:table-cell table:style-name="Tableau58.A1" office:value-type="string">
            <text:p text:style-name="Sans_20_interligne">Porteur</text:p>
          </table:table-cell>
          <table:table-cell table:style-name="Tableau58.A1" office:value-type="string">
            <text:p text:style-name="Sans_20_interligne">Site actif</text:p>
          </table:table-cell>
          <table:table-cell table:style-name="Tableau58.A1" office:value-type="string">
            <text:p text:style-name="Sans_20_interligne">Site passif</text:p>
          </table:table-cell>
        </table:table-row>
        <table:table-row>
          <table:table-cell table:style-name="Tableau58.A1" office:value-type="string">
            <text:p text:style-name="Sans_20_interligne">Source</text:p>
          </table:table-cell>
          <table:table-cell table:style-name="Tableau58.A1" office:value-type="string">
            <text:p text:style-name="Sans_20_interligne">Documents de l’application dans le stockage objet</text:p>
          </table:table-cell>
          <table:table-cell table:style-name="Tableau58.A1" office:value-type="string">
            <text:p text:style-name="Sans_20_interligne">Sauvegarde interne des fichiers</text:p>
          </table:table-cell>
        </table:table-row>
        <table:table-row>
          <table:table-cell table:style-name="Tableau58.A1" office:value-type="string">
            <text:p text:style-name="Sans_20_interligne">Service utilisé</text:p>
          </table:table-cell>
          <table:table-cell table:style-name="Tableau58.A1" office:value-type="string">
            <text:p text:style-name="Sans_20_interligne">Service de sauvegarde du Cloud-PI</text:p>
          </table:table-cell>
          <table:table-cell table:style-name="Tableau58.A1" office:value-type="string">
            <text:p text:style-name="Sans_20_interligne">Service de sauvegarde du Cloud-PI</text:p>
          </table:table-cell>
        </table:table-row>
      </table:table>
      <text:p text:style-name="Normal"/>
      <text:p text:style-name="Normal">Cycles</text:p>
      <table:table table:name="Tableau59" table:style-name="Tableau59">
        <table:table-column table:style-name="Tableau59.A"/>
        <table:table-column table:style-name="Tableau59.B" table:number-columns-repeated="2"/>
        <table:table-row>
          <table:table-cell table:style-name="Tableau59.A1" office:value-type="string">
            <text:p text:style-name="P74"/>
          </table:table-cell>
          <table:table-cell table:style-name="Tableau59.A1" office:value-type="string">
            <text:p text:style-name="P74">Interne</text:p>
          </table:table-cell>
          <table:table-cell table:style-name="Tableau59.A1" office:value-type="string">
            <text:p text:style-name="P74">Externe</text:p>
          </table:table-cell>
        </table:table-row>
        <table:table-row>
          <table:table-cell table:style-name="Tableau59.A1" office:value-type="string">
            <text:p text:style-name="Sans_20_interligne">Méthode</text:p>
          </table:table-cell>
          <table:table-cell table:style-name="Tableau59.A1" office:value-type="string">
            <text:p text:style-name="Sans_20_interligne">Ajout: sans impact<text:line-break/>Remplacement: place le fichier remplacé en rétention<text:line-break/>Suppression: place le fichier supprimé en rétention</text:p>
          </table:table-cell>
          <table:table-cell table:style-name="Tableau59.A1" office:value-type="string">
            <text:p text:style-name="Sans_20_interligne">Synchronisation sur la sauvegarde interne</text:p>
          </table:table-cell>
        </table:table-row>
        <table:table-row>
          <table:table-cell table:style-name="Tableau59.A1" office:value-type="string">
            <text:p text:style-name="Sans_20_interligne">Fréquence de synchronisation</text:p>
          </table:table-cell>
          <table:table-cell table:style-name="Tableau59.A1" office:value-type="string">
            <text:p text:style-name="Sans_20_interligne">Toutes les 15 minutes</text:p>
          </table:table-cell>
          <table:table-cell table:style-name="Tableau59.A1" office:value-type="string">
            <text:p text:style-name="Sans_20_interligne">Toutes les 15 minutes</text:p>
          </table:table-cell>
        </table:table-row>
        <table:table-row>
          <table:table-cell table:style-name="Tableau59.A1" office:value-type="string">
            <text:p text:style-name="Sans_20_interligne">Durée de rétention</text:p>
          </table:table-cell>
          <table:table-cell table:style-name="Tableau59.A1" office:value-type="string">
            <text:p text:style-name="Sans_20_interligne">1 mois</text:p>
          </table:table-cell>
          <table:table-cell table:style-name="Tableau59.A1" office:value-type="string">
            <text:p text:style-name="Sans_20_interligne">1 mois</text:p>
          </table:table-cell>
        </table:table-row>
      </table:table>
      <text:p text:style-name="Normal"/>
      <text:p text:style-name="Normal"/>
      <text:p text:style-name="Normal"/>
      <text:h text:style-name="Heading_20_2" text:outline-level="2"><text:bookmark-start text:name="_Toc177569015"/><text:bookmark-start text:name="_Toc177652194"/><text:bookmark-start text:name="_Toc177652658"/><text:bookmark-start text:name="__RefHeading___Toc10048_1783990655"/><text:bookmark-start text:name="_Toc177660779"/>Sauvegarde des logs<text:bookmark-end text:name="_Toc177569015"/><text:bookmark-end text:name="_Toc177652194"/><text:bookmark-end text:name="_Toc177652658"/><text:bookmark-end text:name="__RefHeading___Toc10048_1783990655"/><text:bookmark-end text:name="_Toc177660779"/></text:h>
      <text:p text:style-name="P55"><text:span text:style-name="Police_20_par_20_défaut"><text:span text:style-name="T14">Fonctionnement</text:span></text:span></text:p>
      <table:table table:name="Tableau60" table:style-name="Tableau60">
        <table:table-column table:style-name="Tableau60.A"/>
        <table:table-column table:style-name="Tableau60.B" table:number-columns-repeated="2"/>
        <table:table-row>
          <table:table-cell table:style-name="Tableau60.A1" office:value-type="string">
            <text:p text:style-name="P74"/>
          </table:table-cell>
          <table:table-cell table:style-name="Tableau60.A1" office:value-type="string">
            <text:p text:style-name="P74">Interne</text:p>
          </table:table-cell>
          <table:table-cell table:style-name="Tableau60.A1" office:value-type="string">
            <text:p text:style-name="P74">Externe</text:p>
          </table:table-cell>
        </table:table-row>
        <table:table-row>
          <table:table-cell table:style-name="Tableau60.A1" office:value-type="string">
            <text:p text:style-name="Sans_20_interligne">Porteur</text:p>
          </table:table-cell>
          <table:table-cell table:style-name="Tableau60.A1" office:value-type="string">
            <text:p text:style-name="Sans_20_interligne">Site actif</text:p>
          </table:table-cell>
          <table:table-cell table:style-name="Tableau60.A1" office:value-type="string">
            <text:p text:style-name="Sans_20_interligne">Site Passif</text:p>
          </table:table-cell>
        </table:table-row>
        <table:table-row>
          <table:table-cell table:style-name="Tableau60.A1" office:value-type="string">
            <text:p text:style-name="Sans_20_interligne">Source</text:p>
          </table:table-cell>
          <table:table-cell table:style-name="Tableau60.A1" office:value-type="string">
            <text:p text:style-name="Sans_20_interligne">Fichiers de log centralisés sur ELK</text:p>
          </table:table-cell>
          <table:table-cell table:style-name="Tableau60.A1" office:value-type="string">
            <text:p text:style-name="Sans_20_interligne">Sauvegarde interne des logs</text:p>
          </table:table-cell>
        </table:table-row>
        <table:table-row>
          <table:table-cell table:style-name="Tableau60.A1" office:value-type="string">
            <text:p text:style-name="Sans_20_interligne">Service utilisé</text:p>
          </table:table-cell>
          <table:table-cell table:style-name="Tableau60.A1" office:value-type="string">
            <text:p text:style-name="Sans_20_interligne">Stockage objet S3</text:p>
          </table:table-cell>
          <table:table-cell table:style-name="Tableau60.A1" office:value-type="string">
            <text:p text:style-name="Sans_20_interligne">Stockage objet S3</text:p>
          </table:table-cell>
        </table:table-row>
        <table:table-row>
          <table:table-cell table:style-name="Tableau60.A1" office:value-type="string">
            <text:p text:style-name="Sans_20_interligne">Méthode</text:p>
          </table:table-cell>
          <table:table-cell table:style-name="Tableau60.A1" office:value-type="string">
            <text:p text:style-name="Sans_20_interligne">rClone</text:p>
          </table:table-cell>
          <table:table-cell table:style-name="Tableau60.A1" office:value-type="string">
            <text:p text:style-name="Sans_20_interligne">Réplication automatique S3</text:p>
          </table:table-cell>
        </table:table-row>
      </table:table>
      <text:p text:style-name="Normal"/>
      <text:p text:style-name="Normal">Cycles</text:p>
      <table:table table:name="Tableau61" table:style-name="Tableau61">
        <table:table-column table:style-name="Tableau61.A" table:number-columns-repeated="2"/>
        <table:table-row>
          <table:table-cell table:style-name="Tableau61.A1" office:value-type="string">
            <text:p text:style-name="P74">Méthode</text:p>
          </table:table-cell>
          <table:table-cell table:style-name="Tableau61.A1" office:value-type="string">
            <text:p text:style-name="P74">Rotation</text:p>
          </table:table-cell>
        </table:table-row>
        <table:table-row>
          <table:table-cell table:style-name="Tableau61.A1" office:value-type="string">
            <text:p text:style-name="Sans_20_interligne">Fréquence</text:p>
          </table:table-cell>
          <table:table-cell table:style-name="Tableau61.A1" office:value-type="string">
            <text:p text:style-name="Sans_20_interligne">Deux fois par jour</text:p>
          </table:table-cell>
        </table:table-row>
        <table:table-row>
          <table:table-cell table:style-name="Tableau61.A1" office:value-type="string">
            <text:p text:style-name="Sans_20_interligne">Rétention</text:p>
          </table:table-cell>
          <table:table-cell table:style-name="Tableau61.A1" office:value-type="string">
            <text:p text:style-name="Sans_20_interligne">1 semaine</text:p>
          </table:table-cell>
        </table:table-row>
      </table:table>
      <text:p text:style-name="Normal"/>
      <text:h text:style-name="Heading_20_2" text:outline-level="2"><text:bookmark-start text:name="_Toc177569016"/><text:bookmark-start text:name="_Toc177652195"/><text:bookmark-start text:name="_Toc177652659"/><text:bookmark-start text:name="__RefHeading___Toc10050_1783990655"/><text:bookmark-start text:name="_Toc177660780"/>Emplacements des sauvegardes<text:bookmark-end text:name="_Toc177569016"/><text:bookmark-end text:name="_Toc177652195"/><text:bookmark-end text:name="_Toc177652659"/><text:bookmark-end text:name="__RefHeading___Toc10050_1783990655"/><text:bookmark-end text:name="_Toc177660780"/></text:h>
      <text:p text:style-name="P11">Comprend tous les éléments nécessaires à la construction et au déploiement de l’application</text:p>
      <text:p text:style-name="P9">Cela inclus:</text:p>
      <text:list text:style-name="L16">
        <text:list-item>
          <text:p text:style-name="P138">les codes sources applicatifs</text:p>
        </text:list-item>
        <text:list-item>
          <text:p text:style-name="P138">les scripts de déploiement</text:p>
        </text:list-item>
        <text:list-item>
          <text:p text:style-name="P138">les données de production</text:p>
        </text:list-item>
      </text:list>
      <text:p text:style-name="P55"><text:span text:style-name="Police_20_par_20_défaut"><text:span text:style-name="T14">Localisation des différentes sauvegardes</text:span></text:span></text:p>
      <table:table table:name="Tableau62" table:style-name="Tableau62">
        <table:table-column table:style-name="Tableau62.A"/>
        <table:table-column table:style-name="Tableau62.B" table:number-columns-repeated="2"/>
        <table:table-row>
          <table:table-cell table:style-name="Tableau62.A1" office:value-type="string">
            <text:p text:style-name="P74">Source</text:p>
          </table:table-cell>
          <table:table-cell table:style-name="Tableau62.A1" office:value-type="string">
            <text:p text:style-name="P74">Sauvegarde locale</text:p>
          </table:table-cell>
          <table:table-cell table:style-name="Tableau62.A1" office:value-type="string">
            <text:p text:style-name="P74">Sauvegarde externe</text:p>
          </table:table-cell>
        </table:table-row>
        <text:soft-page-break/>
        <table:table-row>
          <table:table-cell table:style-name="Tableau62.A1" office:value-type="string">
            <text:p text:style-name="Sans_20_interligne">Sources frontend</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Sources backend</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Dockerfile</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Fichiers de configuration</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Variables d’environnement</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Scripts batch</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Schémas de base de données<text:line-break/>(ou les sources permettant leur construction)</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Données initiales</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Scripts de migration de données</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Données de production</text:p>
          </table:table-cell>
          <table:table-cell table:style-name="Tableau62.A1" office:value-type="string">
            <text:p text:style-name="Sans_20_interligne">Stockage objet Cloud-Pi Région 1</text:p>
          </table:table-cell>
          <table:table-cell table:style-name="Tableau62.A1" office:value-type="string">
            <text:p text:style-name="Sans_20_interligne">Stockage objet Cloud-Pi Région 2</text:p>
          </table:table-cell>
        </table:table-row>
        <table:table-row>
          <table:table-cell table:style-name="Tableau62.A1" office:value-type="string">
            <text:p text:style-name="Sans_20_interligne">Sauvegarde des données de production</text:p>
          </table:table-cell>
          <table:table-cell table:style-name="Tableau62.A1" office:value-type="string">
            <text:p text:style-name="Sans_20_interligne">Stockage objet Cloud-Pi Région 1</text:p>
          </table:table-cell>
          <table:table-cell table:style-name="Tableau62.A1" office:value-type="string">
            <text:p text:style-name="Sans_20_interligne">Stockage objet Cloud-Pi Région 2</text:p>
          </table:table-cell>
        </table:table-row>
        <table:table-row>
          <table:table-cell table:style-name="Tableau62.A1" office:value-type="string">
            <text:p text:style-name="Sans_20_interligne">Ordonnancement</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row>
          <table:table-cell table:style-name="Tableau62.A1" office:value-type="string">
            <text:p text:style-name="Sans_20_interligne">Tests</text:p>
          </table:table-cell>
          <table:table-cell table:style-name="Tableau62.A1" office:value-type="string">
            <text:p text:style-name="Sans_20_interligne">aucune</text:p>
          </table:table-cell>
          <table:table-cell table:style-name="Tableau62.A1" office:value-type="string">
            <text:p text:style-name="Sans_20_interligne">aucune</text:p>
          </table:table-cell>
        </table:table-row>
      </table:table>
      <text:p text:style-name="Normal"/>
      <text:h text:style-name="Heading_20_2" text:outline-level="2"><text:bookmark-start text:name="__RefHeading___Toc10052_1783990655"/><text:s/><text:bookmark-start text:name="_Toc177569017"/><text:bookmark-start text:name="_Toc177652196"/><text:bookmark-start text:name="_Toc177652660"/><text:bookmark-start text:name="_Toc177660781"/>Environnements sauvegardés<text:bookmark-end text:name="__RefHeading___Toc10052_1783990655"/><text:bookmark-end text:name="_Toc177569017"/><text:bookmark-end text:name="_Toc177652196"/><text:bookmark-end text:name="_Toc177652660"/><text:bookmark-end text:name="_Toc177660781"/></text:h>
      <table:table table:name="Tableau63" table:style-name="Tableau63">
        <table:table-column table:style-name="Tableau63.A" table:number-columns-repeated="2"/>
        <table:table-row>
          <table:table-cell table:style-name="Tableau63.A1" office:value-type="string">
            <text:p text:style-name="P74">Environnement</text:p>
          </table:table-cell>
          <table:table-cell table:style-name="Tableau63.A1" office:value-type="string">
            <text:p text:style-name="P74">Sauvegarde</text:p>
          </table:table-cell>
        </table:table-row>
        <table:table-row>
          <table:table-cell table:style-name="Tableau63.A1" office:value-type="string">
            <text:p text:style-name="Sans_20_interligne">DEVELOPPEMENT</text:p>
          </table:table-cell>
          <table:table-cell table:style-name="Tableau63.A1" office:value-type="string">
            <text:p text:style-name="Sans_20_interligne">Oui / Non</text:p>
          </table:table-cell>
        </table:table-row>
        <table:table-row>
          <table:table-cell table:style-name="Tableau63.A1" office:value-type="string">
            <text:p text:style-name="Sans_20_interligne">INTEGRATION</text:p>
          </table:table-cell>
          <table:table-cell table:style-name="Tableau63.A1" office:value-type="string">
            <text:p text:style-name="Sans_20_interligne">Oui / Non</text:p>
          </table:table-cell>
        </table:table-row>
        <table:table-row>
          <table:table-cell table:style-name="Tableau63.A1" office:value-type="string">
            <text:p text:style-name="Sans_20_interligne">QUALIFICATION</text:p>
          </table:table-cell>
          <table:table-cell table:style-name="Tableau63.A1" office:value-type="string">
            <text:p text:style-name="Sans_20_interligne">Oui / Non</text:p>
          </table:table-cell>
        </table:table-row>
        <table:table-row>
          <table:table-cell table:style-name="Tableau63.A1" office:value-type="string">
            <text:p text:style-name="Sans_20_interligne">METROLOGIE</text:p>
          </table:table-cell>
          <table:table-cell table:style-name="Tableau63.A1" office:value-type="string">
            <text:p text:style-name="Sans_20_interligne">Oui / Non</text:p>
          </table:table-cell>
        </table:table-row>
        <table:table-row>
          <table:table-cell table:style-name="Tableau63.A1" office:value-type="string">
            <text:p text:style-name="Sans_20_interligne">PREPRODUCTION</text:p>
          </table:table-cell>
          <table:table-cell table:style-name="Tableau63.A1" office:value-type="string">
            <text:p text:style-name="Sans_20_interligne">Oui / Non</text:p>
          </table:table-cell>
        </table:table-row>
        <table:table-row>
          <table:table-cell table:style-name="Tableau63.A1" office:value-type="string">
            <text:p text:style-name="Sans_20_interligne">FORMATION</text:p>
          </table:table-cell>
          <table:table-cell table:style-name="Tableau63.A1" office:value-type="string">
            <text:p text:style-name="Sans_20_interligne">Oui / Non</text:p>
          </table:table-cell>
        </table:table-row>
        <table:table-row>
          <table:table-cell table:style-name="Tableau63.A1" office:value-type="string">
            <text:p text:style-name="Sans_20_interligne">PRODUCTION</text:p>
          </table:table-cell>
          <table:table-cell table:style-name="Tableau63.A1" office:value-type="string">
            <text:p text:style-name="Sans_20_interligne">Oui / Non</text:p>
          </table:table-cell>
        </table:table-row>
      </table:table>
      <text:p text:style-name="Normal"/>
      <text:h text:style-name="Heading_20_1" text:outline-level="1"><text:bookmark-start text:name="_Toc177660782"/><text:bookmark-start text:name="_Toc177652661"/><text:bookmark-start text:name="_Toc177652197"/><text:bookmark-start text:name="__RefHeading___Toc10054_1783990655"/><text:bookmark-start text:name="_Toc177569018"/>PCA<text:bookmark-end text:name="_Toc177660782"/><text:bookmark-end text:name="_Toc177652661"/><text:bookmark-end text:name="_Toc177652197"/><text:bookmark-end text:name="__RefHeading___Toc10054_1783990655"/><text:bookmark-end text:name="_Toc177569018"/></text:h>
      <text:p text:style-name="Normal"/>
      <text:h text:style-name="Heading_20_2" text:outline-level="2"><text:bookmark-start text:name="_Toc177569019"/><text:bookmark-start text:name="_Toc177652198"/><text:bookmark-start text:name="_Toc177652662"/><text:bookmark-start text:name="__RefHeading___Toc10056_1783990655"/><text:bookmark-start text:name="_Toc177660783"/>Politique de redémarrage des serveurs<text:bookmark-end text:name="_Toc177569019"/><text:bookmark-end text:name="_Toc177652198"/><text:bookmark-end text:name="_Toc177652662"/><text:bookmark-end text:name="__RefHeading___Toc10056_1783990655"/><text:bookmark-end text:name="_Toc177660783"/></text:h>
      <table:table table:name="Tableau64" table:style-name="Tableau64">
        <table:table-column table:style-name="Tableau64.A"/>
        <table:table-column table:style-name="Tableau64.B" table:number-columns-repeated="2"/>
        <table:table-row>
          <table:table-cell table:style-name="Tableau64.A1" office:value-type="string">
            <text:p text:style-name="P74">Type de serveur</text:p>
          </table:table-cell>
          <table:table-cell table:style-name="Tableau64.A1" office:value-type="string">
            <text:p text:style-name="P74">Type de redémarrage</text:p>
          </table:table-cell>
          <table:table-cell table:style-name="Tableau64.A1" office:value-type="string">
            <text:p text:style-name="P74">Evènement déclenché</text:p>
          </table:table-cell>
        </table:table-row>
        <table:table-row>
          <table:table-cell table:style-name="Tableau64.A1" office:value-type="string">
            <text:p text:style-name="Sans_20_interligne">Reverse proxy</text:p>
          </table:table-cell>
          <table:table-cell table:style-name="Tableau64.A1" office:value-type="string">
            <text:p text:style-name="Sans_20_interligne">always</text:p>
          </table:table-cell>
          <table:table-cell table:style-name="Tableau64.A1" office:value-type="string">
            <text:p text:style-name="Sans_20_interligne"/>
          </table:table-cell>
        </table:table-row>
        <table:table-row>
          <table:table-cell table:style-name="Tableau64.A1" office:value-type="string">
            <text:p text:style-name="Sans_20_interligne">Frontend</text:p>
          </table:table-cell>
          <table:table-cell table:style-name="Tableau64.A1" office:value-type="string">
            <text:p text:style-name="Sans_20_interligne">always</text:p>
          </table:table-cell>
          <table:table-cell table:style-name="Tableau64.A1" office:value-type="string">
            <text:p text:style-name="Sans_20_interligne"/>
          </table:table-cell>
        </table:table-row>
        <table:table-row>
          <table:table-cell table:style-name="Tableau64.A1" office:value-type="string">
            <text:p text:style-name="Sans_20_interligne">Backend</text:p>
          </table:table-cell>
          <table:table-cell table:style-name="Tableau64.A1" office:value-type="string">
            <text:p text:style-name="Sans_20_interligne">?</text:p>
          </table:table-cell>
          <table:table-cell table:style-name="Tableau64.A1" office:value-type="string">
            <text:p text:style-name="Sans_20_interligne"/>
          </table:table-cell>
        </table:table-row>
        <table:table-row>
          <table:table-cell table:style-name="Tableau64.A1" office:value-type="string">
            <text:p text:style-name="Sans_20_interligne">Batch</text:p>
          </table:table-cell>
          <table:table-cell table:style-name="Tableau64.A1" office:value-type="string">
            <text:p text:style-name="Sans_20_interligne">?</text:p>
          </table:table-cell>
          <table:table-cell table:style-name="Tableau64.A1" office:value-type="string">
            <text:p text:style-name="Sans_20_interligne"/>
          </table:table-cell>
        </table:table-row>
        <table:table-row>
          <table:table-cell table:style-name="Tableau64.A1" office:value-type="string">
            <text:p text:style-name="Sans_20_interligne">Base de données</text:p>
          </table:table-cell>
          <table:table-cell table:style-name="Tableau64.A1" office:value-type="string">
            <text:p text:style-name="Sans_20_interligne">no</text:p>
          </table:table-cell>
          <table:table-cell table:style-name="Tableau64.A1" office:value-type="string">
            <text:p text:style-name="Sans_20_interligne"/>
          </table:table-cell>
        </table:table-row>
        <table:table-row>
          <table:table-cell table:style-name="Tableau64.A1" office:value-type="string">
            <text:p text:style-name="Sans_20_interligne">Proxy out</text:p>
          </table:table-cell>
          <table:table-cell table:style-name="Tableau64.A1" office:value-type="string">
            <text:p text:style-name="Sans_20_interligne">always</text:p>
          </table:table-cell>
          <table:table-cell table:style-name="Tableau64.A1" office:value-type="string">
            <text:p text:style-name="Sans_20_interligne"/>
          </table:table-cell>
        </table:table-row>
        <table:table-row>
          <table:table-cell table:style-name="Tableau64.A1" office:value-type="string">
            <text:p text:style-name="Sans_20_interligne">Proxy admin</text:p>
          </table:table-cell>
          <table:table-cell table:style-name="Tableau64.A1" office:value-type="string">
            <text:p text:style-name="Sans_20_interligne">always</text:p>
          </table:table-cell>
          <table:table-cell table:style-name="Tableau64.A1" office:value-type="string">
            <text:p text:style-name="Sans_20_interligne"/>
          </table:table-cell>
        </table:table-row>
        <table:table-row>
          <table:table-cell table:style-name="Tableau64.A1" office:value-type="string">
            <text:p text:style-name="Sans_20_interligne">DNS</text:p>
          </table:table-cell>
          <table:table-cell table:style-name="Tableau64.A1" office:value-type="string">
            <text:p text:style-name="Sans_20_interligne">always</text:p>
          </table:table-cell>
          <table:table-cell table:style-name="Tableau64.A1" office:value-type="string">
            <text:p text:style-name="Sans_20_interligne"/>
          </table:table-cell>
        </table:table-row>
        <table:table-row>
          <table:table-cell table:style-name="Tableau64.A1" office:value-type="string">
            <text:p text:style-name="Sans_20_interligne">Logs</text:p>
          </table:table-cell>
          <table:table-cell table:style-name="Tableau64.A1" office:value-type="string">
            <text:p text:style-name="Sans_20_interligne">?</text:p>
          </table:table-cell>
          <table:table-cell table:style-name="Tableau64.A1" office:value-type="string">
            <text:p text:style-name="Sans_20_interligne"/>
          </table:table-cell>
        </table:table-row>
        <table:table-row>
          <table:table-cell table:style-name="Tableau64.A1" office:value-type="string">
            <text:p text:style-name="Sans_20_interligne">Métriques Supervision</text:p>
          </table:table-cell>
          <table:table-cell table:style-name="Tableau64.A1" office:value-type="string">
            <text:p text:style-name="Sans_20_interligne">?</text:p>
          </table:table-cell>
          <table:table-cell table:style-name="Tableau64.A1" office:value-type="string">
            <text:p text:style-name="Sans_20_interligne"/>
          </table:table-cell>
        </table:table-row>
        <table:table-row>
          <table:table-cell table:style-name="Tableau64.A1" office:value-type="string">
            <text:p text:style-name="Sans_20_interligne">Notification Supervision</text:p>
          </table:table-cell>
          <table:table-cell table:style-name="Tableau64.A1" office:value-type="string">
            <text:p text:style-name="Sans_20_interligne">?</text:p>
          </table:table-cell>
          <table:table-cell table:style-name="Tableau64.A1" office:value-type="string">
            <text:p text:style-name="Sans_20_interligne"/>
          </table:table-cell>
        </table:table-row>
        <table:table-row>
          <table:table-cell table:style-name="Tableau64.A1" office:value-type="string">
            <text:p text:style-name="Sans_20_interligne">Interfaces Supervision</text:p>
          </table:table-cell>
          <table:table-cell table:style-name="Tableau64.A1" office:value-type="string">
            <text:p text:style-name="Sans_20_interligne">?</text:p>
          </table:table-cell>
          <table:table-cell table:style-name="Tableau64.A1" office:value-type="string">
            <text:p text:style-name="Sans_20_interligne"/>
          </table:table-cell>
        </table:table-row>
      </table:table>
      <text:p text:style-name="Normal"/>
      <text:h text:style-name="Heading_20_2" text:outline-level="2"><text:bookmark-start text:name="_Toc177569020"/><text:bookmark-start text:name="_Toc177652199"/><text:bookmark-start text:name="_Toc177652663"/><text:bookmark-start text:name="__RefHeading___Toc10058_1783990655"/><text:bookmark-start text:name="_Toc177660784"/><text:soft-page-break/>Redondance des serveurs<text:bookmark-end text:name="_Toc177569020"/><text:bookmark-end text:name="_Toc177652199"/><text:bookmark-end text:name="_Toc177652663"/><text:bookmark-end text:name="__RefHeading___Toc10058_1783990655"/><text:bookmark-end text:name="_Toc177660784"/></text:h>
      <table:table table:name="Tableau65" table:style-name="Tableau65">
        <table:table-column table:style-name="Tableau65.A" table:number-columns-repeated="2"/>
        <table:table-row>
          <table:table-cell table:style-name="Tableau65.A1" office:value-type="string">
            <text:p text:style-name="P74">Serveur</text:p>
          </table:table-cell>
          <table:table-cell table:style-name="Tableau65.A1" office:value-type="string">
            <text:p text:style-name="P74">Type de redondance</text:p>
          </table:table-cell>
        </table:table-row>
        <table:table-row>
          <table:table-cell table:style-name="Tableau65.A1" office:value-type="string">
            <text:p text:style-name="Sans_20_interligne">Reverse proxy</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Frontend</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Backend</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Batch</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Base de données</text:p>
          </table:table-cell>
          <table:table-cell table:style-name="Tableau65.A1" office:value-type="string">
            <text:p text:style-name="Sans_20_interligne">voir <text:a xlink:type="simple" xlink:href="#_redondance_des_bases_de_données" office:target-frame-name="_top" xlink:show="replace" text:style-name="Internet_20_link" text:visited-style-name="Visited_20_Internet_20_Link"><text:span text:style-name="Lien_20_hypertexte"><text:span text:style-name="T3">Redondance des bases de données</text:span></text:span></text:a></text:p>
          </table:table-cell>
        </table:table-row>
        <table:table-row>
          <table:table-cell table:style-name="Tableau65.A1" office:value-type="string">
            <text:p text:style-name="Sans_20_interligne">Proxy out</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Proxy admin</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DNS</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Logs</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Métriques de supervision</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Notification de supervision</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Interfaces de supervision</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Serveur</text:p>
          </table:table-cell>
          <table:table-cell table:style-name="Tableau65.A1" office:value-type="string">
            <text:p text:style-name="Sans_20_interligne">Type de redondance</text:p>
          </table:table-cell>
        </table:table-row>
        <table:table-row>
          <table:table-cell table:style-name="Tableau65.A1" office:value-type="string">
            <text:p text:style-name="Sans_20_interligne">Reverse proxy</text:p>
          </table:table-cell>
          <table:table-cell table:style-name="Tableau65.A1" office:value-type="string">
            <text:p text:style-name="Sans_20_interligne">[ aucune, actif-actif, actif-passif ]</text:p>
          </table:table-cell>
        </table:table-row>
        <table:table-row>
          <table:table-cell table:style-name="Tableau65.A1" office:value-type="string">
            <text:p text:style-name="Sans_20_interligne">Frontend</text:p>
          </table:table-cell>
          <table:table-cell table:style-name="Tableau65.A1" office:value-type="string">
            <text:p text:style-name="Sans_20_interligne">[ aucune, actif-actif, actif-passif ]</text:p>
          </table:table-cell>
        </table:table-row>
      </table:table>
      <text:p text:style-name="Normal"/>
      <text:h text:style-name="Heading_20_2" text:outline-level="2"><text:bookmark-start text:name="_Toc177569021"/><text:bookmark-start text:name="_Toc177652200"/><text:bookmark-start text:name="_Toc177652664"/><text:bookmark-start text:name="__RefHeading___Toc10060_1783990655"/><text:bookmark-start text:name="_Toc177660785"/>Bascule des serveurs<text:bookmark-end text:name="_Toc177569021"/><text:bookmark-end text:name="_Toc177652200"/><text:bookmark-end text:name="_Toc177652664"/><text:bookmark-end text:name="__RefHeading___Toc10060_1783990655"/><text:bookmark-end text:name="_Toc177660785"/></text:h>
      <table:table table:name="Tableau66" table:style-name="Tableau66">
        <table:table-column table:style-name="Tableau66.A" table:number-columns-repeated="2"/>
        <table:table-column table:style-name="Tableau66.C" table:number-columns-repeated="3"/>
        <table:table-header-rows>
          <table:table-row>
            <table:table-cell table:style-name="Tableau66.A1" office:value-type="string">
              <text:p text:style-name="P35">Type de serveur</text:p>
            </table:table-cell>
            <table:table-cell table:style-name="Tableau66.A1" office:value-type="string">
              <text:p text:style-name="P35">Type de bascule</text:p>
            </table:table-cell>
            <table:table-cell table:style-name="Tableau66.A1" office:value-type="string">
              <text:p text:style-name="P35">Méthode</text:p>
            </table:table-cell>
            <table:table-cell table:style-name="Tableau66.A1" office:value-type="string">
              <text:p text:style-name="P35">Responsable</text:p>
            </table:table-cell>
            <table:table-cell table:style-name="Tableau66.A1" office:value-type="string">
              <text:p text:style-name="P35">Délai d’indisponibilité déclencheur</text:p>
            </table:table-cell>
          </table:table-row>
        </table:table-header-rows>
        <table:table-row>
          <table:table-cell table:style-name="Tableau66.A1" office:value-type="string">
            <text:p text:style-name="P39">Reverse proxy</text:p>
          </table:table-cell>
          <table:table-cell table:style-name="Tableau66.A1" office:value-type="string">
            <text:p text:style-name="P39">Automatique<text:line-break/>Manuelle</text:p>
          </table:table-cell>
          <table:table-cell table:style-name="Tableau66.A1" office:value-type="string">
            <text:p text:style-name="P39">DNS : round-robin, VIP (à consolider)<text:line-break/>Heartbeat : KeepAlive<text:line-break/>Script ANSIBLE<text:line-break/>Ligne de commande</text:p>
          </table:table-cell>
          <table:table-cell table:style-name="Tableau66.A1" office:value-type="string">
            <text:p text:style-name="P39">Chaîne de Service<text:line-break/>Serveur X<text:line-break/>Bureau d’Exploitation</text:p>
          </table:table-cell>
          <table:table-cell table:style-name="Tableau66.A1" office:value-type="string">
            <text:p text:style-name="P39">5 minutes</text:p>
          </table:table-cell>
        </table:table-row>
        <table:table-row>
          <table:table-cell table:style-name="Tableau66.A1" office:value-type="string">
            <text:p text:style-name="P39">Frontend</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Backend</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Batch</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Base de données</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Proxy out</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Proxy admin</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DNS</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Logs</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Métriques de supervision</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Notification de supervision</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row>
          <table:table-cell table:style-name="Tableau66.A1" office:value-type="string">
            <text:p text:style-name="P39">Interfaces de supervision</text:p>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cell table:style-name="Tableau66.A1" office:value-type="string">
            <text:p text:style-name="P38"/>
          </table:table-cell>
        </table:table-row>
      </table:table>
      <text:p text:style-name="Normal"/>
      <text:h text:style-name="Heading_20_2" text:outline-level="2"><text:bookmark-start text:name="_Toc177569022"/><text:bookmark-start text:name="_Toc177652201"/><text:bookmark-start text:name="_Toc177652665"/><text:bookmark-start text:name="__RefHeading___Toc10062_1783990655"/><text:bookmark-start text:name="_Toc177660786"/><text:soft-page-break/>Redondance des bases de données<text:bookmark-end text:name="_Toc177569022"/><text:bookmark-end text:name="_Toc177652201"/><text:bookmark-end text:name="_Toc177652665"/><text:bookmark-end text:name="__RefHeading___Toc10062_1783990655"/><text:bookmark-end text:name="_Toc177660786"/></text:h>
      <table:table table:name="Tableau67" table:style-name="Tableau67">
        <table:table-column table:style-name="Tableau67.A" table:number-columns-repeated="2"/>
        <table:table-row>
          <table:table-cell table:style-name="Tableau67.A1" office:value-type="string">
            <text:p text:style-name="Sans_20_interligne">Redondance – Type</text:p>
          </table:table-cell>
          <table:table-cell table:style-name="Tableau67.A1" office:value-type="string">
            <text:p text:style-name="Sans_20_interligne">[ 1 maître 1 esclave, 1 maître 2 esclaves ]</text:p>
          </table:table-cell>
        </table:table-row>
        <table:table-row>
          <table:table-cell table:style-name="Tableau67.A1" office:value-type="string">
            <text:p text:style-name="Sans_20_interligne">Réplication – Responsable</text:p>
          </table:table-cell>
          <table:table-cell table:style-name="Tableau67.A1" office:value-type="string">
            <text:p text:style-name="Sans_20_interligne">Serveur Maître</text:p>
          </table:table-cell>
        </table:table-row>
        <table:table-row>
          <table:table-cell table:style-name="Tableau67.A1" office:value-type="string">
            <text:p text:style-name="Sans_20_interligne">Réplication – Méthode</text:p>
          </table:table-cell>
          <table:table-cell table:style-name="Tableau67.A1" office:value-type="string">
            <text:p text:style-name="Sans_20_interligne">Streaming Replication (Logs WAL)</text:p>
          </table:table-cell>
        </table:table-row>
        <table:table-row>
          <table:table-cell table:style-name="Tableau67.A1" office:value-type="string">
            <text:p text:style-name="Sans_20_interligne">Réplication – Fréquence</text:p>
          </table:table-cell>
          <table:table-cell table:style-name="Tableau67.A1" office:value-type="string">
            <text:p text:style-name="Sans_20_interligne">En continu</text:p>
          </table:table-cell>
        </table:table-row>
        <table:table-row>
          <table:table-cell table:style-name="Tableau67.A1" office:value-type="string">
            <text:p text:style-name="Sans_20_interligne">Bascule – Déclencheur</text:p>
          </table:table-cell>
          <table:table-cell table:style-name="Tableau67.A1" office:value-type="string">
            <text:p text:style-name="Sans_20_interligne">[ KeepAlive, PgPool, … ]</text:p>
          </table:table-cell>
        </table:table-row>
        <table:table-row>
          <table:table-cell table:style-name="Tableau67.A1" office:value-type="string">
            <text:p text:style-name="Sans_20_interligne">Bascule – Méthode de promotion</text:p>
          </table:table-cell>
          <table:table-cell table:style-name="Tableau67.A1" office:value-type="string">
            <text:p text:style-name="Sans_20_interligne">SSH (ligne de commande PostgreSQL)</text:p>
          </table:table-cell>
        </table:table-row>
        <table:table-row>
          <table:table-cell table:style-name="Tableau67.A1" office:value-type="string">
            <text:p text:style-name="Sans_20_interligne">Relance – Stratégie</text:p>
          </table:table-cell>
          <table:table-cell table:style-name="Tableau67.A1" office:value-type="string">
            <text:p text:style-name="Sans_20_interligne">[ no, on-failure, always ]</text:p>
          </table:table-cell>
        </table:table-row>
        <table:table-row>
          <table:table-cell table:style-name="Tableau67.A1" office:value-type="string">
            <text:p text:style-name="Sans_20_interligne">Reconstruction - Stratégie</text:p>
          </table:table-cell>
          <table:table-cell table:style-name="Tableau67.A1" office:value-type="string">
            <text:p text:style-name="Sans_20_interligne">[ Aucune, Automatique (N tentatives) ]</text:p>
          </table:table-cell>
        </table:table-row>
      </table:table>
      <text:p text:style-name="Normal"/>
      <text:h text:style-name="Heading_20_2" text:outline-level="2"><text:bookmark-start text:name="_Toc177569023"/><text:bookmark-start text:name="_Toc177652202"/><text:bookmark-start text:name="_Toc177652666"/><text:bookmark-start text:name="__RefHeading___Toc10064_1783990655"/><text:bookmark-start text:name="_Toc177660787"/>Site de secours<text:bookmark-end text:name="_Toc177569023"/><text:bookmark-end text:name="_Toc177652202"/><text:bookmark-end text:name="_Toc177652666"/><text:bookmark-end text:name="__RefHeading___Toc10064_1783990655"/><text:bookmark-end text:name="_Toc177660787"/></text:h>
      <table:table table:name="Tableau68" table:style-name="Tableau68">
        <table:table-column table:style-name="Tableau68.A" table:number-columns-repeated="2"/>
        <table:table-row>
          <table:table-cell table:style-name="Tableau68.A1" office:value-type="string">
            <text:p text:style-name="P75">Type du site de secours</text:p>
          </table:table-cell>
          <table:table-cell table:style-name="Tableau68.A1" office:value-type="string">
            <text:p text:style-name="P75">Actif, Passif</text:p>
          </table:table-cell>
        </table:table-row>
      </table:table>
      <text:p text:style-name="Normal"/>
      <text:p text:style-name="Normal"/>
      <text:h text:style-name="Heading_20_2" text:outline-level="2"><text:bookmark-start text:name="_Toc177569024"/><text:bookmark-start text:name="_Toc177652203"/><text:bookmark-start text:name="_Toc177652667"/><text:bookmark-start text:name="__RefHeading___Toc10066_1783990655"/><text:bookmark-start text:name="_Toc177660788"/>Réplication des fichiers<text:bookmark-end text:name="_Toc177569024"/><text:bookmark-end text:name="_Toc177652203"/><text:bookmark-end text:name="_Toc177652667"/><text:bookmark-end text:name="__RefHeading___Toc10066_1783990655"/><text:bookmark-end text:name="_Toc177660788"/></text:h>
      <table:table table:name="Tableau69" table:style-name="Tableau69">
        <table:table-column table:style-name="Tableau69.A" table:number-columns-repeated="2"/>
        <table:table-row>
          <table:table-cell table:style-name="Tableau69.A1" office:value-type="string">
            <text:p text:style-name="P35">Stockage utilisé</text:p>
          </table:table-cell>
          <table:table-cell table:style-name="Tableau69.A1" office:value-type="string">
            <text:p text:style-name="P35">Stockage objet S3</text:p>
          </table:table-cell>
        </table:table-row>
        <table:table-row>
          <table:table-cell table:style-name="Tableau69.A1" office:value-type="string">
            <text:p text:style-name="P36">Méthode de réplication</text:p>
          </table:table-cell>
          <table:table-cell table:style-name="Tableau69.A1" office:value-type="string">
            <text:p text:style-name="P36">Synchronisation automatique S3</text:p>
          </table:table-cell>
        </table:table-row>
        <table:table-row>
          <table:table-cell table:style-name="Tableau69.A1" office:value-type="string">
            <text:p text:style-name="P36">Fréquence</text:p>
          </table:table-cell>
          <table:table-cell table:style-name="Tableau69.A1" office:value-type="string">
            <text:p text:style-name="P36">en continu</text:p>
          </table:table-cell>
        </table:table-row>
      </table:table>
      <text:p text:style-name="Normal"/>
      <text:h text:style-name="Heading_20_2" text:outline-level="2"><text:bookmark-start text:name="_Toc177569025"/><text:bookmark-start text:name="_Toc177652204"/><text:bookmark-start text:name="_Toc177652668"/><text:bookmark-start text:name="__RefHeading___Toc10068_1783990655"/><text:bookmark-start text:name="_Toc177660789"/>Réplication des logs<text:bookmark-end text:name="_Toc177569025"/><text:bookmark-end text:name="_Toc177652204"/><text:bookmark-end text:name="_Toc177652668"/><text:bookmark-end text:name="__RefHeading___Toc10068_1783990655"/><text:bookmark-end text:name="_Toc177660789"/></text:h>
      <table:table table:name="Tableau70" table:style-name="Tableau70">
        <table:table-column table:style-name="Tableau70.A" table:number-columns-repeated="2"/>
        <table:table-row>
          <table:table-cell table:style-name="Tableau70.A1" office:value-type="string">
            <text:p text:style-name="P35">Stockage utilisé</text:p>
          </table:table-cell>
          <table:table-cell table:style-name="Tableau70.A1" office:value-type="string">
            <text:p text:style-name="P35">Stockage block</text:p>
          </table:table-cell>
        </table:table-row>
        <table:table-row>
          <table:table-cell table:style-name="Tableau70.A1" office:value-type="string">
            <text:p text:style-name="P36">Méthode de réplication</text:p>
          </table:table-cell>
          <table:table-cell table:style-name="Tableau70.A1" office:value-type="string">
            <text:p text:style-name="P36">rClone</text:p>
          </table:table-cell>
        </table:table-row>
        <table:table-row>
          <table:table-cell table:style-name="Tableau70.A1" office:value-type="string">
            <text:p text:style-name="P36">Fréquence</text:p>
          </table:table-cell>
          <table:table-cell table:style-name="Tableau70.A1" office:value-type="string">
            <text:p text:style-name="P36">toutes les 15 minutes</text:p>
          </table:table-cell>
        </table:table-row>
      </table:table>
      <text:p text:style-name="Normal"/>
      <text:h text:style-name="Heading_20_2" text:outline-level="2"><text:bookmark-start text:name="_Toc177569026"/><text:bookmark-start text:name="_Toc177652205"/><text:bookmark-start text:name="_Toc177652669"/><text:bookmark-start text:name="__RefHeading___Toc10070_1783990655"/><text:bookmark-start text:name="_Toc177660790"/>Bascule inter-sites<text:bookmark-end text:name="_Toc177569026"/><text:bookmark-end text:name="_Toc177652205"/><text:bookmark-end text:name="_Toc177652669"/><text:bookmark-end text:name="__RefHeading___Toc10070_1783990655"/><text:bookmark-end text:name="_Toc177660790"/></text:h>
      <table:table table:name="Tableau71" table:style-name="Tableau71">
        <table:table-column table:style-name="Tableau71.A" table:number-columns-repeated="2"/>
        <table:table-row>
          <table:table-cell table:style-name="Tableau71.A1" office:value-type="string">
            <text:p text:style-name="P35">Type de bascule</text:p>
          </table:table-cell>
          <table:table-cell table:style-name="Tableau71.A1" office:value-type="string">
            <text:p text:style-name="P35">Automatique, Manuelle</text:p>
          </table:table-cell>
        </table:table-row>
        <table:table-row>
          <table:table-cell table:style-name="Tableau71.A1" office:value-type="string">
            <text:p text:style-name="P29">Méthode</text:p>
          </table:table-cell>
          <table:table-cell table:style-name="Tableau71.A1" office:value-type="string">
            <text:p text:style-name="P29">Script ANSIBLE</text:p>
          </table:table-cell>
        </table:table-row>
        <table:table-row>
          <table:table-cell table:style-name="Tableau71.A1" office:value-type="string">
            <text:p text:style-name="P29">Responsable</text:p>
          </table:table-cell>
          <table:table-cell table:style-name="Tableau71.A1" office:value-type="string">
            <text:p text:style-name="P29">Chaîne de Service<text:line-break/>Serveur X<text:line-break/>Bureau d’Exploitation</text:p>
          </table:table-cell>
        </table:table-row>
        <table:table-row>
          <table:table-cell table:style-name="Tableau71.A1" office:value-type="string">
            <text:p text:style-name="P29">Délai d’indisponibilité déclencheur</text:p>
          </table:table-cell>
          <table:table-cell table:style-name="Tableau71.A1" office:value-type="string">
            <text:p text:style-name="P29">5 minutes</text:p>
          </table:table-cell>
        </table:table-row>
      </table:table>
      <text:p text:style-name="Normal"/>
      <text:h text:style-name="Heading_20_2" text:outline-level="2"><text:bookmark-start text:name="__RefHeading___Toc10072_1783990655"/><text:bookmark-start text:name="_Toc177660791"/><text:bookmark-start text:name="_Toc177652670"/><text:bookmark-start text:name="_Toc177652206"/><text:bookmark-start text:name="_Toc177569027"/>Supervision<text:bookmark-end text:name="__RefHeading___Toc10072_1783990655"/><text:bookmark-end text:name="_Toc177660791"/><text:bookmark-end text:name="_Toc177652670"/><text:bookmark-end text:name="_Toc177652206"/><text:bookmark-end text:name="_Toc177569027"/></text:h>
      <text:p text:style-name="P102">{à compléter si nécessaire}</text:p>
      <text:p text:style-name="P116"><text:span text:style-name="T8">{exemple ci-dessous}</text:span> </text:p>
      <text:p text:style-name="P126"><text:soft-page-break/>Utilisation des services du Cloud Pi Native de la DTNUM <text:span text:style-name="T84">(</text:span><text:a xlink:type="simple" xlink:href="https://cloud-pi-native.fr/agreement/observability#observabilite" text:style-name="Internet_20_link" text:visited-style-name="Visited_20_Internet_20_Link"><text:span text:style-name="T84">https://cloud-pi-native.fr/agreement/observability#observabilite</text:span></text:a><text:span text:style-name="T84">) ainsi que des services du bureau de supervision (CANOPSIS)</text:span>. <text:span text:style-name="T84">L’état de bon fonctionnement du système peut être vu par par le biais du site </text:span><text:a xlink:type="simple" xlink:href="https://snapvisu.minint.fr/" text:style-name="Internet_20_link" text:visited-style-name="Visited_20_Internet_20_Link"><text:span text:style-name="T84">https://snapvisu.minint.fr/</text:span></text:a><text:span text:style-name="T84">.</text:span></text:p>
      <text:h text:style-name="Heading_20_2" text:outline-level="2"><text:bookmark-start text:name="_Toc177660792"/><text:bookmark-start text:name="_Toc177652671"/><text:bookmark-start text:name="_Toc177652207"/><text:bookmark-start text:name="__RefHeading___Toc10074_1783990655"/><text:bookmark-start text:name="_Toc177569028"/>Chaîne<text:span text:style-name="T66"> </text:span>S<text:span text:style-name="T66">outien </text:span>U<text:bookmark-end text:name="_Toc177660792"/><text:bookmark-end text:name="_Toc177652671"/><text:bookmark-end text:name="_Toc177652207"/><text:bookmark-end text:name="_Toc177569028"/><text:span text:style-name="T66">tilisateur</text:span><text:bookmark-end text:name="__RefHeading___Toc10074_1783990655"/></text:h>
      <text:p text:style-name="P113">"Description CSU" : https://csu.dsic.minint.fr/</text:p>
      <text:h text:style-name="Heading_20_1" text:outline-level="1"><text:bookmark-start text:name="_Toc177660793"/><text:bookmark-start text:name="_Toc177652672"/><text:bookmark-start text:name="_Toc177652208"/><text:bookmark-start text:name="__RefHeading___Toc10076_1783990655"/><text:bookmark-start text:name="_Toc177569029"/>Services opérés<text:bookmark-end text:name="_Toc177660793"/><text:bookmark-end text:name="_Toc177652672"/><text:bookmark-end text:name="_Toc177652208"/><text:bookmark-end text:name="__RefHeading___Toc10076_1783990655"/><text:bookmark-end text:name="_Toc177569029"/></text:h>
      <text:p text:style-name="Normal"/>
      <text:h text:style-name="Heading_20_2" text:outline-level="2"><text:bookmark-start text:name="_Toc177569030"/><text:bookmark-start text:name="_Toc177652209"/><text:bookmark-start text:name="_Toc177652673"/><text:bookmark-start text:name="__RefHeading___Toc10078_1783990655"/><text:bookmark-start text:name="_Toc177660794"/>Intégration<text:bookmark-end text:name="_Toc177569030"/><text:bookmark-end text:name="_Toc177652209"/><text:bookmark-end text:name="_Toc177652673"/><text:bookmark-end text:name="__RefHeading___Toc10078_1783990655"/><text:bookmark-end text:name="_Toc177660794"/></text:h>
      <text:p text:style-name="Normal"/>
      <text:h text:style-name="Heading_20_2" text:outline-level="2"><text:bookmark-start text:name="_Toc177569031"/><text:bookmark-start text:name="_Toc177652210"/><text:bookmark-start text:name="_Toc177652674"/><text:bookmark-start text:name="__RefHeading___Toc10080_1783990655"/><text:bookmark-start text:name="_Toc177660795"/>Service d'exploitation<text:bookmark-end text:name="_Toc177569031"/><text:bookmark-end text:name="_Toc177652210"/><text:bookmark-end text:name="_Toc177652674"/><text:bookmark-end text:name="__RefHeading___Toc10080_1783990655"/><text:bookmark-end text:name="_Toc177660795"/></text:h>
      <text:p text:style-name="P11">"Description du service d’exploitation"</text:p>
      <text:p text:style-name="Normal"/>
      <text:h text:style-name="Heading_20_1" text:outline-level="1"><text:bookmark-start text:name="_Toc177660797"/><text:bookmark-start text:name="_Toc177652676"/><text:bookmark-start text:name="_Toc177652212"/><text:bookmark-start text:name="__RefHeading___Toc10084_1783990655"/><text:bookmark-start text:name="_Toc177569033"/>Performance<text:bookmark-end text:name="_Toc177660797"/><text:bookmark-end text:name="_Toc177652676"/><text:bookmark-end text:name="_Toc177652212"/><text:bookmark-end text:name="__RefHeading___Toc10084_1783990655"/><text:bookmark-end text:name="_Toc177569033"/></text:h>
      <text:p text:style-name="Normal"/>
      <text:h text:style-name="Heading_20_2" text:outline-level="2"><text:bookmark-start text:name="_Toc177660798"/><text:bookmark-start text:name="_Toc177652677"/><text:bookmark-start text:name="_Toc177652213"/><text:bookmark-start text:name="_Toc177569034"/><text:bookmark-start text:name="__RefHeading___Toc10086_1783990655"/>Mesure d'audi<text:span text:style-name="T41">e</text:span>nce<text:bookmark-end text:name="_Toc177660798"/><text:bookmark-end text:name="_Toc177652677"/><text:bookmark-end text:name="_Toc177652213"/><text:bookmark-end text:name="_Toc177569034"/><text:bookmark-end text:name="__RefHeading___Toc10086_1783990655"/></text:h>
      <table:table table:name="Tableau72" table:style-name="Tableau72">
        <table:table-column table:style-name="Tableau72.A" table:number-columns-repeated="2"/>
        <table:table-row>
          <table:table-cell table:style-name="Tableau72.A1" office:value-type="string">
            <text:p text:style-name="P35">Type de Population</text:p>
          </table:table-cell>
          <table:table-cell table:style-name="Tableau72.A1" office:value-type="string">
            <text:p text:style-name="P35">Connexions</text:p>
          </table:table-cell>
        </table:table-row>
        <table:table-row>
          <table:table-cell table:style-name="Tableau72.A1" office:value-type="string">
            <text:p text:style-name="P37"/>
          </table:table-cell>
          <table:table-cell table:style-name="Tableau72.A1" office:value-type="string">
            <text:p text:style-name="P36">XX / [ semaine, mois, année ]</text:p>
          </table:table-cell>
        </table:table-row>
      </table:table>
      <text:p text:style-name="Normal"/>
      <text:h text:style-name="Heading_20_2" text:outline-level="2"><text:bookmark-start text:name="__RefHeading___Toc10088_1783990655"/><text:s/><text:bookmark-start text:name="_Toc177569035"/><text:bookmark-start text:name="_Toc177652214"/><text:bookmark-start text:name="_Toc177652678"/><text:bookmark-start text:name="_Toc177660799"/>Performance de la base de données<text:bookmark-end text:name="__RefHeading___Toc10088_1783990655"/><text:bookmark-end text:name="_Toc177569035"/><text:bookmark-end text:name="_Toc177652214"/><text:bookmark-end text:name="_Toc177652678"/><text:bookmark-end text:name="_Toc177660799"/></text:h>
      <text:list text:style-name="L17">
        <text:list-header>
          <text:p text:style-name="P140"><text:span text:style-name="T67">Exemple : {</text:span>structures des requêtes, jointures, boucles et itération, types, <text:s/>indexes, partionnement des tables<text:span text:style-name="T67">}</text:span></text:p>
        </text:list-header>
      </text:list>
      <text:p text:style-name="Normal"/>
      <text:h text:style-name="Heading_20_2" text:outline-level="2"><text:bookmark-start text:name="_Toc177569036"/><text:bookmark-start text:name="_Toc177652215"/><text:bookmark-start text:name="_Toc177652679"/><text:bookmark-start text:name="__RefHeading___Toc10090_1783990655"/><text:bookmark-start text:name="_Toc177660800"/>Caches<text:bookmark-end text:name="_Toc177569036"/><text:bookmark-end text:name="_Toc177652215"/><text:bookmark-end text:name="_Toc177652679"/><text:bookmark-end text:name="__RefHeading___Toc10090_1783990655"/><text:bookmark-end text:name="_Toc177660800"/></text:h>
      <text:h text:style-name="Heading_20_3" text:outline-level="3"><text:bookmark-start text:name="__RefHeading___Toc10092_1783990655"/><text:s/><text:bookmark-start text:name="_Toc177569037"/><text:bookmark-start text:name="_Toc177652216"/><text:bookmark-start text:name="_Toc177652680"/><text:bookmark-start text:name="_Toc177660801"/>Cache du navigateur<text:bookmark-end text:name="__RefHeading___Toc10092_1783990655"/><text:bookmark-end text:name="_Toc177569037"/><text:bookmark-end text:name="_Toc177652216"/><text:bookmark-end text:name="_Toc177652680"/><text:bookmark-end text:name="_Toc177660801"/></text:h>
      <text:p text:style-name="P108"><text:span text:style-name="T68">Exemple</text:span><text:span text:style-name="T69">s</text:span><text:span text:style-name="T68"> : { </text:span><text:span text:style-name="T15">Cache-Control, private/public, max-age, must-revalidate, </text:span>expirationTime, Etag, Vary <text:span text:style-name="T68">etc...}</text:span></text:p>
      <text:h text:style-name="Heading_20_3" text:outline-level="3"><text:bookmark-start text:name="__RefHeading___Toc10094_1783990655"/><text:bookmark-start text:name="_Toc177569038"/><text:bookmark-start text:name="_Toc177652217"/><text:bookmark-start text:name="_Toc177652681"/><text:bookmark-start text:name="_Toc177660802"/>Cache HTTP<text:bookmark-end text:name="__RefHeading___Toc10094_1783990655"/><text:bookmark-end text:name="_Toc177569038"/><text:bookmark-end text:name="_Toc177652217"/><text:bookmark-end text:name="_Toc177652681"/><text:bookmark-end text:name="_Toc177660802"/></text:h>
      <text:p text:style-name="P15"><text:span text:style-name="T68">Exemple</text:span><text:span text:style-name="T69">s</text:span><text:span text:style-name="T68"> : {</text:span>Varnish, HTTP REST, headers <text:span text:style-name="T68">}</text:span></text:p>
      <text:h text:style-name="Heading_20_3" text:outline-level="3"><text:bookmark-start text:name="_Toc177660803"/><text:bookmark-start text:name="_Toc177652682"/><text:bookmark-start text:name="_Toc177652218"/><text:bookmark-start text:name="__RefHeading___Toc10096_1783990655"/><text:bookmark-start text:name="_Toc177569039"/><text:soft-page-break/>Cache du backend<text:bookmark-end text:name="_Toc177660803"/><text:bookmark-end text:name="_Toc177652682"/><text:bookmark-end text:name="_Toc177652218"/><text:bookmark-end text:name="__RefHeading___Toc10096_1783990655"/><text:bookmark-end text:name="_Toc177569039"/></text:h>
      <text:p text:style-name="P95">{ A compléter si nécessaire}</text:p>
      <text:h text:style-name="Heading_20_3" text:outline-level="3"><text:bookmark-start text:name="_Toc177660804"/><text:bookmark-start text:name="_Toc177652683"/><text:bookmark-start text:name="_Toc177652219"/><text:bookmark-start text:name="__RefHeading___Toc10098_1783990655"/><text:bookmark-start text:name="_Toc177569040"/>Cache de base de données<text:bookmark-end text:name="_Toc177660804"/><text:bookmark-end text:name="_Toc177652683"/><text:bookmark-end text:name="_Toc177652219"/><text:bookmark-end text:name="__RefHeading___Toc10098_1783990655"/><text:bookmark-end text:name="_Toc177569040"/></text:h>
      <text:p text:style-name="P95">{ A compléter si nécessaire}</text:p>
      <text:h text:style-name="Heading_20_2" text:outline-level="2"><text:bookmark-start text:name="_Toc177569041"/><text:bookmark-start text:name="_Toc177652220"/><text:bookmark-start text:name="_Toc177652684"/><text:bookmark-start text:name="__RefHeading___Toc10100_1783990655"/><text:bookmark-start text:name="_Toc177660805"/>Scalabilité horizontale<text:bookmark-end text:name="_Toc177569041"/><text:bookmark-end text:name="_Toc177652220"/><text:bookmark-end text:name="_Toc177652684"/><text:bookmark-end text:name="__RefHeading___Toc10100_1783990655"/><text:bookmark-end text:name="_Toc177660805"/></text:h>
      <text:p text:style-name="P95">{ A compléter si nécessaire}</text:p>
      <text:p text:style-name="P2"/>
      <text:h text:style-name="Heading_20_1" text:outline-level="1"><text:bookmark-start text:name="_Toc177660806"/><text:bookmark-start text:name="_Toc177652685"/><text:bookmark-start text:name="_Toc177652221"/><text:bookmark-start text:name="__RefHeading___Toc10102_1783990655"/><text:bookmark-start text:name="_Toc177569042"/>Annexes<text:bookmark-end text:name="_Toc177660806"/><text:bookmark-end text:name="_Toc177652685"/><text:bookmark-end text:name="_Toc177652221"/><text:bookmark-end text:name="__RefHeading___Toc10102_1783990655"/><text:bookmark-end text:name="_Toc177569042"/></text:h>
      <text:p text:style-name="Normal"/>
      <text:h text:style-name="Heading_20_2" text:outline-level="2"><text:bookmark-start text:name="_Toc177569043"/><text:bookmark-start text:name="_Toc177652222"/><text:bookmark-start text:name="_Toc177652686"/><text:bookmark-start text:name="__RefHeading___Toc10104_1783990655"/><text:bookmark-start text:name="_Toc177660807"/>Sources<text:bookmark-end text:name="_Toc177569043"/><text:bookmark-end text:name="_Toc177652222"/><text:bookmark-end text:name="_Toc177652686"/><text:bookmark-end text:name="__RefHeading___Toc10104_1783990655"/><text:bookmark-end text:name="_Toc177660807"/></text:h>
      <table:table table:name="Tableau80" table:style-name="Tableau80">
        <table:table-column table:style-name="Tableau80.A"/>
        <table:table-column table:style-name="Tableau80.B"/>
        <table:table-row>
          <table:table-cell table:style-name="Tableau80.A1" office:value-type="string">
            <text:p text:style-name="P76">Sources</text:p>
          </table:table-cell>
          <table:table-cell table:style-name="Tableau80.B1" office:value-type="string">
            <text:p text:style-name="P76">Site</text:p>
          </table:table-cell>
        </table:table-row>
        <table:table-row>
          <table:table-cell table:style-name="Tableau80.A2" office:value-type="string">
            <text:p text:style-name="P76">CCT</text:p>
          </table:table-cell>
          <table:table-cell table:style-name="Tableau80.B2" office:value-type="string">
            <text:p text:style-name="P76"><text:a xlink:type="simple" xlink:href="http://cct.sg.minint.fr/" text:style-name="Internet_20_link" text:visited-style-name="Visited_20_Internet_20_Link">http://cct.sg.minint.fr</text:a></text:p>
          </table:table-cell>
        </table:table-row>
        <table:table-row>
          <table:table-cell table:style-name="Tableau80.A2" office:value-type="string">
            <text:p text:style-name="P76">Cloud PI</text:p>
          </table:table-cell>
          <table:table-cell table:style-name="Tableau80.B2" office:value-type="string">
            <text:p text:style-name="P76"><text:a xlink:type="simple" xlink:href="https://pi.interieur.rie.gouv.fr/" text:style-name="Internet_20_link" text:visited-style-name="Visited_20_Internet_20_Link">https://pi.interieur.rie.gouv.fr</text:a></text:p>
          </table:table-cell>
        </table:table-row>
        <table:table-row>
          <table:table-cell table:style-name="Tableau80.A2" office:value-type="string">
            <text:p text:style-name="P76">Cloud PI Native</text:p>
          </table:table-cell>
          <table:table-cell table:style-name="Tableau80.B2" office:value-type="string">
            <text:p text:style-name="P76"><text:a xlink:type="simple" xlink:href="https://cloud-pi-native.fr/" text:style-name="Internet_20_link" text:visited-style-name="Visited_20_Internet_20_Link">https://cloud-pi-native.fr</text:a></text:p>
          </table:table-cell>
        </table:table-row>
        <table:table-row>
          <table:table-cell table:style-name="Tableau80.A2" office:value-type="string">
            <text:p text:style-name="P79">DAG dans OCMI / Resana</text:p>
          </table:table-cell>
          <table:table-cell table:style-name="Tableau80.B2" office:value-type="string">
            <text:p text:style-name="P76"/>
          </table:table-cell>
        </table:table-row>
        <table:table-row>
          <table:table-cell table:style-name="Tableau80.A2" office:value-type="string">
            <text:p text:style-name="P77">SSI</text:p>
          </table:table-cell>
          <table:table-cell table:style-name="Tableau80.B2" office:value-type="string">
            <text:p text:style-name="P76"><text:a xlink:type="simple" xlink:href="http://ssi.minint.fr/" text:style-name="Internet_20_link" text:visited-style-name="Visited_20_Internet_20_Link">http://ssi.minint.fr</text:a></text:p>
          </table:table-cell>
        </table:table-row>
        <table:table-row>
          <table:table-cell table:style-name="Tableau80.A2" office:value-type="string">
            <text:p text:style-name="P77">C2MI</text:p>
          </table:table-cell>
          <table:table-cell table:style-name="Tableau80.B2" office:value-type="string">
            <text:p text:style-name="P76"/>
          </table:table-cell>
        </table:table-row>
        <table:table-row>
          <table:table-cell table:style-name="Tableau80.A2" office:value-type="string">
            <text:p text:style-name="P77">Forge DC</text:p>
          </table:table-cell>
          <table:table-cell table:style-name="Tableau80.B2" office:value-type="string">
            <text:p text:style-name="P76"><text:a xlink:type="simple" xlink:href="http://forgedc.pages.forge-dc.cloudmi.minint.fr/forge-doc/" text:style-name="Internet_20_link" text:visited-style-name="Visited_20_Internet_20_Link">http://forgedc.pages.forge-dc.cloudmi.minint.fr/forge-doc/</text:a></text:p>
          </table:table-cell>
        </table:table-row>
        <table:table-row>
          <table:table-cell table:style-name="Tableau80.A2" office:value-type="string">
            <text:p text:style-name="P77">CIMI</text:p>
          </table:table-cell>
          <table:table-cell table:style-name="Tableau80.B2" office:value-type="string">
            <text:p text:style-name="P76"><text:a xlink:type="simple" xlink:href="http:// wiki.cimi.ext.minint.fr" text:style-name="Internet_20_link" text:visited-style-name="Visited_20_Internet_20_Link">http:// wiki.cimi.ext.minint.fr</text:a></text:p>
          </table:table-cell>
        </table:table-row>
        <table:table-row>
          <table:table-cell table:style-name="Tableau80.A2" office:value-type="string">
            <text:p text:style-name="P77">Catalogue API MI</text:p>
          </table:table-cell>
          <table:table-cell table:style-name="Tableau80.B2" office:value-type="string">
            <text:p text:style-name="P76"><text:a xlink:type="simple" xlink:href="http://api.minint.fr/" text:style-name="Internet_20_link" text:visited-style-name="Visited_20_Internet_20_Link">http://api.minint.fr</text:a></text:p>
          </table:table-cell>
        </table:table-row>
        <table:table-row>
          <table:table-cell table:style-name="Tableau80.A2" office:value-type="string">
            <text:p text:style-name="P77">MGMSIC</text:p>
          </table:table-cell>
          <table:table-cell table:style-name="Tableau80.B2" office:value-type="string">
            <text:p text:style-name="P76"><text:a xlink:type="simple" xlink:href="http://mgmsic.minint.fr/" text:style-name="Internet_20_link" text:visited-style-name="Visited_20_Internet_20_Link">http://mgmsic.minint.fr/</text:a></text:p>
          </table:table-cell>
        </table:table-row>
        <table:table-row>
          <table:table-cell table:style-name="Tableau80.A2" office:value-type="string">
            <text:p text:style-name="P77">DINUM</text:p>
          </table:table-cell>
          <table:table-cell table:style-name="Tableau80.B2" office:value-type="string">
            <text:p text:style-name="P76"><text:a xlink:type="simple" xlink:href="https://www.numerique.gouv.fr/" text:style-name="Internet_20_link" text:visited-style-name="Visited_20_Internet_20_Link">https://www.numerique.gouv.fr/</text:a></text:p>
          </table:table-cell>
        </table:table-row>
        <table:table-row>
          <table:table-cell table:style-name="Tableau80.A2" office:value-type="string">
            <text:p text:style-name="P77">RESANA</text:p>
          </table:table-cell>
          <table:table-cell table:style-name="Tableau80.B2" office:value-type="string">
            <text:p text:style-name="P76"><text:a xlink:type="simple" xlink:href="https://resana.numerique.gouv.fr/" text:style-name="Internet_20_link" text:visited-style-name="Visited_20_Internet_20_Link">https://resana.numerique.gouv.fr</text:a></text:p>
          </table:table-cell>
        </table:table-row>
        <table:table-row>
          <table:table-cell table:style-name="Tableau80.A2" office:value-type="string">
            <text:p text:style-name="P124">Stratégie d’API</text:p>
          </table:table-cell>
          <table:table-cell table:style-name="Tableau80.B2" office:value-type="string">
            <text:p text:style-name="P76"><text:a xlink:type="simple" xlink:href="http://cct.sg.minint.fr/strategie-api/sommaire.html" text:style-name="Internet_20_link" text:visited-style-name="Visited_20_Internet_20_Link">http://cct.sg.minint.fr/strategie-api/sommaire.html</text:a></text:p>
          </table:table-cell>
        </table:table-row>
        <table:table-row>
          <table:table-cell table:style-name="Tableau80.A2" office:value-type="string">
            <text:p text:style-name="P127">Procédures d’Exploitation <text:span text:style-name="T89">de la sécurité</text:span></text:p>
          </table:table-cell>
          <table:table-cell table:style-name="Tableau80.B2" office:value-type="string">
            <text:p text:style-name="P76"><text:a xlink:type="simple" xlink:href="http://dtnum.minint.fr/index.php/la-s-s-i/pes" text:style-name="Internet_20_link" text:visited-style-name="Visited_20_Internet_20_Link">http://dtnum.minint.fr/index.php/la-s-s-i/pes</text:a></text:p>
          </table:table-cell>
        </table:table-row>
      </table:table>
      <text:p text:style-name="P78"/>
      <text:p text:style-name="P78"/>
      <text:h text:style-name="P132" text:outline-level="2"><text:bookmark-start text:name="__RefHeading___Toc10108_1783990655 Copie 1"/>D<text:bookmark-start text:name="_Toc177660809 Copie 1"/><text:bookmark-start text:name="_Toc177652688 Copie 1"/><text:bookmark-start text:name="_Toc177652224 Copie 1"/><text:bookmark-start text:name="_Toc177569045 Copie 1"/>éfinitions métier<text:bookmark-end text:name="__RefHeading___Toc10108_1783990655 Copie 1"/><text:bookmark-end text:name="_Toc177660809 Copie 1"/><text:bookmark-end text:name="_Toc177652688 Copie 1"/><text:bookmark-end text:name="_Toc177652224 Copie 1"/><text:bookmark-end text:name="_Toc177569045 Copie 1"/></text:h>
      <text:p text:style-name="P90">{ A compléter }</text:p>
      <text:p text:style-name="P90"/>
      <table:table table:name="Tableau82" table:style-name="Tableau82">
        <table:table-column table:style-name="Tableau82.A"/>
        <table:table-column table:style-name="Tableau82.B"/>
        <table:table-header-rows>
          <table:table-row>
            <table:table-cell table:style-name="Tableau82.A1" office:value-type="string">
              <text:p text:style-name="P109">Termes</text:p>
            </table:table-cell>
            <table:table-cell table:style-name="Tableau82.B1" office:value-type="string">
              <text:p text:style-name="P109">Définitions</text:p>
            </table:table-cell>
          </table:table-row>
        </table:table-header-rows>
        <table:table-row>
          <table:table-cell table:style-name="Tableau82.A2" office:value-type="string">
            <text:p text:style-name="P109"/>
          </table:table-cell>
          <table:table-cell table:style-name="Tableau82.B2" office:value-type="string">
            <text:p text:style-name="P109"/>
          </table:table-cell>
        </table:table-row>
      </table:table>
      <text:p text:style-name="P89"/>
      <text:h text:style-name="P132" text:outline-level="2"><text:bookmark-start text:name="__RefHeading___Toc10106_1783990655"/><text:bookmark-start text:name="_Toc177569046 Copie 1"/><text:bookmark-start text:name="_Toc177652225 Copie 1"/><text:bookmark-start text:name="_Toc177652689 Copie 1"/><text:bookmark-start text:name="_Toc177660810 Copie 1"/><text:soft-page-break/>Définitions techniques<text:bookmark-end text:name="__RefHeading___Toc10106_1783990655"/><text:bookmark-end text:name="_Toc177569046 Copie 1"/><text:bookmark-end text:name="_Toc177652225 Copie 1"/><text:bookmark-end text:name="_Toc177652689 Copie 1"/><text:bookmark-end text:name="_Toc177660810 Copie 1"/></text:h>
      <table:table table:name="Tableau74" table:style-name="Tableau74">
        <table:table-column table:style-name="Tableau74.A"/>
        <table:table-column table:style-name="Tableau74.B"/>
        <table:table-header-rows>
          <table:table-row>
            <table:table-cell table:style-name="Tableau74.A1" office:value-type="string">
              <text:p text:style-name="Table_20_Contents">Termes</text:p>
            </table:table-cell>
            <table:table-cell table:style-name="Tableau74.B1" office:value-type="string">
              <text:p text:style-name="Table_20_Contents">Définition<text:span text:style-name="T48">s</text:span></text:p>
            </table:table-cell>
          </table:table-row>
        </table:table-header-rows>
        <table:table-row>
          <table:table-cell table:style-name="Tableau74.A2" office:value-type="string">
            <text:p text:style-name="Table_20_Contents">ACID</text:p>
          </table:table-cell>
          <table:table-cell table:style-name="Tableau74.B2" office:value-type="string">
            <text:p text:style-name="Table_20_Contents">Atomicité, Cohérence, Isolation et Durabilité.</text:p>
            <text:p text:style-name="P64">Les propriétés ACID (atomicité, cohérence, isolation et durabilité) sont un ensemble de propriétés qui garantissent qu’une transaction informatique est exécutée de façon fiable.</text:p>
          </table:table-cell>
        </table:table-row>
        <table:table-row>
          <table:table-cell table:style-name="Tableau74.A2" office:value-type="string">
            <text:p text:style-name="Table_20_Contents">API</text:p>
          </table:table-cell>
          <table:table-cell table:style-name="Tableau74.B2" office:value-type="string">
            <text:p text:style-name="Table_20_Contents">Application Programming Interface.<text:line-break/><text:span text:style-name="T49">C</text:span>’est un ensemble normalisé de classes, de méthodes, de fonctions et de constantes qui sert de façade par laquelle un logiciel offre des services à d’autres logiciels.</text:p>
          </table:table-cell>
        </table:table-row>
        <table:table-row>
          <table:table-cell table:style-name="Tableau74.A2" office:value-type="string">
            <text:p text:style-name="Table_20_Contents">CCT</text:p>
          </table:table-cell>
          <table:table-cell table:style-name="Tableau74.B2" office:value-type="string">
            <text:p text:style-name="Table_20_Contents">Cadre de Cohérence Technique</text:p>
          </table:table-cell>
        </table:table-row>
        <table:table-row>
          <table:table-cell table:style-name="Tableau74.A2" office:value-type="string">
            <text:p text:style-name="Table_20_Contents"><text:span text:style-name="Police_20_par_20_défaut">CSU</text:span></text:p>
          </table:table-cell>
          <table:table-cell table:style-name="Tableau74.B2" office:value-type="string">
            <text:p text:style-name="Table_20_Contents">Centre du Soutien aux Utilisateurs</text:p>
          </table:table-cell>
        </table:table-row>
        <table:table-row>
          <table:table-cell table:style-name="Tableau74.A2" office:value-type="string">
            <text:p text:style-name="Table_20_Contents">DAG</text:p>
          </table:table-cell>
          <table:table-cell table:style-name="Tableau74.B2" office:value-type="string">
            <text:p text:style-name="Table_20_Contents">Dossier d’Architecture Générale.</text:p>
            <text:p text:style-name="Table_20_Contents">Il a pour objectif de représenter les choix qui conditionnent la construction d’une application web. Il centralise et standardise les informations principales pour les différents services dans chacun de leur domaine.</text:p>
          </table:table-cell>
        </table:table-row>
        <table:table-row>
          <table:table-cell table:style-name="Tableau74.A2" office:value-type="string">
            <text:p text:style-name="Table_20_Contents">DM<text:span text:style-name="T86">I</text:span>A</text:p>
          </table:table-cell>
          <table:table-cell table:style-name="Tableau74.B2" office:value-type="string">
            <text:p text:style-name="Table_20_Contents">Durée Maximale d’Interruption Admissible.</text:p>
            <text:p text:style-name="P59"><text:span text:style-name="T51">Elle </text:span>est l’expression de besoin de disponibilité des différents métiers ou services, dans une organisation.</text:p>
          </table:table-cell>
        </table:table-row>
        <table:table-row>
          <table:table-cell table:style-name="Tableau74.A2" office:value-type="string">
            <text:p text:style-name="Table_20_Contents">FI </text:p>
          </table:table-cell>
          <table:table-cell table:style-name="Tableau74.B2" office:value-type="string">
            <text:p text:style-name="Table_20_Contents">Fournisseur d’identités</text:p>
          </table:table-cell>
        </table:table-row>
        <table:table-row>
          <table:table-cell table:style-name="Tableau74.A2" office:value-type="string">
            <text:p text:style-name="P112">Framework</text:p>
          </table:table-cell>
          <table:table-cell table:style-name="Tableau74.B2" office:value-type="string">
            <text:p text:style-name="P70">Désigne un ensemble cohérent de composants logiciels structurels, qui sert à créer les fondations ainsi que les grandes lignes de tout ou partie d’un logiciel.</text:p>
          </table:table-cell>
        </table:table-row>
        <table:table-row>
          <table:table-cell table:style-name="Tableau74.A2" office:value-type="string">
            <text:p text:style-name="Table_20_Contents">GDROLEX</text:p>
          </table:table-cell>
          <table:table-cell table:style-name="Tableau74.B2" office:value-type="string">
            <text:p text:style-name="Table_20_Contents">Gestion Des Rôles Exceptionnels</text:p>
          </table:table-cell>
        </table:table-row>
        <table:table-row>
          <table:table-cell table:style-name="Tableau74.A2" office:value-type="string">
            <text:p text:style-name="Table_20_Contents">IdP</text:p>
          </table:table-cell>
          <table:table-cell table:style-name="Tableau74.B2" office:value-type="string">
            <text:p text:style-name="Table_20_Contents">Identity Provider ou fournisseur d’identité en anglais</text:p>
          </table:table-cell>
        </table:table-row>
        <table:table-row>
          <table:table-cell table:style-name="Tableau74.A2" office:value-type="string">
            <text:p text:style-name="Table_20_Contents">MCD</text:p>
          </table:table-cell>
          <table:table-cell table:style-name="Tableau74.B2" office:value-type="string">
            <text:p text:style-name="P110">Modèle Conceptuel de Donnée<text:span text:style-name="T52">s</text:span>.<text:line-break/><text:span text:style-name="T1">C’est une représentation graphique de haut niveau qui permet facilement et simplement de comprendre comment les différentes données sont liés entre elles</text:span></text:p>
          </table:table-cell>
        </table:table-row>
        <table:table-row>
          <table:table-cell table:style-name="Tableau74.A2" office:value-type="string">
            <text:p text:style-name="P60">Minification</text:p>
          </table:table-cell>
          <table:table-cell table:style-name="Tableau74.B2" office:value-type="string">
            <text:p text:style-name="P60">Processus utilisé pour réduire la taille du code</text:p>
          </table:table-cell>
        </table:table-row>
        <table:table-row>
          <table:table-cell table:style-name="Tableau74.A2" office:value-type="string">
            <text:p text:style-name="Table_20_Contents">OIDC</text:p>
          </table:table-cell>
          <table:table-cell table:style-name="Tableau74.B2" office:value-type="string">
            <text:p text:style-name="Table_20_Contents">OpenId CONNECT</text:p>
          </table:table-cell>
        </table:table-row>
        <table:table-row>
          <table:table-cell table:style-name="Tableau74.A2" office:value-type="string">
            <text:p text:style-name="Table_20_Contents">PAI</text:p>
          </table:table-cell>
          <table:table-cell table:style-name="Tableau74.B2" office:value-type="string">
            <text:p text:style-name="Table_20_Contents">Projet Application Infrastructure</text:p>
          </table:table-cell>
        </table:table-row>
        <text:soft-page-break/>
        <table:table-row>
          <table:table-cell table:style-name="Tableau74.A2" office:value-type="string">
            <text:p text:style-name="Table_20_Contents">PASSAGE</text:p>
          </table:table-cell>
          <table:table-cell table:style-name="Tableau74.B2" office:value-type="string">
            <text:p text:style-name="Table_20_Contents">Portail d’Accès Sécurisé au Système d’Information pour les Acteurs Gérés et Éligibles</text:p>
          </table:table-cell>
        </table:table-row>
        <table:table-row>
          <table:table-cell table:style-name="Tableau74.A2" office:value-type="string">
            <text:p text:style-name="Table_20_Contents">PCA</text:p>
          </table:table-cell>
          <table:table-cell table:style-name="Tableau74.B2" office:value-type="string">
            <text:p text:style-name="P111">Plan de Continuité d’Activité.</text:p>
            <text:p text:style-name="P111"><text:line-break/><text:span text:style-name="T50">Il </text:span>a pour but de garantir la survie de l’entreprise en cas de sinistre important touchant le système informatique. Il s’agit de redémarrer l’activité le plus rapidement possible avec le minimum de perte de données. Ce plan est un des points essentiels de la politique de sécurité informatique d’une entreprise.</text:p>
          </table:table-cell>
        </table:table-row>
        <table:table-row>
          <table:table-cell table:style-name="Tableau74.A2" office:value-type="string">
            <text:p text:style-name="Table_20_Contents">PDMA</text:p>
          </table:table-cell>
          <table:table-cell table:style-name="Tableau74.B2" office:value-type="string">
            <text:p text:style-name="Table_20_Contents">Perte de Données Maximale Admissible.</text:p>
            <text:p text:style-name="P61"><text:span text:style-name="T53">E</text:span>n anglais recovery point objective (RPO) : Quantifie les données qu’un système d’information peut être amené à perdre par suite d’un incident. Usuellement, elle exprime une durée entre l’incident provoquant la perte de données et la date la plus récente des données qui seront utilisées en remplacement des données perdues. Cette durée est exprimée généralement en heures ou minutes.</text:p>
          </table:table-cell>
        </table:table-row>
        <table:table-row>
          <table:table-cell table:style-name="Tableau74.A2" office:value-type="string">
            <text:p text:style-name="Table_20_Contents">PRA</text:p>
          </table:table-cell>
          <table:table-cell table:style-name="Tableau74.B2" office:value-type="string">
            <text:p text:style-name="Table_20_Contents">Plan de Reprise d’Activité.</text:p>
            <text:p text:style-name="P62"><text:span text:style-name="T54">C’</text:span>est un ensemble de procédures (techniques, organisationnelles, sécurité) qui permet à une entité de prévoir par anticipation, les mécanismes pour reconstruire et remettre en route un système d’information en cas de sinistre important ou d’incident critique.</text:p>
          </table:table-cell>
        </table:table-row>
        <table:table-row>
          <table:table-cell table:style-name="Tableau74.A2" office:value-type="string">
            <text:p text:style-name="Table_20_Contents">PWA</text:p>
          </table:table-cell>
          <table:table-cell table:style-name="Tableau74.B2" office:value-type="string">
            <text:p text:style-name="Table_20_Contents">Progressive Web App.</text:p>
            <text:p text:style-name="P63">C’est une application web qui consiste en des pages ou des sites web, et qui peuvent apparaître à l’utilisateur de la même manière que les applications natives ou les applications mobiles.</text:p>
          </table:table-cell>
        </table:table-row>
        <table:table-row>
          <table:table-cell table:style-name="Tableau74.A2" office:value-type="string">
            <text:p text:style-name="Table_20_Contents"><text:span text:style-name="Police_20_par_20_défaut">RGPD</text:span></text:p>
          </table:table-cell>
          <table:table-cell table:style-name="Tableau74.B2" office:value-type="string">
            <text:p text:style-name="Table_20_Contents">Règlement Général sur la Protection des Données</text:p>
          </table:table-cell>
        </table:table-row>
        <table:table-row>
          <table:table-cell table:style-name="Tableau74.A2" office:value-type="string">
            <text:p text:style-name="Table_20_Contents">RPO</text:p>
          </table:table-cell>
          <table:table-cell table:style-name="Tableau74.B2" office:value-type="string">
            <text:p text:style-name="Table_20_Contents">Recovery Point Objective</text:p>
          </table:table-cell>
        </table:table-row>
        <table:table-row>
          <table:table-cell table:style-name="Tableau74.A2" office:value-type="string">
            <text:p text:style-name="P68">Service Worker</text:p>
          </table:table-cell>
          <table:table-cell table:style-name="Tableau74.B2" office:value-type="string">
            <text:p text:style-name="P67">pour la gestion hors connexion. Il pilote l’accès et la gestion aux composants nécessaires</text:p>
          </table:table-cell>
        </table:table-row>
        <table:table-row>
          <table:table-cell table:style-name="Tableau74.A2" office:value-type="string">
            <text:p text:style-name="Table_20_Contents">SP</text:p>
          </table:table-cell>
          <table:table-cell table:style-name="Tableau74.B2" office:value-type="string">
            <text:p text:style-name="Table_20_Contents">Service Provider ou fournisseur de service en anglais</text:p>
          </table:table-cell>
        </table:table-row>
        <table:table-row>
          <table:table-cell table:style-name="Tableau74.A2" office:value-type="string">
            <text:p text:style-name="Table_20_Contents">SPA</text:p>
          </table:table-cell>
          <table:table-cell table:style-name="Tableau74.B2" office:value-type="string">
            <text:p text:style-name="Table_20_Contents">Single Page Application.</text:p>
            <text:p text:style-name="P69">C’est une application web accessible via une page web unique. Le but est d’éviter le chargement d’une nouvelle page à chaque action demandée, et de fluidifier ainsi l’expérience utilisa<text:soft-page-break/>teur.</text:p>
          </table:table-cell>
        </table:table-row>
        <table:table-row>
          <table:table-cell table:style-name="Tableau74.A2" office:value-type="string">
            <text:p text:style-name="Table_20_Contents">SSO</text:p>
          </table:table-cell>
          <table:table-cell table:style-name="Tableau74.B2" office:value-type="string">
            <text:p text:style-name="Table_20_Contents">Single Sign-On.</text:p>
            <text:p text:style-name="P65">L’authentification unique est une méthode permettant à un utilisateur d’accéder à plusieurs applications informatiques (ou sites web sécurisés) en ne procédant qu’à une seule authentification.</text:p>
          </table:table-cell>
        </table:table-row>
        <table:table-row>
          <table:table-cell table:style-name="Tableau74.A2" office:value-type="string">
            <text:p text:style-name="Table_20_Contents">SSR</text:p>
          </table:table-cell>
          <table:table-cell table:style-name="Tableau74.B2" office:value-type="string">
            <text:p text:style-name="Table_20_Contents">Server-side rendering.</text:p>
            <text:p text:style-name="P66">Fait référence à une application dont le rendu (HTML final) est fait côté client (dans le navigateur par le Javascript) d’afficher aussi les pages pages web côté serveur. Cela permet de régler les problèmes d’indexation de ces applications.</text:p>
          </table:table-cell>
        </table:table-row>
      </table:table>
      <text:p text:style-name="P58"/>
      <text:p text:style-name="P57"/>
      <text:h text:style-name="Heading_20_2" text:outline-level="2"><text:bookmark-start text:name="_Toc177569047"/><text:bookmark-start text:name="_Toc177652226"/><text:bookmark-start text:name="_Toc177652690"/><text:bookmark-start text:name="__RefHeading___Toc10112_1783990655"/><text:bookmark-start text:name="_Toc177660811"/>Normes et stratégies de APIs<text:bookmark-end text:name="_Toc177569047"/><text:bookmark-end text:name="_Toc177652226"/><text:bookmark-end text:name="_Toc177652690"/><text:bookmark-end text:name="__RefHeading___Toc10112_1783990655"/><text:bookmark-end text:name="_Toc177660811"/></text:h>
      <text:p text:style-name="first-paragraph">API publiques</text:p>
      <text:p text:style-name="western"><text:a xlink:type="simple" xlink:href="https://api.gouv.fr/guides/diffusion-api-guide-pratique" office:target-frame-name="_top" xlink:show="replace" text:style-name="Internet_20_link" text:visited-style-name="Visited_20_Internet_20_Link"><text:span text:style-name="Lien_20_hypertexte"><text:span text:style-name="T3">api.gouv.fr/guides/diffusion-api-guide-pratique</text:span></text:span></text:a><text:line-break/><text:a xlink:type="simple" xlink:href="https://api.gouv.fr/guides/doctrine-api" office:target-frame-name="_top" xlink:show="replace" text:style-name="Internet_20_link" text:visited-style-name="Visited_20_Internet_20_Link"><text:span text:style-name="Lien_20_hypertexte"><text:span text:style-name="T3">api.gouv.fr/guides/doctrine-api</text:span></text:span></text:a></text:p>
      <text:p text:style-name="western">Ressources complémentaires</text:p>
      <text:list text:style-name="L18">
        <text:list-item>
          <text:p text:style-name="P157"><text:a xlink:type="simple" xlink:href="http://cct.sg.minint.fr/strategie-api/sommaire.html" office:target-frame-name="_top" xlink:show="replace" text:style-name="Internet_20_link" text:visited-style-name="Visited_20_Internet_20_Link"><text:span text:style-name="Lien_20_hypertexte"><text:span text:style-name="T4">Stratégie API - DTNUM</text:span></text:span></text:a></text:p>
        </text:list-item>
      </text:list>
      <text:p text:style-name="Normal"/>
      <text:h text:style-name="Heading_20_2" text:outline-level="2"><text:bookmark-start text:name="_Toc177569048"/><text:bookmark-start text:name="_Toc177652227"/><text:bookmark-start text:name="_Toc177652691"/><text:bookmark-start text:name="__RefHeading___Toc10114_1783990655"/><text:bookmark-start text:name="_Toc177660812"/>Méthodes HTTP<text:bookmark-end text:name="_Toc177569048"/><text:bookmark-end text:name="_Toc177652227"/><text:bookmark-end text:name="_Toc177652691"/><text:bookmark-end text:name="__RefHeading___Toc10114_1783990655"/><text:bookmark-end text:name="_Toc177660812"/></text:h>
      <text:p text:style-name="P55"><text:span text:style-name="Police_20_par_20_défaut"><text:span text:style-name="T14">Recommandations pour l’utilisation des méthodes HTTP au niveau des API REST</text:span></text:span></text:p>
      <table:table table:name="Tableau73" table:style-name="Tableau73">
        <table:table-column table:style-name="Tableau73.A"/>
        <table:table-column table:style-name="Tableau73.B"/>
        <table:table-column table:style-name="Tableau73.C"/>
        <table:table-column table:style-name="Tableau73.D"/>
        <table:table-header-rows>
          <table:table-row>
            <table:table-cell table:style-name="Tableau73.A1" office:value-type="string">
              <text:p text:style-name="P35">Code</text:p>
            </table:table-cell>
            <table:table-cell table:style-name="Tableau73.A1" office:value-type="string">
              <text:p text:style-name="P35">CRUD</text:p>
            </table:table-cell>
            <table:table-cell table:style-name="Tableau73.A1" office:value-type="string">
              <text:p text:style-name="P35">Collection complète (e.g. /users)</text:p>
            </table:table-cell>
            <table:table-cell table:style-name="Tableau73.A1" office:value-type="string">
              <text:p text:style-name="P35">Item spécifique (e.g. /users/{id})</text:p>
            </table:table-cell>
          </table:table-row>
        </table:table-header-rows>
        <table:table-row>
          <table:table-cell table:style-name="Tableau73.A1" office:value-type="string">
            <text:p text:style-name="P36">POST</text:p>
          </table:table-cell>
          <table:table-cell table:style-name="Tableau73.A1" office:value-type="string">
            <text:p text:style-name="P36">Create</text:p>
          </table:table-cell>
          <table:table-cell table:style-name="Tableau73.A1" office:value-type="string">
            <text:p text:style-name="P36">201 (Created), en-têtes HTTP 'Location' avec lien vers /users/{id} contenant le nouvel ID.</text:p>
          </table:table-cell>
          <table:table-cell table:style-name="Tableau73.A1" office:value-type="string">
            <text:p text:style-name="P36">404 (Not Found), 409 (Conflict) si la ressource existe déjà</text:p>
          </table:table-cell>
        </table:table-row>
        <table:table-row>
          <table:table-cell table:style-name="Tableau73.A1" office:value-type="string">
            <text:p text:style-name="P36">GET</text:p>
          </table:table-cell>
          <table:table-cell table:style-name="Tableau73.A1" office:value-type="string">
            <text:p text:style-name="P36">Read</text:p>
          </table:table-cell>
          <table:table-cell table:style-name="Tableau73.A1" office:value-type="string">
            <text:p text:style-name="P36">200 (OK), liste d’utilisateurs. Utiliser sur les grandes listes des paramètres de pagination, tri, filtres pour les parcourir</text:p>
          </table:table-cell>
          <table:table-cell table:style-name="Tableau73.A1" office:value-type="string">
            <text:p text:style-name="P36">200 (OK), utilisateur unique. 404 (Not Found), si l’ID n’est pas trouvé ou invalide.</text:p>
          </table:table-cell>
        </table:table-row>
        <table:table-row>
          <table:table-cell table:style-name="Tableau73.A1" office:value-type="string">
            <text:p text:style-name="P36">PUT</text:p>
          </table:table-cell>
          <table:table-cell table:style-name="Tableau73.A1" office:value-type="string">
            <text:p text:style-name="P36">Update/Replace</text:p>
          </table:table-cell>
          <table:table-cell table:style-name="Tableau73.A1" office:value-type="string">
            <text:p text:style-name="P36">405 (Method Not Allowed), à moins que vous vouliez modifier/remplacer toutes les ressources de la collection</text:p>
          </table:table-cell>
          <table:table-cell table:style-name="Tableau73.A1" office:value-type="string">
            <text:p text:style-name="P36">200 (OK) or 204 (No Content). 404 (Not Found), si l’ID n’est pas trouvé ou invalide.</text:p>
          </table:table-cell>
        </table:table-row>
        <table:table-row>
          <table:table-cell table:style-name="Tableau73.A1" office:value-type="string">
            <text:p text:style-name="P36">PATCH</text:p>
          </table:table-cell>
          <table:table-cell table:style-name="Tableau73.A1" office:value-type="string">
            <text:p text:style-name="P36">Update/Modify</text:p>
          </table:table-cell>
          <table:table-cell table:style-name="Tableau73.A1" office:value-type="string">
            <text:p text:style-name="P36">405 (Method Not Allowed), à moins que vous vouliez modifier la collection elle-même</text:p>
          </table:table-cell>
          <table:table-cell table:style-name="Tableau73.A1" office:value-type="string">
            <text:p text:style-name="P36">200 (OK) or 204 (No Content). 404 (Not Found), si l’ID n’est pas trouvé ou invalide.</text:p>
          </table:table-cell>
        </table:table-row>
        <text:soft-page-break/>
        <table:table-row>
          <table:table-cell table:style-name="Tableau73.A1" office:value-type="string">
            <text:p text:style-name="P36">DELETE</text:p>
          </table:table-cell>
          <table:table-cell table:style-name="Tableau73.A1" office:value-type="string">
            <text:p text:style-name="P36">Delete</text:p>
          </table:table-cell>
          <table:table-cell table:style-name="Tableau73.A1" office:value-type="string">
            <text:p text:style-name="P36">405 (Method Not Allowed), à moins que vous vouliez supprimer la collection complète—rarement souhaité.</text:p>
          </table:table-cell>
          <table:table-cell table:style-name="Tableau73.A1" office:value-type="string">
            <text:p text:style-name="P36">200 (OK). 404 (Not Found), si l’ID n’est pas trouvé ou invalide</text:p>
          </table:table-cell>
        </table:table-row>
      </table:table>
      <text:p text:style-name="Normal"/>
      <text:h text:style-name="Heading_20_2" text:outline-level="2"><text:bookmark-start text:name="_Toc177569049"/><text:bookmark-start text:name="_Toc177652228"/><text:bookmark-start text:name="_Toc177652692"/><text:bookmark-start text:name="__RefHeading___Toc10116_1783990655"/><text:bookmark-start text:name="_Toc177660813"/>Codes HTTP<text:bookmark-end text:name="_Toc177569049"/><text:bookmark-end text:name="_Toc177652228"/><text:bookmark-end text:name="_Toc177652692"/><text:bookmark-end text:name="__RefHeading___Toc10116_1783990655"/><text:bookmark-end text:name="_Toc177660813"/></text:h>
      <text:p text:style-name="P105">Les code<text:span text:style-name="T42">s</text:span> HTTP sont définis dans la <text:a xlink:type="simple" xlink:href="http://cct.sg.minint.fr/strategie-api/regles.html#pr2" text:style-name="Internet_20_link" text:visited-style-name="Visited_20_Internet_20_Link"><text:span text:style-name="T79">stratégie d'API</text:span></text:a> du ministère.</text:p>
      <text:h text:style-name="Heading_20_2" text:outline-level="2"><text:bookmark-start text:name="__RefHeading___Toc10118_1783990655"/><text:bookmark-start text:name="_Toc177569050"/><text:bookmark-start text:name="_Toc177652229"/><text:bookmark-start text:name="_Toc177652693"/><text:bookmark-start text:name="_Toc177660814"/>Régions cloud<text:bookmark-end text:name="__RefHeading___Toc10118_1783990655"/><text:bookmark-end text:name="_Toc177569050"/><text:bookmark-end text:name="_Toc177652229"/><text:bookmark-end text:name="_Toc177652693"/><text:bookmark-end text:name="_Toc177660814"/></text:h>
      <table:table table:name="Tableau75" table:style-name="Tableau75">
        <table:table-column table:style-name="Tableau75.A"/>
        <table:table-column table:style-name="Tableau75.B"/>
        <table:table-column table:style-name="Tableau75.C"/>
        <table:table-header-rows>
          <table:table-row>
            <table:table-cell table:style-name="Tableau75.A1" office:value-type="string">
              <text:p text:style-name="P35">Nom</text:p>
            </table:table-cell>
            <table:table-cell table:style-name="Tableau75.A1" office:value-type="string">
              <text:p text:style-name="P35">Sigle</text:p>
            </table:table-cell>
            <table:table-cell table:style-name="Tableau75.A1" office:value-type="string">
              <text:p text:style-name="P35">Localisation</text:p>
            </table:table-cell>
          </table:table-row>
        </table:table-header-rows>
        <table:table-row>
          <table:table-cell table:style-name="Tableau75.A1" office:value-type="string">
            <text:p text:style-name="P36">Région 1</text:p>
          </table:table-cell>
          <table:table-cell table:style-name="Tableau75.A1" office:value-type="string">
            <text:p text:style-name="P36">SIR</text:p>
          </table:table-cell>
          <table:table-cell table:style-name="Tableau75.A1" office:value-type="string">
            <text:p text:style-name="P36">Rosny</text:p>
          </table:table-cell>
        </table:table-row>
        <table:table-row>
          <table:table-cell table:style-name="Tableau75.A1" office:value-type="string">
            <text:p text:style-name="P36">Région 2</text:p>
          </table:table-cell>
          <table:table-cell table:style-name="Tableau75.A1" office:value-type="string">
            <text:p text:style-name="P36">SIL</text:p>
          </table:table-cell>
          <table:table-cell table:style-name="Tableau75.A1" office:value-type="string">
            <text:p text:style-name="P36">Lognes</text:p>
          </table:table-cell>
        </table:table-row>
      </table:table>
      <text:p text:style-name="Normal"/>
      <text:h text:style-name="Heading_20_2" text:outline-level="2"><text:bookmark-start text:name="__RefHeading___Toc10120_1783990655"/><text:bookmark-start text:name="_Toc177569051"/><text:bookmark-start text:name="_Toc177652230"/><text:bookmark-start text:name="_Toc177652694"/><text:bookmark-start text:name="_Toc177660815"/>Zone<text:span text:style-name="T70">s</text:span> cloud<text:bookmark-end text:name="__RefHeading___Toc10120_1783990655"/><text:bookmark-end text:name="_Toc177569051"/><text:bookmark-end text:name="_Toc177652230"/><text:bookmark-end text:name="_Toc177652694"/><text:bookmark-end text:name="_Toc177660815"/></text:h>
      <text:p text:style-name="P11">Le choix des zones <text:span text:style-name="T44">de sensibilités</text:span> pour les différents environnements se fait selon les principes suivants:</text:p>
      <text:p text:style-name="Normal"/>
      <table:table table:name="Tableau76" table:style-name="Tableau76">
        <table:table-column table:style-name="Tableau76.A"/>
        <table:table-column table:style-name="Tableau76.B"/>
        <table:table-row>
          <table:table-cell table:style-name="Tableau76.A1" office:value-type="string">
            <text:p text:style-name="P29"><text:span text:style-name="T43">S</text:span>1</text:p>
          </table:table-cell>
          <table:table-cell table:style-name="Tableau76.A1" office:value-type="string">
            <text:p text:style-name="P32">USUEL ou Non Protégé</text:p>
          </table:table-cell>
        </table:table-row>
        <table:table-row>
          <table:table-cell table:style-name="Tableau76.A1" office:value-type="string">
            <text:p text:style-name="P29"><text:span text:style-name="T43">S</text:span>2</text:p>
          </table:table-cell>
          <table:table-cell table:style-name="Tableau76.A1" office:value-type="string">
            <text:p text:style-name="P32">Diffusion Restreinte</text:p>
          </table:table-cell>
        </table:table-row>
      </table:table>
      <text:p text:style-name="Normal"/>
      <text:h text:style-name="Heading_20_2" text:outline-level="2"><text:bookmark-start text:name="_Toc177660816"/><text:bookmark-start text:name="_Toc177652695"/><text:bookmark-start text:name="_Toc177652231"/><text:bookmark-start text:name="__RefHeading___Toc10122_1783990655"/><text:bookmark-start text:name="_Toc177569052"/>Niveau d'habilitation de sécurité<text:bookmark-end text:name="_Toc177660816"/><text:bookmark-end text:name="_Toc177652695"/><text:bookmark-end text:name="_Toc177652231"/><text:bookmark-end text:name="__RefHeading___Toc10122_1783990655"/><text:bookmark-end text:name="_Toc177569052"/></text:h>
      <table:table table:name="Tableau77" table:style-name="Tableau77">
        <table:table-column table:style-name="Tableau77.A"/>
        <table:table-column table:style-name="Tableau77.B"/>
        <table:table-row>
          <table:table-cell table:style-name="Tableau77.A1" office:value-type="string">
            <text:p text:style-name="P35">Niveau d’habilitation de sécurité</text:p>
          </table:table-cell>
          <table:table-cell table:style-name="Tableau77.A1" office:value-type="string">
            <text:p text:style-name="P35">Description</text:p>
          </table:table-cell>
        </table:table-row>
        <table:table-row>
          <table:table-cell table:style-name="Tableau77.A1" office:value-type="string">
            <text:p text:style-name="P36">Secret Défense</text:p>
          </table:table-cell>
          <table:table-cell table:style-name="Tableau77.A1" office:value-type="string">
            <text:p text:style-name="P36">Elle est réservée aux personnes pouvant connaître des informations ou supports protégés dont la divulgation non autorisée est de nature à nuire gravement à la défense nationale.</text:p>
          </table:table-cell>
        </table:table-row>
        <table:table-row>
          <table:table-cell table:style-name="Tableau77.A1" office:value-type="string">
            <text:p text:style-name="P36">Très Secret Défense</text:p>
          </table:table-cell>
          <table:table-cell table:style-name="Tableau77.A1" office:value-type="string">
            <text:p text:style-name="P36">Elle est réservée aux personnes pouvant connaître des informations ou supports protégés dont la divulgation non autorisée est de nature à nuire très gravement à la défense nationale et qui concernent les priorités gouvernementales en matière de défense. Seulement quelques personnes en France.</text:p>
          </table:table-cell>
        </table:table-row>
      </table:table>
      <text:p text:style-name="Normal"/>
      <text:h text:style-name="Heading_20_2" text:outline-level="2"><text:bookmark-start text:name="_Toc177660817"/><text:bookmark-start text:name="_Toc177652696"/><text:bookmark-start text:name="_Toc177652232"/><text:bookmark-start text:name="__RefHeading___Toc10124_1783990655"/><text:bookmark-start text:name="_Toc177569053"/>Niveau de disponibilité<text:bookmark-end text:name="_Toc177660817"/><text:bookmark-end text:name="_Toc177652696"/><text:bookmark-end text:name="_Toc177652232"/><text:bookmark-end text:name="__RefHeading___Toc10124_1783990655"/><text:bookmark-end text:name="_Toc177569053"/></text:h>
      <table:table table:name="Tableau78" table:style-name="Tableau78">
        <table:table-column table:style-name="Tableau78.A" table:number-columns-repeated="4"/>
        <table:table-row>
          <table:table-cell table:style-name="Tableau78.A1" office:value-type="string">
            <text:p text:style-name="P35">Disponibilité en %</text:p>
          </table:table-cell>
          <table:table-cell table:style-name="Tableau78.A1" office:value-type="string">
            <text:p text:style-name="P35">Indisponibilité par année</text:p>
          </table:table-cell>
          <table:table-cell table:style-name="Tableau78.A1" office:value-type="string">
            <text:p text:style-name="P35">Indisponibilité par mois</text:p>
          </table:table-cell>
          <table:table-cell table:style-name="Tableau78.A1" office:value-type="string">
            <text:p text:style-name="P35">Indisponibilité par semaine</text:p>
          </table:table-cell>
        </table:table-row>
        <table:table-row>
          <table:table-cell table:style-name="Tableau78.A1" office:value-type="string">
            <text:p text:style-name="P36">90 % (« un neuf »)</text:p>
          </table:table-cell>
          <table:table-cell table:style-name="Tableau78.A1" office:value-type="string">
            <text:p text:style-name="P36">36,5 jours</text:p>
          </table:table-cell>
          <table:table-cell table:style-name="Tableau78.A1" office:value-type="string">
            <text:p text:style-name="P36">72 heures</text:p>
          </table:table-cell>
          <table:table-cell table:style-name="Tableau78.A1" office:value-type="string">
            <text:p text:style-name="P36">16,8 heures</text:p>
          </table:table-cell>
        </table:table-row>
        <text:soft-page-break/>
        <table:table-row>
          <table:table-cell table:style-name="Tableau78.A1" office:value-type="string">
            <text:p text:style-name="P36">95,00 %</text:p>
          </table:table-cell>
          <table:table-cell table:style-name="Tableau78.A1" office:value-type="string">
            <text:p text:style-name="P36">18,25 jours</text:p>
          </table:table-cell>
          <table:table-cell table:style-name="Tableau78.A1" office:value-type="string">
            <text:p text:style-name="P36">36 heures</text:p>
          </table:table-cell>
          <table:table-cell table:style-name="Tableau78.A1" office:value-type="string">
            <text:p text:style-name="P36">8,4 heures</text:p>
          </table:table-cell>
        </table:table-row>
        <table:table-row>
          <table:table-cell table:style-name="Tableau78.A1" office:value-type="string">
            <text:p text:style-name="P36">98,00 %</text:p>
          </table:table-cell>
          <table:table-cell table:style-name="Tableau78.A1" office:value-type="string">
            <text:p text:style-name="P36">7,30 jours</text:p>
          </table:table-cell>
          <table:table-cell table:style-name="Tableau78.A1" office:value-type="string">
            <text:p text:style-name="P36">14,4 heures</text:p>
          </table:table-cell>
          <table:table-cell table:style-name="Tableau78.A1" office:value-type="string">
            <text:p text:style-name="P36">3,36 heures</text:p>
          </table:table-cell>
        </table:table-row>
        <table:table-row>
          <table:table-cell table:style-name="Tableau78.A1" office:value-type="string">
            <text:p text:style-name="P36">99 % (« deux neuf »)</text:p>
          </table:table-cell>
          <table:table-cell table:style-name="Tableau78.A1" office:value-type="string">
            <text:p text:style-name="P36">3,65 jours</text:p>
          </table:table-cell>
          <table:table-cell table:style-name="Tableau78.A1" office:value-type="string">
            <text:p text:style-name="P36">7,20 heures</text:p>
          </table:table-cell>
          <table:table-cell table:style-name="Tableau78.A1" office:value-type="string">
            <text:p text:style-name="P36">1,68 heure</text:p>
          </table:table-cell>
        </table:table-row>
        <table:table-row>
          <table:table-cell table:style-name="Tableau78.A1" office:value-type="string">
            <text:p text:style-name="P36">99,50 %</text:p>
          </table:table-cell>
          <table:table-cell table:style-name="Tableau78.A1" office:value-type="string">
            <text:p text:style-name="P36">1,83 jour</text:p>
          </table:table-cell>
          <table:table-cell table:style-name="Tableau78.A1" office:value-type="string">
            <text:p text:style-name="P36">3,60 heures</text:p>
          </table:table-cell>
          <table:table-cell table:style-name="Tableau78.A1" office:value-type="string">
            <text:p text:style-name="P36">50,4 minutes</text:p>
          </table:table-cell>
        </table:table-row>
        <table:table-row>
          <table:table-cell table:style-name="Tableau78.A1" office:value-type="string">
            <text:p text:style-name="P36">99,80 %</text:p>
          </table:table-cell>
          <table:table-cell table:style-name="Tableau78.A1" office:value-type="string">
            <text:p text:style-name="P36">17,52 heures</text:p>
          </table:table-cell>
          <table:table-cell table:style-name="Tableau78.A1" office:value-type="string">
            <text:p text:style-name="P36">86,23 minutes</text:p>
          </table:table-cell>
          <table:table-cell table:style-name="Tableau78.A1" office:value-type="string">
            <text:p text:style-name="P36">20,16 minutes</text:p>
          </table:table-cell>
        </table:table-row>
        <table:table-row>
          <table:table-cell table:style-name="Tableau78.A1" office:value-type="string">
            <text:p text:style-name="P36">99,9 % (« trois neuf »)</text:p>
          </table:table-cell>
          <table:table-cell table:style-name="Tableau78.A1" office:value-type="string">
            <text:p text:style-name="P36">8,76 heures</text:p>
          </table:table-cell>
          <table:table-cell table:style-name="Tableau78.A1" office:value-type="string">
            <text:p text:style-name="P36">43,2 minutes</text:p>
          </table:table-cell>
          <table:table-cell table:style-name="Tableau78.A1" office:value-type="string">
            <text:p text:style-name="P36">10,1 minutes</text:p>
          </table:table-cell>
        </table:table-row>
        <table:table-row>
          <table:table-cell table:style-name="Tableau78.A1" office:value-type="string">
            <text:p text:style-name="P36">99,95 %</text:p>
          </table:table-cell>
          <table:table-cell table:style-name="Tableau78.A1" office:value-type="string">
            <text:p text:style-name="P36">4,38 heures</text:p>
          </table:table-cell>
          <table:table-cell table:style-name="Tableau78.A1" office:value-type="string">
            <text:p text:style-name="P36">21,56 minutes</text:p>
          </table:table-cell>
          <table:table-cell table:style-name="Tableau78.A1" office:value-type="string">
            <text:p text:style-name="P36">5,04 minutes</text:p>
          </table:table-cell>
        </table:table-row>
        <table:table-row>
          <table:table-cell table:style-name="Tableau78.A1" office:value-type="string">
            <text:p text:style-name="P36">99,99 % (« quatre neuf »)</text:p>
          </table:table-cell>
          <table:table-cell table:style-name="Tableau78.A1" office:value-type="string">
            <text:p text:style-name="P36">52,56 minutes</text:p>
          </table:table-cell>
          <table:table-cell table:style-name="Tableau78.A1" office:value-type="string">
            <text:p text:style-name="P36">4,32 minutes</text:p>
          </table:table-cell>
          <table:table-cell table:style-name="Tableau78.A1" office:value-type="string">
            <text:p text:style-name="P36">1,01 minute</text:p>
          </table:table-cell>
        </table:table-row>
        <table:table-row>
          <table:table-cell table:style-name="Tableau78.A1" office:value-type="string">
            <text:p text:style-name="P36">99,999 % (« cinq neuf »)</text:p>
          </table:table-cell>
          <table:table-cell table:style-name="Tableau78.A1" office:value-type="string">
            <text:p text:style-name="P36">5,26 minutes</text:p>
          </table:table-cell>
          <table:table-cell table:style-name="Tableau78.A1" office:value-type="string">
            <text:p text:style-name="P36">25,9 secondes</text:p>
          </table:table-cell>
          <table:table-cell table:style-name="Tableau78.A1" office:value-type="string">
            <text:p text:style-name="P36">6,05 secondes</text:p>
          </table:table-cell>
        </table:table-row>
        <table:table-row>
          <table:table-cell table:style-name="Tableau78.A1" office:value-type="string">
            <text:p text:style-name="P36">99,9999 % (« six neuf »)</text:p>
          </table:table-cell>
          <table:table-cell table:style-name="Tableau78.A1" office:value-type="string">
            <text:p text:style-name="P36">31,5 secondes</text:p>
          </table:table-cell>
          <table:table-cell table:style-name="Tableau78.A1" office:value-type="string">
            <text:p text:style-name="P36">2,59 secondes</text:p>
          </table:table-cell>
          <table:table-cell table:style-name="Tableau78.A1" office:value-type="string">
            <text:p text:style-name="P36">0,605 seconde</text:p>
          </table:table-cell>
        </table:table-row>
      </table:table>
      <text:p text:style-name="Normal"/>
      <text:h text:style-name="Heading_20_2" text:outline-level="2"><text:bookmark-start text:name="_Toc177660818"/><text:bookmark-start text:name="_Toc177652697"/><text:bookmark-start text:name="_Toc177652233"/><text:bookmark-start text:name="__RefHeading___Toc10126_1783990655"/><text:bookmark-start text:name="_Toc177569054"/>Niveau d'accessibilité<text:bookmark-end text:name="_Toc177660818"/><text:bookmark-end text:name="_Toc177652697"/><text:bookmark-end text:name="_Toc177652233"/><text:bookmark-end text:name="__RefHeading___Toc10126_1783990655"/><text:bookmark-end text:name="_Toc177569054"/></text:h>
      <text:p text:style-name="P11">Les WCAG définissent trois niveaux d’accessibilité, repris par le RGAA, qui prennent en compte à la fois la faisabilité et l’impact utilisateur :</text:p>
      <table:table table:name="Tableau79" table:style-name="Tableau79">
        <table:table-column table:style-name="Tableau79.A" table:number-columns-repeated="2"/>
        <table:table-row>
          <table:table-cell table:style-name="Tableau79.A1" office:value-type="string">
            <text:p text:style-name="P19">Niveau A</text:p>
          </table:table-cell>
          <table:table-cell table:style-name="Tableau79.A1" office:value-type="string">
            <text:p text:style-name="P19">Niveau d’accessibilité minimal</text:p>
          </table:table-cell>
        </table:table-row>
        <table:table-row>
          <table:table-cell table:style-name="Tableau79.A1" office:value-type="string">
            <text:p text:style-name="P19">Niveau AA</text:p>
          </table:table-cell>
          <table:table-cell table:style-name="Tableau79.A1" office:value-type="string">
            <text:p text:style-name="P19">Niveau d’accessibilité amélioré</text:p>
          </table:table-cell>
        </table:table-row>
        <table:table-row>
          <table:table-cell table:style-name="Tableau79.A1" office:value-type="string">
            <text:p text:style-name="P19">Niveau triple AAA</text:p>
          </table:table-cell>
          <table:table-cell table:style-name="Tableau79.A1" office:value-type="string">
            <text:p text:style-name="P19">Niveau d’accessibilité adapté à certains contextes</text:p>
          </table:table-cell>
        </table:table-row>
      </table:table>
      <text:p text:style-name="Normal"/>
      <text:h text:style-name="Heading_20_2" text:outline-level="2"><text:bookmark-start text:name="_Toc177660819"/><text:bookmark-start text:name="_Toc177652698"/><text:bookmark-start text:name="_Toc177652234"/><text:bookmark-start text:name="__RefHeading___Toc10128_1783990655"/><text:bookmark-start text:name="_Toc177569055"/>Stratégie de redémarrage<text:bookmark-end text:name="_Toc177660819"/><text:bookmark-end text:name="_Toc177652698"/><text:bookmark-end text:name="_Toc177652234"/><text:bookmark-end text:name="__RefHeading___Toc10128_1783990655"/><text:bookmark-end text:name="_Toc177569055"/></text:h>
      <text:p text:style-name="P11">les valeurs possibles pour la politique de redémarrage sont "no", "on-failure", "always".</text:p>
      <text:p text:style-name="P54"><text:span text:style-name="Police_20_par_20_défaut"><text:span text:style-name="T17">always</text:span></text:span></text:p>
      <text:p text:style-name="P12">signifie que le conteneur sera redémarré même s’il est sorti avec un code de sortie zéro (c’est-à-dire avec succès). Ceci est utile lorsque on ne se soucie pas de la façon dont le conteneur est sorti, et qu’on veut simplement s’assurer qu’il est toujours en cours d’exécution (par exemple, un serveur Web). Ceci est la valeur par défaut.</text:p>
      <text:p text:style-name="P54"><text:span text:style-name="Police_20_par_20_défaut"><text:span text:style-name="T17">on-failure</text:span></text:span></text:p>
      <text:p text:style-name="P12">signifie que le conteneur ne sera redémarré que s’il est sorti avec un code de sortie non nul (c’est-à-dire quelque chose qui s’est mal passé). Ceci est utile si on veut accomplir une tâche avec le conteneur et s’assurer qu’elle se termine avec succès - si ce n’est pas le cas, le conteneur sera redémarré jusqu’à ce que la tâche soit accomplie. Avec ce mode il faut spécifier MaximumRetryCount pour indiquer le nombre de fois qu' réessaye avant d’abandonner.</text:p>
      <text:p text:style-name="P11">Les serveurs qui enregistrent les données ne sont normalement pas autorisés à être redémarrés automatiquements</text:p>
      <text:p text:style-name="P9">Les autres serveurs qui n’enregistrent pas directement les données applicative peuvent redémarrer automatiquement.<text:line-break/>Ces serveurs serveurs doivent respecter les principes "Stateless".</text:p>
      <text:list text:style-name="L19">
        <text:list-item>
          <text:p text:style-name="P139">La politique de redémarrage utilisée sera alors "always" (mode par défaut)</text:p>
        </text:list-item>
        <text:list-item>
          <text:p text:style-name="P139"><text:soft-page-break/>Tout arrêt d’un serveur doit faire l’objet d’une remontée vers la supervision et être tracé dans les logs</text:p>
        </text:list-item>
      </text:list>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Courier New" svg:font-family="'Courier New'" style:font-family-generic="modern" style:font-pitch="fixed"/>
    <style:font-face style:name="Marianne" svg:font-family="Marianne" style:font-family-generic="modern"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Normal" style:next-style-name="Normal" style:auto-update="true" style:class="text">
      <style:paragraph-properties fo:margin-top="0cm" fo:margin-bottom="0.212cm" style:contextual-spacing="false" fo:text-align="center" style:justify-single-word="false" fo:hyphenation-ladder-count="no-limit"/>
      <style:text-properties fo:color="#c45911" loext:opacity="100%" style:font-name="Century Gothic" fo:font-family="'Century Gothic'" style:font-family-generic="swiss" style:font-pitch="variable" fo:font-size="32pt" fo:letter-spacing="-0.018cm" style:letter-kerning="true" style:font-name-asian="Times New Roman" style:font-family-asian="'Times New Roman'" style:font-family-generic-asian="roman" style:font-pitch-asian="variable" style:font-size-asian="32pt" style:font-name-complex="Century Gothic" style:font-family-complex="'Century Gothic'" style:font-family-generic-complex="swiss"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auto-update="true" style:default-outline-level="1" style:class="text">
      <style:paragraph-properties fo:margin-top="0.423cm" fo:margin-bottom="0.212cm" style:contextual-spacing="false" fo:keep-together="always" fo:hyphenation-ladder-count="no-limit" fo:padding-left="0cm" fo:padding-right="0cm" fo:padding-top="0cm" fo:padding-bottom="0.035cm" fo:border-left="none" fo:border-right="none" fo:border-top="none" fo:border-bottom="0.51pt solid #000000" style:shadow="none" fo:keep-with-next="always"/>
      <style:text-properties fo:color="#c45911" loext:opacity="100%" style:font-name="Century Gothic" fo:font-family="'Century Gothic'" style:font-family-generic="swiss" style:font-pitch="variable" fo:font-size="21pt" style:font-name-asian="Times New Roman" style:font-family-asian="'Times New Roman'" style:font-family-generic-asian="roman" style:font-pitch-asian="variable" style:font-size-asian="21pt" style:font-name-complex="Century Gothic" style:font-family-complex="'Century Gothic'"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auto-update="true" style:default-outline-level="2" style:class="text">
      <style:paragraph-properties fo:margin-top="0.106cm" fo:margin-bottom="0.212cm" style:contextual-spacing="false" fo:keep-together="always" fo:hyphenation-ladder-count="no-limit" fo:keep-with-next="always"/>
      <style:text-properties fo:color="#c45911" loext:opacity="100%" style:font-name="Century Gothic" fo:font-family="'Century Gothic'" style:font-family-generic="swiss" style:font-pitch="variable" fo:font-size="18pt" style:font-name-asian="Times New Roman" style:font-family-asian="'Times New Roman'" style:font-family-generic-asian="roman" style:font-pitch-asian="variable" style:font-size-asian="18pt" style:font-name-complex="Century Gothic" style:font-family-complex="'Century Gothic'"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auto-update="true" style:default-outline-level="3" style:class="text">
      <style:paragraph-properties fo:margin-top="0.212cm" fo:margin-bottom="0.212cm" style:contextual-spacing="false" fo:keep-together="always" fo:hyphenation-ladder-count="no-limit" fo:keep-with-next="always"/>
      <style:text-properties fo:color="#c45911" loext:opacity="100%" style:font-name="Century Gothic" fo:font-family="'Century Gothic'" style:font-family-generic="swiss" style:font-pitch="variable" fo:font-size="14pt" style:font-name-asian="Times New Roman" style:font-family-asian="'Times New Roman'" style:font-family-generic-asian="roman" style:font-pitch-asian="variable" style:font-size-asian="14pt" style:font-name-complex="Century Gothic" style:font-family-complex="'Century Gothic'"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Calibri Light" style:font-family-complex="'Calibri Light'" style:font-family-generic-complex="swiss" style:font-pitch-complex="variable"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Calibri Light" style:font-family-complex="'Calibri Light'" style:font-family-generic-complex="swiss" style:font-pitch-complex="variable" style:font-size-complex="10.5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tru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text-align="center" style:justify-single-word="false" fo:hyphenation-ladder-count="no-limit"/>
      <style:text-properties fo:color="#5a5a5a" loext:opacity="100%" fo:letter-spacing="0.026cm"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western" style:family="paragraph" style:parent-style-name="Normal">
      <style:paragraph-properties fo:margin-top="0.15cm" fo:margin-bottom="0.15cm" style:contextual-spacing="false" fo:hyphenation-ladder-count="no-limit"/>
      <style:text-properties fo:color="#000000" loext:opacity="100%" style:font-name-asian="Times New Roman" style:font-family-asian="'Times New Roman'" style:font-family-generic-asian="roman" style:font-pitch-asian="variable" style:language-asian="fr" style:country-asian="FR" fo:hyphenate="false" loext:hyphenation-no-caps="false" loext:hyphenation-no-last-word="false" loext:hyphenation-word-char-count="no-limit" loext:hyphenation-zone="no-limit"/>
    </style:style>
    <style:style style:name="first-paragraph" style:family="paragraph" style:parent-style-name="Normal">
      <style:paragraph-properties fo:margin-top="0.15cm" fo:margin-bottom="0.15cm" style:contextual-spacing="false" fo:hyphenation-ladder-count="no-limit"/>
      <style:text-properties fo:color="#000000" loext:opacity="100%" style:font-name-asian="Times New Roman" style:font-family-asian="'Times New Roman'" style:font-family-generic-asian="roman" style:font-pitch-asian="variable" style:language-asian="fr" style:country-asian="FR" style:font-size-complex="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Header" style:family="paragraph" style:parent-style-name="Normal"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western1" style:family="paragraph" style:parent-style-name="Normal">
      <style:paragraph-properties fo:margin-left="0.079cm" fo:margin-right="0.079cm" fo:margin-top="0.15cm" fo:margin-bottom="0.15cm" style:contextual-spacing="false" fo:hyphenation-ladder-count="no-limit" fo:text-indent="0cm" style:auto-text-indent="false">
        <style:tab-stops/>
      </style:paragraph-properties>
      <style:text-properties fo:color="#172b4d" loext:opacity="100%" fo:font-weight="bold" style:font-name-asian="Times New Roman" style:font-family-asian="'Times New Roman'" style:font-family-generic-asian="roman" style:font-pitch-asian="variable" style:language-asian="fr" style:country-asian="FR" style:font-weight-asian="bold" style:font-weight-complex="bold" fo:hyphenate="false" loext:hyphenation-no-caps="false" loext:hyphenation-no-last-word="false" loext:hyphenation-word-char-count="no-limit" loext:hyphenation-zone="no-limit"/>
    </style:style>
    <style:style style:name="western2" style:family="paragraph" style:parent-style-name="Normal">
      <style:paragraph-properties fo:margin-left="0.079cm" fo:margin-right="0.079cm" fo:margin-top="0.15cm" fo:margin-bottom="0.15cm" style:contextual-spacing="false" fo:hyphenation-ladder-count="no-limit" fo:text-indent="0cm" style:auto-text-indent="false">
        <style:tab-stops/>
      </style:paragraph-properties>
      <style:text-properties fo:color="#172b4d" loext:opacity="100%" style:font-name-asian="Times New Roman" style:font-family-asian="'Times New Roman'" style:font-family-generic-asian="roman" style:font-pitch-asian="variable" style:language-asian="fr" style:country-asian="FR"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Sans_20_interligne" style:display-name="Sans interligne" style:family="paragraph">
      <style:paragraph-properties fo:margin-top="0cm" fo:margin-bottom="0cm" style: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5cm" fo:margin-bottom="0.15cm" style:contextual-spacing="false" fo:hyphenation-ladder-count="no-limit"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Citation" style:family="paragraph" style:parent-style-name="Normal" style:next-style-name="Normal">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tru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loext:opacity="100%" fo:font-style="italic" style:font-style-asian="italic" style:font-style-complex="italic" fo:hyphenate="true" loext:hyphenation-no-caps="false" loext:hyphenation-no-last-word="false" loext:hyphenation-word-char-count="no-limit" loext:hyphenation-zone="no-limit"/>
    </style:style>
    <style:style style:name="Bibliographie" style:family="paragraph" style:parent-style-name="Normal" style:next-style-name="Normal">
      <style:paragraph-properties fo:hyphenation-ladder-count="no-limit"/>
      <style:text-properties fo:hyphenate="true" loext:hyphenation-no-caps="false" loext:hyphenation-no-last-word="false" loext:hyphenation-word-char-count="no-limit" loext:hyphenation-zone="no-limit"/>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cm" fo:margin-bottom="0cm" style:contextual-spacing="false" fo:line-height="100%" fo:hyphenation-ladder-count="no-limit" fo:padding="0cm" fo:border="none" style:shadow="none" style:vertical-align="auto"/>
      <style:text-properties fo:color="#2e74b5" loext:opacity="100%" style:font-name="Calibri Light" fo:font-family="'Calibri Light'" style:font-family-generic="swiss" style:font-pitch="variable" fo:font-size="16pt" style:font-name-asian="Calibri Light" style:font-family-asian="'Calibri Light'" style:font-family-generic-asian="swiss" style:font-pitch-asian="variable" style:font-size-asian="16pt" style:language-asian="fr" style:country-asian="FR"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font-size="10pt" style:font-size-asian="10pt" fo:hyphenate="true"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font-size="9pt" style:font-size-asian="9pt" fo:hyphenate="tru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font-size="8pt" style:font-size-asian="8pt" fo:hyphenate="true" loext:hyphenation-no-caps="false" loext:hyphenation-no-last-word="false" loext:hyphenation-word-char-count="no-limit" loext:hyphenation-zone="no-limit"/>
    </style:style>
    <style:style style:name="TM_20_4" style:display-name="TM 4" style:family="paragraph" style:parent-style-name="Normal" style:next-style-name="Normal" style:auto-update="true">
      <style:paragraph-properties fo:margin-left="1.164cm" fo:margin-right="0cm" fo:margin-top="0cm" fo:margin-bottom="0.176cm" style:contextual-spacing="false" fo:line-height="100%" fo:hyphenation-ladder-count="no-limit" fo:text-indent="0cm" style:auto-text-indent="false" style:vertical-align="auto">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TM_20_5" style:display-name="TM 5" style:family="paragraph" style:parent-style-name="Normal" style:next-style-name="Normal" style:auto-update="true">
      <style:paragraph-properties fo:margin-left="1.552cm" fo:margin-right="0cm" fo:margin-top="0cm" fo:margin-bottom="0.176cm" style:contextual-spacing="false" fo:line-height="100%" fo:hyphenation-ladder-count="no-limit" fo:text-indent="0cm" style:auto-text-indent="false" style:vertical-align="auto">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TM_20_6" style:display-name="TM 6" style:family="paragraph" style:parent-style-name="Normal" style:next-style-name="Normal" style:auto-update="true">
      <style:paragraph-properties fo:margin-left="1.94cm" fo:margin-right="0cm" fo:margin-top="0cm" fo:margin-bottom="0.176cm" style:contextual-spacing="false" fo:line-height="100%" fo:hyphenation-ladder-count="no-limit" fo:text-indent="0cm" style:auto-text-indent="false" style:vertical-align="auto">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TM_20_7" style:display-name="TM 7" style:family="paragraph" style:parent-style-name="Normal" style:next-style-name="Normal" style:auto-update="true">
      <style:paragraph-properties fo:margin-left="2.328cm" fo:margin-right="0cm" fo:margin-top="0cm" fo:margin-bottom="0.176cm" style:contextual-spacing="false" fo:line-height="100%" fo:hyphenation-ladder-count="no-limit" fo:text-indent="0cm" style:auto-text-indent="false" style:vertical-align="auto">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TM_20_8" style:display-name="TM 8" style:family="paragraph" style:parent-style-name="Normal" style:next-style-name="Normal" style:auto-update="true">
      <style:paragraph-properties fo:margin-left="2.716cm" fo:margin-right="0cm" fo:margin-top="0cm" fo:margin-bottom="0.176cm" style:contextual-spacing="false" fo:line-height="100%" fo:hyphenation-ladder-count="no-limit" fo:text-indent="0cm" style:auto-text-indent="false" style:vertical-align="auto">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TM_20_9" style:display-name="TM 9" style:family="paragraph" style:parent-style-name="Normal" style:next-style-name="Normal" style:auto-update="true">
      <style:paragraph-properties fo:margin-left="3.104cm" fo:margin-right="0cm" fo:margin-top="0cm" fo:margin-bottom="0.176cm" style:contextual-spacing="false" fo:line-height="100%" fo:hyphenation-ladder-count="no-limit" fo:text-indent="0cm" style:auto-text-indent="false" style:vertical-align="auto">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Car" style:display-name="Titre Car" style:family="text" style:parent-style-name="Police_20_par_20_défaut">
      <style:text-properties fo:color="#c45911" loext:opacity="100%" style:font-name="Century Gothic" fo:font-family="'Century Gothic'" style:font-family-generic="swiss" style:font-pitch="variable" fo:font-size="32pt" fo:letter-spacing="-0.018cm" style:letter-kerning="true" style:font-name-asian="Times New Roman" style:font-family-asian="'Times New Roman'" style:font-family-generic-asian="roman" style:font-pitch-asian="variable" style:font-size-asian="32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a5a5a" loext:opacity="100%" style:font-name="Arial" fo:font-family="Arial" style:font-family-generic="swiss" style:font-pitch="variable" fo:letter-spacing="0.026cm"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Titre_20_1_20_Car" style:display-name="Titre 1 Car" style:family="text" style:parent-style-name="Police_20_par_20_défaut">
      <style:text-properties fo:color="#c45911" loext:opacity="100%" style:font-name="Century Gothic" fo:font-family="'Century Gothic'" style:font-family-generic="swiss" style:font-pitch="variable" fo:font-size="21pt" style:font-name-asian="Times New Roman" style:font-family-asian="'Times New Roman'" style:font-family-generic-asian="roman" style:font-pitch-asian="variable" style:font-size-asian="21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2_20_Car" style:display-name="Titre 2 Car" style:family="text" style:parent-style-name="Police_20_par_20_défaut">
      <style:text-properties fo:color="#c45911" loext:opacity="100%" style:font-name="Century Gothic" fo:font-family="'Century Gothic'"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parent-style-name="Police_20_par_20_défau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2e74b5"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Lien_20_hypertexte" style:display-name="Lien hypertexte" style:family="text" style:parent-style-name="Police_20_par_20_défaut">
      <style:text-properties fo:color="#417dc4" loext:opacity="100%" style:text-line-through-style="none" style:text-line-through-type="none" style:text-underline-style="none"/>
    </style:style>
    <style:style style:name="Définition_20_HTML" style:display-name="Définition HTML" style:family="text" style:parent-style-name="Police_20_par_20_défaut">
      <style:text-properties fo:font-style="italic" style:font-style-asian="italic" style:font-style-complex="italic"/>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Citation_20_Car" style:display-name="Citation Car" style:family="text" style:parent-style-name="Police_20_par_20_défaut">
      <style:text-properties fo:color="#404040"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Citation_20_intense_20_Car" style:display-name="Citation intense Car" style:family="text" style:parent-style-name="Police_20_par_20_défaut">
      <style:text-properties fo:color="#5b9bd5"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Emphase_20_pâle" style:display-name="Emphase pâle" style:family="text" style:parent-style-name="Police_20_par_20_défaut">
      <style:text-properties fo:color="#404040"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5b9bd5" loext:opacity="100%" fo:letter-spacing="0.009cm" fo:font-weight="bold" style:font-weight-asian="bold" style:font-weight-complex="bold"/>
    </style:style>
    <style:style style:name="Référence_20_pâle" style:display-name="Référence pâle" style:family="text" style:parent-style-name="Police_20_par_20_défaut">
      <style:text-properties fo:font-variant="small-caps" fo:color="#5a5a5a" loext:opacity="100%"/>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Emphase_20_intense" style:display-name="Emphase intense" style:family="text" style:parent-style-name="Police_20_par_20_défaut">
      <style:text-properties fo:color="#5b9bd5" loext:opacity="100%"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5b9bd5"/>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1.9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3</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creation-date>2024-11-08T13:54:18.925000000</meta:creation-date>
    <meta:editing-cycles>1</meta:editing-cycles>
    <meta:editing-duration>P0D</meta:editing-duration>
    <meta:document-statistic meta:table-count="83" meta:image-count="11" meta:object-count="0" meta:page-count="53" meta:paragraph-count="2165" meta:word-count="8379" meta:character-count="56956" meta:non-whitespace-character-count="50584"/>
    <meta:template xlink:type="simple" xlink:actuate="onRequest" xlink:title="" xlink:href="Normal.dotm"/>
  </office:meta>
</office:document-meta>
</file>