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9.472cm" style:rel-column-width="5370*"/>
    </style:style>
    <style:style style:name="Tableau5.B" style:family="table-column">
      <style:table-column-properties style:column-width="9.529cm" style:rel-column-width="5402*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018cm" style:rel-column-width="10409*"/>
    </style:style>
    <style:style style:name="Tableau2.B" style:family="table-column">
      <style:table-column-properties style:column-width="2.976cm" style:rel-column-width="10263*"/>
    </style:style>
    <style:style style:name="Tableau2.C" style:family="table-column">
      <style:table-column-properties style:column-width="3.969cm" style:rel-column-width="13688*"/>
    </style:style>
    <style:style style:name="Tableau2.D" style:family="table-column">
      <style:table-column-properties style:column-width="9.038cm" style:rel-column-width="3117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 style:may-break-between-rows="false"/>
    </style:style>
    <style:style style:name="Tableau4.A" style:family="table-column">
      <style:table-column-properties style:column-width="5.001cm" style:rel-column-width="17247*"/>
    </style:style>
    <style:style style:name="Tableau4.B" style:family="table-column">
      <style:table-column-properties style:column-width="14cm" style:rel-column-width="482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 style:may-break-between-rows="true"/>
    </style:style>
    <style:style style:name="Tableau3.A" style:family="table-column">
      <style:table-column-properties style:column-width="4.974cm" style:rel-column-width="17156*"/>
    </style:style>
    <style:style style:name="Tableau3.B" style:family="table-column">
      <style:table-column-properties style:column-width="4.526cm" style:rel-column-width="15611*"/>
    </style:style>
    <style:style style:name="Tableau3.C" style:family="table-column">
      <style:table-column-properties style:column-width="2.459cm" style:rel-column-width="8480*"/>
    </style:style>
    <style:style style:name="Tableau3.D" style:family="table-column">
      <style:table-column-properties style:column-width="7.041cm" style:rel-column-width="24288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C5" style:family="table-cell" style:data-style-name="N11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" style:family="table">
      <style:table-properties style:width="19.001cm" table:align="margins" style:may-break-between-rows="false"/>
    </style:style>
    <style:style style:name="Tableau10.A" style:family="table-column">
      <style:table-column-properties style:column-width="5.001cm" style:rel-column-width="17247*"/>
    </style:style>
    <style:style style:name="Tableau10.B" style:family="table-column">
      <style:table-column-properties style:column-width="14cm" style:rel-column-width="4828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9.5cm" style:rel-column-width="32767*"/>
    </style:style>
    <style:style style:name="Tableau11.B" style:family="table-column">
      <style:table-column-properties style:column-width="9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9.001cm" table:align="margins" style:may-break-between-rows="true"/>
    </style:style>
    <style:style style:name="Tableau13.A" style:family="table-column">
      <style:table-column-properties style:column-width="4.974cm" style:rel-column-width="17156*"/>
    </style:style>
    <style:style style:name="Tableau13.B" style:family="table-column">
      <style:table-column-properties style:column-width="4.526cm" style:rel-column-width="15611*"/>
    </style:style>
    <style:style style:name="Tableau13.C" style:family="table-column">
      <style:table-column-properties style:column-width="2.459cm" style:rel-column-width="8480*"/>
    </style:style>
    <style:style style:name="Tableau13.D" style:family="table-column">
      <style:table-column-properties style:column-width="7.041cm" style:rel-column-width="24288*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3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9.001cm" table:align="margins" style:may-break-between-rows="false"/>
    </style:style>
    <style:style style:name="Tableau7.A" style:family="table-column">
      <style:table-column-properties style:column-width="5.001cm" style:rel-column-width="17247*"/>
    </style:style>
    <style:style style:name="Tableau7.B" style:family="table-column">
      <style:table-column-properties style:column-width="14cm" style:rel-column-width="4828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9.5cm" style:rel-column-width="32767*"/>
    </style:style>
    <style:style style:name="Tableau8.B" style:family="table-column">
      <style:table-column-properties style:column-width="9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001cm" table:align="margins" style:may-break-between-rows="true"/>
    </style:style>
    <style:style style:name="Tableau9.A" style:family="table-column">
      <style:table-column-properties style:column-width="4.974cm" style:rel-column-width="17156*"/>
    </style:style>
    <style:style style:name="Tableau9.B" style:family="table-column">
      <style:table-column-properties style:column-width="4.526cm" style:rel-column-width="15611*"/>
    </style:style>
    <style:style style:name="Tableau9.C" style:family="table-column">
      <style:table-column-properties style:column-width="2.459cm" style:rel-column-width="8480*"/>
    </style:style>
    <style:style style:name="Tableau9.D" style:family="table-column">
      <style:table-column-properties style:column-width="7.041cm" style:rel-column-width="24288*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9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9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3.519cm" style:rel-column-width="12137*"/>
    </style:style>
    <style:style style:name="Tableau12.C" style:family="table-column">
      <style:table-column-properties style:column-width="3.413cm" style:rel-column-width="11772*"/>
    </style:style>
    <style:style style:name="Tableau12.D" style:family="table-column">
      <style:table-column-properties style:column-width="3.572cm" style:rel-column-width="12319*"/>
    </style:style>
    <style:style style:name="Tableau12.E" style:family="table-column">
      <style:table-column-properties style:column-width="4.978cm" style:rel-column-width="17170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 fo:padding="0cm" fo:border="none" style:shadow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text-underline-style="solid" style:text-underline-width="auto" style:text-underline-color="font-color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officeooo:rsid="00026ae6" officeooo:paragraph-rsid="00026ae6"/>
    </style:style>
    <style:style style:name="P17" style:family="paragraph" style:parent-style-name="Table_20_Contents">
      <style:text-properties officeooo:rsid="00026ae6" officeooo:paragraph-rsid="00026ae6"/>
    </style:style>
    <style:style style:name="P18" style:family="paragraph" style:parent-style-name="Standard" style:master-page-name="Standard">
      <style:paragraph-properties style:page-number="auto" fo:padding="0cm" fo:border-left="none" fo:border-right="none" fo:border-top="none" fo:border-bottom="0.51pt solid #000000" style:shadow="none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master-page-name="Standard">
      <style:paragraph-properties style:page-number="auto" fo:padding="0cm" fo:border="none" style:shadow="none"/>
    </style:style>
    <style:style style:name="P21" style:family="paragraph" style:parent-style-name="Standard" style:master-page-name="First_20_Pag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6a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Image Hébergeur</text:p>
          </table:table-cell>
          <table:table-cell table:style-name="Tableau5.A1" office:value-type="string">
            <text:p text:style-name="P16">Image Client</text:p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nnexe I</text:p>
      <text:p text:style-name="P3"/>
      <text:p text:style-name="P3">Plan Qualité Service Client</text:p>
      <text:p text:style-name="P2"/>
      <text:p text:style-name="P2">dans le cadre du contrat de service relatif à l’hébergement et aux prestations connexes du système d’information de <text:span text:style-name="T2">XXXXXXXXXXXXXXXXXXXXX</text:span></text:p>
      <text:p text:style-name="P2"/>
      <text:p text:style-name="P2"/>
      <text:p text:style-name="P4"/>
      <text:p text:style-name="P19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table:number-columns-spanned="2" office:value-type="string">
              <text:p text:style-name="Table_20_Heading">Destinataires</text:p>
            </table:table-cell>
            <table:covered-table-cell/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7">Représentant hébergeu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7">Représentant client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N° version</text:p>
            </table:table-cell>
            <table:table-cell table:style-name="Tableau2.A1" office:value-type="string">
              <text:p text:style-name="Table_20_Heading">Date</text:p>
            </table:table-cell>
            <table:table-cell table:style-name="Tableau2.A1" office:value-type="string">
              <text:p text:style-name="Table_20_Heading">Auteur</text:p>
            </table:table-cell>
            <table:table-cell table:style-name="Tableau2.D1" office:value-type="string">
              <text:p text:style-name="Table_20_Heading">Modifications apportées</text:p>
            </table:table-cell>
          </table:table-row>
        </table:table-header-rows>
        <table:table-row>
          <table:table-cell table:style-name="Tableau2.A2" office:value-type="float" office:value="36526">
            <text:p text:style-name="P5">1.0</text:p>
          </table:table-cell>
          <table:table-cell table:style-name="Tableau2.B2" office:value-type="date" office:date-value="2012-07-27">
            <text:p text:style-name="Table_20_Contents">27/07/12</text:p>
          </table:table-cell>
          <table:table-cell table:style-name="Tableau2.C4" office:value-type="string">
            <text:p text:style-name="Table_20_Contents">LTC LE BLAY</text:p>
          </table:table-cell>
          <table:table-cell table:style-name="Tableau2.D4" office:value-type="string">
            <text:p text:style-name="Table_20_Contents">Version initiale</text:p>
          </table:table-cell>
        </table:table-row>
        <table:table-row>
          <table:table-cell table:style-name="Tableau2.A2" office:value-type="float" office:value="0">
            <text:p text:style-name="P5">1.1</text:p>
          </table:table-cell>
          <table:table-cell table:style-name="Tableau2.B2" office:value-type="date" office:date-value="2012-08-08">
            <text:p text:style-name="Table_20_Contents">08/08/12</text:p>
          </table:table-cell>
          <table:table-cell table:style-name="Tableau2.C4" office:value-type="string">
            <text:p text:style-name="Table_20_Contents">LTC LE BLAY</text:p>
          </table:table-cell>
          <table:table-cell table:style-name="Tableau2.D4" office:value-type="string">
            <text:p text:style-name="Table_20_Contents">Ajout des contacts</text:p>
          </table:table-cell>
        </table:table-row>
        <table:table-row>
          <table:table-cell table:style-name="Tableau2.A2" office:value-type="float" office:value="0">
            <text:p text:style-name="P5">1.2</text:p>
          </table:table-cell>
          <table:table-cell table:style-name="Tableau2.B2" office:value-type="date" office:date-value="2012-09-14">
            <text:p text:style-name="Table_20_Contents">14/09/12</text:p>
          </table:table-cell>
          <table:table-cell table:style-name="Tableau2.C4" office:value-type="string">
            <text:p text:style-name="Table_20_Contents">LTC LE BLAY</text:p>
          </table:table-cell>
          <table:table-cell table:style-name="Tableau2.D4" office:value-type="string">
            <text:p text:style-name="Table_20_Contents">Evolution des services proposés</text:p>
          </table:table-cell>
        </table:table-row>
      </table:table>
      <text:p text:style-name="Standard"/>
      <text:p text:style-name="Standard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s/>1 Service d'hébergement.<text:tab/>4</text:p>
          <text:p text:style-name="P11"><text:s/>1.1 Présentation du service.<text:tab/>4</text:p>
          <text:p text:style-name="P12"><text:s/>1.1.1 Définition du service.<text:tab/>4</text:p>
          <text:p text:style-name="P12"><text:s/>1.1.2 Évaluation des risques.<text:tab/>4</text:p>
          <text:p text:style-name="P11"><text:s/>1.2 Les niveaux de service proposés.<text:tab/>4</text:p>
          <text:p text:style-name="P10"><text:s/>2 Service de proximité.<text:tab/>6</text:p>
          <text:p text:style-name="P12"><text:s/>2.1.1 Définition du service.<text:tab/>6</text:p>
          <text:p text:style-name="P12"><text:s/>2.1.2 Évaluation des risques.<text:tab/>6</text:p>
          <text:p text:style-name="P11"><text:s/>2.2 Les niveaux de service proposés.<text:tab/>6</text:p>
          <text:p text:style-name="P10"><text:s/>3 Service lié à l'évolution de l'infrastructure.<text:tab/>7</text:p>
          <text:p text:style-name="P11"><text:s/>3.1 Présentation du service.<text:tab/>7</text:p>
          <text:p text:style-name="P12"><text:s/>3.1.1 Définition du service.<text:tab/>7</text:p>
          <text:p text:style-name="P12"><text:s/>3.1.2 Évaluation des risques.<text:tab/>7</text:p>
          <text:p text:style-name="P11"><text:s/>3.2 Les niveaux de service proposés.<text:tab/>7</text:p>
          <text:p text:style-name="P10"><text:s/>4 Le rapport de service.<text:tab/>8</text:p>
          <text:p text:style-name="P10"><text:s/>5 La procédure d'escalade.<text:tab/>8</text:p>
          <text:p text:style-name="P10"><text:s/>6 Les gestes de proximité.<text:tab/>8</text:p>
          <text:p text:style-name="P10"><text:s/>7 Le plan d'occupation de la salle.<text:tab/>8</text:p>
          <text:p text:style-name="P10"><text:s/>8 Les contacts nécessaires au fonctionnement de la prestation.<text:tab/>8</text:p>
        </text:index-body>
      </text:table-of-content>
      <text:p text:style-name="Standard"/>
      <text:h text:style-name="P14" text:outline-level="1">Service d’hébergement.</text:h>
      <text:h text:style-name="Heading_20_2" text:outline-level="2">Présentation du service.</text:h>
      <text:h text:style-name="Heading_20_3" text:outline-level="3">Définition du service.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Code Service</text:p>
          </table:table-cell>
          <table:table-cell table:style-name="Tableau4.B1" office:value-type="string">
            <text:p text:style-name="Table_20_Contents">HEB</text:p>
          </table:table-cell>
        </table:table-row>
        <table:table-row>
          <table:table-cell table:style-name="Tableau4.A2" office:value-type="string">
            <text:p text:style-name="Table_20_Contents">Objectifs</text:p>
          </table:table-cell>
          <table:table-cell table:style-name="Tableau4.B2" office:value-type="string">
            <text:p text:style-name="Table_20_Contents">Mettre à disposition une surface en plateau informatique en garantissant un taux de disponibilité de l’infrastructure électrique et climatique.</text:p>
          </table:table-cell>
        </table:table-row>
        <table:table-row>
          <table:table-cell table:style-name="Tableau4.A2" office:value-type="string">
            <text:p text:style-name="Table_20_Contents">Prestations associées</text:p>
          </table:table-cell>
          <table:table-cell table:style-name="Tableau4.B2" office:value-type="string">
            <text:p text:style-name="Table_20_Contents">– Fourniture de l’énergie électrique.</text:p>
            <text:p text:style-name="Table_20_Contents">– Fourniture d’un flux de refroidissement.</text:p>
            <text:p text:style-name="Table_20_Contents">– Fourniture d’un service de sécurité incendie.</text:p>
            <text:p text:style-name="Table_20_Contents">– Fourniture d’un contrôle d’accès.</text:p>
            <text:p text:style-name="Table_20_Contents">– Gestion des incidents d’hébergement de 1er niveau.</text:p>
          </table:table-cell>
        </table:table-row>
      </table:table>
      <text:p text:style-name="Text_20_body"/>
      <text:h text:style-name="Heading_20_3" text:outline-level="3">Évaluation des risques.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Risques identifiés</text:p>
            </table:table-cell>
            <table:table-cell table:style-name="Tableau6.B1" office:value-type="string">
              <text:p text:style-name="Table_20_Heading">Réponses mises en œuvre</text:p>
            </table:table-cell>
          </table:table-row>
        </table:table-header-rows>
        <table:table-row>
          <table:table-cell table:style-name="Tableau6.A2" office:value-type="string">
            <text:p text:style-name="Table_20_Contents">Indisponibilité du système de fourniture de l’énergie électrique.</text:p>
          </table:table-cell>
          <table:table-cell table:style-name="Tableau6.B2" office:value-type="string">
            <text:p text:style-name="Table_20_Contents">– Présence de groupes électrogènes.</text:p>
            <text:p text:style-name="Table_20_Contents">– Équipe de maintenance en 24H/24, 7J/7.</text:p>
          </table:table-cell>
        </table:table-row>
        <table:table-row>
          <table:table-cell table:style-name="Tableau6.A2" office:value-type="string">
            <text:p text:style-name="Table_20_Contents">Indisponibilité du système de fourniture de flux de refroidissement.</text:p>
          </table:table-cell>
          <table:table-cell table:style-name="Tableau6.B2" office:value-type="string">
            <text:p text:style-name="Table_20_Contents">– Présence d’un boucle d’eau glacée.</text:p>
            <text:p text:style-name="Table_20_Contents">– Présence de plusieurs armoires de climatisation.</text:p>
            <text:p text:style-name="Table_20_Contents">– Équipe de maintenance en 24H/24, 7J/7.</text:p>
          </table:table-cell>
        </table:table-row>
        <table:table-row>
          <table:table-cell table:style-name="Tableau6.A2" office:value-type="string">
            <text:p text:style-name="Table_20_Contents">Risque incendie.</text:p>
          </table:table-cell>
          <table:table-cell table:style-name="Tableau6.B2" office:value-type="string">
            <text:p text:style-name="Table_20_Contents">– Système de détection incendie.</text:p>
            <text:p text:style-name="Table_20_Contents">– Système d’extinction incendie.</text:p>
          </table:table-cell>
        </table:table-row>
        <table:table-row>
          <table:table-cell table:style-name="Tableau6.A2" office:value-type="string">
            <text:p text:style-name="Table_20_Contents">Risque d’intrusion physique.</text:p>
          </table:table-cell>
          <table:table-cell table:style-name="Tableau6.B2" office:value-type="string">
            <text:p text:style-name="Table_20_Contents">– Site sécurisé par équipe de gardiennage et portes à code.</text:p>
          </table:table-cell>
        </table:table-row>
      </table:table>
      <text:p text:style-name="Text_20_body"/>
      <text:h text:style-name="Heading_20_2" text:outline-level="2">Les niveaux de service proposés.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table:number-rows-spanned="2" office:value-type="string">
              <text:p text:style-name="Table_20_Heading">Description</text:p>
            </table:table-cell>
            <table:table-cell table:style-name="Tableau3.A1" table:number-columns-spanned="2" office:value-type="string">
              <text:p text:style-name="Table_20_Heading">Métriques</text:p>
            </table:table-cell>
            <table:covered-table-cell/>
            <table:table-cell table:style-name="Tableau3.D1" table:number-rows-spanned="2" office:value-type="string">
              <text:p text:style-name="Table_20_Heading">Règles de gestion</text:p>
            </table:table-cell>
          </table:table-row>
          <table:table-row table:style-name="Tableau3.1">
            <table:covered-table-cell/>
            <table:table-cell table:style-name="Tableau3.B2" office:value-type="string">
              <text:p text:style-name="P7">Indicateur</text:p>
            </table:table-cell>
            <table:table-cell table:style-name="Tableau3.B2" office:value-type="string">
              <text:p text:style-name="P7">Valeur</text:p>
            </table:table-cell>
            <table:covered-table-cell/>
          </table:table-row>
        </table:table-header-rows>
        <table:table-row table:style-name="Tableau3.1">
          <table:table-cell table:style-name="Tableau3.B2" office:value-type="string">
            <text:p text:style-name="Table_20_Contents">Taux de disponibilité de l’hébergement</text:p>
          </table:table-cell>
          <table:table-cell table:style-name="Tableau3.B2" office:value-type="string">
            <text:p text:style-name="P6">HEB-A1</text:p>
            <text:p text:style-name="Table_20_Contents">Taux de disponibilité de l’hébergement</text:p>
          </table:table-cell>
          <table:table-cell table:style-name="Tableau3.B2" office:value-type="string">
            <text:p text:style-name="P5">99,995% annuel</text:p>
          </table:table-cell>
          <table:table-cell table:style-name="Tableau3.D3" office:value-type="string">
            <text:p text:style-name="Table_20_Contents">Mesures trimestrielles</text:p>
          </table:table-cell>
        </table:table-row>
        <table:table-row table:style-name="Tableau3.1">
          <table:table-cell table:style-name="Tableau3.B2" office:value-type="string">
            <text:p text:style-name="Table_20_Contents">Fourniture de reporting trimestriel</text:p>
          </table:table-cell>
          <table:table-cell table:style-name="Tableau3.B2" office:value-type="string">
            <text:p text:style-name="P6">HEB-A2</text:p>
            <text:p text:style-name="Table_20_Contents">Livraison de reporting trimestriel</text:p>
          </table:table-cell>
          <table:table-cell table:style-name="Tableau3.B2" office:value-type="string">
            <text:p text:style-name="P5">Avant le 15ᵉ jour du mois M+4</text:p>
          </table:table-cell>
          <table:table-cell table:style-name="Tableau3.D3" office:value-type="string">
            <text:p text:style-name="Table_20_Contents">Au plus tard 15 jours ouvrés après la fin du trimestre</text:p>
          </table:table-cell>
        </table:table-row>
        <table:table-row table:style-name="Tableau3.1">
          <table:table-cell table:style-name="Tableau3.B2" office:value-type="string">
            <text:p text:style-name="Table_20_Contents">Fourniture d’énergie de haute qualité et secourue</text:p>
          </table:table-cell>
          <table:table-cell table:style-name="Tableau3.B2" office:value-type="string">
            <text:p text:style-name="P6">HEB-A1</text:p>
            <text:p text:style-name="Table_20_Contents">Taux de disponibilité de la qualité d’énergie nécessaire</text:p>
          </table:table-cell>
          <table:table-cell table:style-name="Tableau3.C5" office:value-type="percentage" office:value="1">
            <text:p text:style-name="P5">100,00%</text:p>
          </table:table-cell>
          <table:table-cell table:style-name="Tableau3.D3" office:value-type="string">
            <text:p text:style-name="Table_20_Contents">Courant alternatif 50Hz +/- 0,1%</text:p>
            <text:p text:style-name="Table_20_Contents">230V +/- 10% entre phases et neutre</text:p>
            <text:p text:style-name="Table_20_Contents">400V +/- 10% entre phases</text:p>
          </table:table-cell>
        </table:table-row>
        <table:table-row table:style-name="Tableau3.1">
          <table:table-cell table:style-name="Tableau3.B2" office:value-type="string">
            <text:p text:style-name="Table_20_Contents">Maintenance électrique et contrôle du bon fonctionnement</text:p>
          </table:table-cell>
          <table:table-cell table:style-name="Tableau3.B2" office:value-type="string">
            <text:p text:style-name="P6">HEB-B1</text:p>
            <text:p text:style-name="Table_20_Contents">Périodicité de vérification des installations électriques</text:p>
          </table:table-cell>
          <table:table-cell table:style-name="Tableau3.B2" office:value-type="string">
            <text:p text:style-name="P5">1 fois par mois</text:p>
          </table:table-cell>
          <table:table-cell table:style-name="Tableau3.D3" office:value-type="string">
            <text:p text:style-name="Table_20_Contents">Test de bascule sur l’ensemble de la chaîne de secours</text:p>
          </table:table-cell>
        </table:table-row>
        <table:table-row table:style-name="Tableau3.1">
          <table:table-cell table:style-name="Tableau3.B2" office:value-type="string">
            <text:p text:style-name="Table_20_Contents">Maintenance climatique et contrôle du bon fonctionnement</text:p>
          </table:table-cell>
          <table:table-cell table:style-name="Tableau3.B2" office:value-type="string">
            <text:p text:style-name="P6">HEB-B2</text:p>
            <text:p text:style-name="Table_20_Contents">Surveillance permanente de la température</text:p>
          </table:table-cell>
          <table:table-cell table:style-name="Tableau3.B2" office:value-type="string">
            <text:p text:style-name="P5">OK</text:p>
          </table:table-cell>
          <table:table-cell table:style-name="Tableau3.D3" office:value-type="string">
            <text:p text:style-name="Table_20_Contents">Concerne les systèmes de refroidissement</text:p>
            <text:p text:style-name="Table_20_Contents">Maintenance préventive et entretien réalisé en continue tous les 4 mois</text:p>
          </table:table-cell>
        </table:table-row>
        <text:soft-page-break/>
        <table:table-row table:style-name="Tableau3.1">
          <table:table-cell table:style-name="Tableau3.B2" office:value-type="string">
            <text:p text:style-name="Table_20_Contents">Maintenance des détections et des protections</text:p>
          </table:table-cell>
          <table:table-cell table:style-name="Tableau3.B2" office:value-type="string">
            <text:p text:style-name="P6">HEB-B3</text:p>
            <text:p text:style-name="Table_20_Contents">Périodicité de vérification des installations</text:p>
          </table:table-cell>
          <table:table-cell table:style-name="Tableau3.B2" office:value-type="string">
            <text:p text:style-name="P5">1 fois par semaine</text:p>
          </table:table-cell>
          <table:table-cell table:style-name="Tableau3.D3" office:value-type="string">
            <text:p text:style-name="Table_20_Contents">Vérification effectuée par le service de gardiennage et/ou le responsable de la sécurité</text:p>
          </table:table-cell>
        </table:table-row>
        <table:table-row table:style-name="Tableau3.1">
          <table:table-cell table:style-name="Tableau3.B2" office:value-type="string">
            <text:p text:style-name="Table_20_Contents">Vérification des équipements stratégiques</text:p>
          </table:table-cell>
          <table:table-cell table:style-name="Tableau3.B2" office:value-type="string">
            <text:p text:style-name="P6">HEB-B4</text:p>
            <text:p text:style-name="Table_20_Contents">Vérification par l’installateur des équipements</text:p>
          </table:table-cell>
          <table:table-cell table:style-name="Tableau3.B2" office:value-type="string">
            <text:p text:style-name="P5">2 fois par an</text:p>
          </table:table-cell>
          <table:table-cell table:style-name="Tableau3.D3" office:value-type="string">
            <text:p text:style-name="Table_20_Contents">Concerne en particulier les bouteilles d’extinction et les détecteurs</text:p>
          </table:table-cell>
        </table:table-row>
        <table:table-row table:style-name="Tableau3.1">
          <table:table-cell table:style-name="Tableau3.B2" office:value-type="string">
            <text:p text:style-name="Table_20_Contents">Exercice en temps réel de détection et de protection des locaux</text:p>
          </table:table-cell>
          <table:table-cell table:style-name="Tableau3.B2" office:value-type="string">
            <text:p text:style-name="P6">HEB-B5</text:p>
            <text:p text:style-name="Table_20_Contents">Nombre d’exercices en réel de détection et de protection des locaux</text:p>
          </table:table-cell>
          <table:table-cell table:style-name="Tableau3.B2" office:value-type="string">
            <text:p text:style-name="P5">2 fois par an</text:p>
          </table:table-cell>
          <table:table-cell table:style-name="Tableau3.D3" office:value-type="string">
            <text:p text:style-name="Table_20_Contents"/>
          </table:table-cell>
        </table:table-row>
        <table:table-row table:style-name="Tableau3.1">
          <table:table-cell table:style-name="Tableau3.B2" office:value-type="string">
            <text:p text:style-name="Table_20_Contents">Contrôles périodiques par organisme extérieur</text:p>
          </table:table-cell>
          <table:table-cell table:style-name="Tableau3.B2" office:value-type="string">
            <text:p text:style-name="P6">HEB-B6</text:p>
            <text:p text:style-name="P8"/>
          </table:table-cell>
          <table:table-cell table:style-name="Tableau3.B2" office:value-type="string">
            <text:p text:style-name="P5">1 fois par an</text:p>
          </table:table-cell>
          <table:table-cell table:style-name="Tableau3.D3" office:value-type="string">
            <text:p text:style-name="Table_20_Contents">Concerne en particulier l’ensemble des installations électriques du site</text:p>
          </table:table-cell>
        </table:table-row>
        <table:table-row table:style-name="Tableau3.1">
          <table:table-cell table:style-name="Tableau3.B2" table:number-rows-spanned="3" office:value-type="string">
            <text:p text:style-name="Table_20_Contents">Délai de correction d’un incident d’hébergement à partir de sa détection par l’Hébergeur ou de son signalement par l’Administration</text:p>
          </table:table-cell>
          <table:table-cell table:style-name="Tableau3.B2" office:value-type="string">
            <text:p text:style-name="P6">HEB-C1</text:p>
            <text:p text:style-name="Table_20_Contents">Délai de correction d’un incident d’hébergement G1</text:p>
          </table:table-cell>
          <table:table-cell table:style-name="Tableau3.B2" office:value-type="string">
            <text:p text:style-name="P5">100% &lt; à 30 minutes</text:p>
          </table:table-cell>
          <table:table-cell table:style-name="Tableau3.D3" office:value-type="string">
            <text:p text:style-name="Table_20_Contents"><text:span text:style-name="T1">Incident de gravité 1 (G1) :</text:span></text:p>
            <text:p text:style-name="Table_20_Contents">Incident bloquant ayant un impact immédiat sur la production informatique ou l’utilisation des matériels</text:p>
          </table:table-cell>
        </table:table-row>
        <table:table-row table:style-name="Tableau3.1">
          <table:covered-table-cell/>
          <table:table-cell table:style-name="Tableau3.B2" office:value-type="string">
            <text:p text:style-name="P6">HEB-C2</text:p>
            <text:p text:style-name="P8">Délai de correction d’un incident d’hébergement G2</text:p>
          </table:table-cell>
          <table:table-cell table:style-name="Tableau3.B2" office:value-type="string">
            <text:p text:style-name="P5">100% &lt; à 2 heures</text:p>
          </table:table-cell>
          <table:table-cell table:style-name="Tableau3.D3" office:value-type="string">
            <text:p text:style-name="Table_20_Contents"><text:span text:style-name="T1">Incident de gravité 2 (G2) :</text:span></text:p>
            <text:p text:style-name="Table_20_Contents">Incident grave perturbant les prestations fournies, sans impact immédiat sur la production informatique ou l’utilisation des matériels mais, susceptibles d’avoir un impact si l’incident se prolonge</text:p>
          </table:table-cell>
        </table:table-row>
        <table:table-row table:style-name="Tableau3.1">
          <table:covered-table-cell/>
          <table:table-cell table:style-name="Tableau3.B2" office:value-type="string">
            <text:p text:style-name="P6">HEB-C3</text:p>
            <text:p text:style-name="P8">Délai de correction d’un incident d’hébergement G3</text:p>
          </table:table-cell>
          <table:table-cell table:style-name="Tableau3.B2" office:value-type="string">
            <text:p text:style-name="P5">100% &lt; à 8 heures</text:p>
          </table:table-cell>
          <table:table-cell table:style-name="Tableau3.D3" office:value-type="string">
            <text:p text:style-name="Table_20_Contents"><text:span text:style-name="T1">Incident de gravité 3 (G3) :</text:span></text:p>
            <text:p text:style-name="Table_20_Contents">Incident non-bloquant sans risques de perturbation sur les prestations fournies ou les matériels</text:p>
          </table:table-cell>
        </table:table-row>
        <table:table-row table:style-name="Tableau3.1">
          <table:table-cell table:style-name="Tableau3.B2" office:value-type="string">
            <text:p text:style-name="Table_20_Contents">Délai de signalisation d’incident <text:span text:style-name="T2">au client</text:span></text:p>
          </table:table-cell>
          <table:table-cell table:style-name="Tableau3.B2" office:value-type="string">
            <text:p text:style-name="P6">HEB-C4</text:p>
            <text:p text:style-name="Table_20_Contents">Taux de disponibilité de la qualité d’énergie nécessaire</text:p>
          </table:table-cell>
          <table:table-cell table:style-name="Tableau3.B2" office:value-type="string">
            <text:p text:style-name="P5">&lt; 1 heure</text:p>
          </table:table-cell>
          <table:table-cell table:style-name="Tableau3.D3" office:value-type="string">
            <text:p text:style-name="Table_20_Contents">Envoi d’un message électronique à l’adresse précisée au et, appel téléphonique au numéro de téléphone précisé au</text:p>
          </table:table-cell>
        </table:table-row>
      </table:table>
      <text:p text:style-name="Text_20_body"/>
      <text:p text:style-name="Text_20_body"/>
      <text:h text:style-name="P15" text:outline-level="1">Service de proximité.</text:h>
      <text:h text:style-name="Heading_20_3" text:outline-level="3">Définition du service.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Code Service</text:p>
          </table:table-cell>
          <table:table-cell table:style-name="Tableau10.B1" office:value-type="string">
            <text:p text:style-name="Table_20_Contents">PRX</text:p>
          </table:table-cell>
        </table:table-row>
        <table:table-row>
          <table:table-cell table:style-name="Tableau10.A2" office:value-type="string">
            <text:p text:style-name="Table_20_Contents">Objectifs</text:p>
          </table:table-cell>
          <table:table-cell table:style-name="Tableau10.B2" office:value-type="string">
            <text:p text:style-name="Table_20_Contents">Mettre à disposition d’un client un ensemble de mesures simples d’accompagnement en vue de faciliter l’intervention sur le site de personnes travaillant à son profit, en vue de l’installation ou la suppression de matériel et, le diagnostic élémentaire de pannes sur son système d’information.</text:p>
          </table:table-cell>
        </table:table-row>
        <table:table-row>
          <table:table-cell table:style-name="Tableau10.A2" office:value-type="string">
            <text:p text:style-name="Table_20_Contents">Prestations associées</text:p>
          </table:table-cell>
          <table:table-cell table:style-name="Tableau10.B2" office:value-type="string">
            <text:p text:style-name="Table_20_Contents">– Accueil et accompagnement de personnes.</text:p>
            <text:p text:style-name="Table_20_Contents">– Accueil de livraison de matériels.</text:p>
            <text:p text:style-name="Table_20_Contents">– Connaissance et suivi d’un stock de matériel.</text:p>
            <text:p text:style-name="Table_20_Contents">– Connaissance des matériels installés.</text:p>
            <text:p text:style-name="Table_20_Contents">– Déserte des accès Opérateurs externes.</text:p>
            <text:p text:style-name="Table_20_Contents">– Redémarrage physique des matériels.</text:p>
          </table:table-cell>
        </table:table-row>
      </table:table>
      <text:p text:style-name="Text_20_body"/>
      <text:h text:style-name="Heading_20_3" text:outline-level="3">Évaluation des risques.</text:h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Risques identifiés</text:p>
            </table:table-cell>
            <table:table-cell table:style-name="Tableau11.B1" office:value-type="string">
              <text:p text:style-name="Table_20_Heading">Réponses mises en œuvre</text:p>
            </table:table-cell>
          </table:table-row>
        </table:table-header-rows>
        <table:table-row>
          <table:table-cell table:style-name="Tableau11.A2" office:value-type="string">
            <text:p text:style-name="Table_20_Contents">Absence de personnels Gendarmerie.</text:p>
          </table:table-cell>
          <table:table-cell table:style-name="Tableau11.B2" office:value-type="string">
            <text:p text:style-name="Table_20_Contents">– Présence de permanents sur le site.</text:p>
          </table:table-cell>
        </table:table-row>
        <table:table-row>
          <table:table-cell table:style-name="Tableau11.A2" office:value-type="string">
            <text:p text:style-name="Table_20_Contents">Méconnaissance de la situation de la plate-forme du client.</text:p>
          </table:table-cell>
          <table:table-cell table:style-name="Tableau11.B2" office:value-type="string">
            <text:p text:style-name="Table_20_Contents">– Identification claire de la plate-forme pour les personnels d<text:span text:style-name="T2">e l’hébergeur</text:span>.</text:p>
          </table:table-cell>
        </table:table-row>
        <table:table-row>
          <table:table-cell table:style-name="Tableau11.A2" office:value-type="string">
            <text:p text:style-name="Table_20_Contents">Non identification des matériels de la plate-forme du client.</text:p>
          </table:table-cell>
          <table:table-cell table:style-name="Tableau11.B2" office:value-type="string">
            <text:p text:style-name="Table_20_Contents">– Étiquetage des équipements.</text:p>
            <text:p text:style-name="Table_20_Contents">– Plan des baies du SI du client.</text:p>
          </table:table-cell>
        </table:table-row>
      </table:table>
      <text:p text:style-name="Text_20_body"/>
      <text:h text:style-name="Heading_20_2" text:outline-level="2">Les niveaux de service proposés.</text:h>
      <text:p text:style-name="Text_20_body">L’ensemble des gestes de proximité assuré par le <text:span text:style-name="T2">YYYYYYYYYYYYY</text:span> au profit de <text:span text:style-name="T2">XXXXXXXXXXXXXX</text:span> sont répertoriés dans un document en annexe.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header-rows>
          <table:table-row table:style-name="Tableau13.1">
            <table:table-cell table:style-name="Tableau13.A1" table:number-rows-spanned="2" office:value-type="string">
              <text:p text:style-name="Table_20_Heading">Description</text:p>
            </table:table-cell>
            <table:table-cell table:style-name="Tableau13.A1" table:number-columns-spanned="2" office:value-type="string">
              <text:p text:style-name="Table_20_Heading">Métriques</text:p>
            </table:table-cell>
            <table:covered-table-cell/>
            <table:table-cell table:style-name="Tableau13.D1" table:number-rows-spanned="2" office:value-type="string">
              <text:p text:style-name="Table_20_Heading">Règles de gestion</text:p>
            </table:table-cell>
          </table:table-row>
          <table:table-row table:style-name="Tableau13.1">
            <table:covered-table-cell/>
            <table:table-cell table:style-name="Tableau13.B2" office:value-type="string">
              <text:p text:style-name="P7">Indicateur</text:p>
            </table:table-cell>
            <table:table-cell table:style-name="Tableau13.B2" office:value-type="string">
              <text:p text:style-name="P7">Valeur</text:p>
            </table:table-cell>
            <table:covered-table-cell/>
          </table:table-row>
        </table:table-header-rows>
        <table:table-row table:style-name="Tableau13.1">
          <table:table-cell table:style-name="Tableau13.B2" office:value-type="string">
            <text:p text:style-name="Table_20_Contents">Suivi des livraisons</text:p>
          </table:table-cell>
          <table:table-cell table:style-name="Tableau13.B2" office:value-type="string">
            <text:p text:style-name="P6">PRX-A1</text:p>
            <text:p text:style-name="Table_20_Contents">Nombre de livraisons reçues</text:p>
          </table:table-cell>
          <table:table-cell table:style-name="Tableau13.B2" office:value-type="string">
            <text:p text:style-name="P5">Nombre réel</text:p>
          </table:table-cell>
          <table:table-cell table:style-name="Tableau13.D3" office:value-type="string">
            <text:p text:style-name="Table_20_Contents">Mesures trimestrielles</text:p>
          </table:table-cell>
        </table:table-row>
        <table:table-row table:style-name="Tableau13.1">
          <table:table-cell table:style-name="Tableau13.B2" office:value-type="string">
            <text:p text:style-name="Table_20_Contents">Suivi des accueils</text:p>
          </table:table-cell>
          <table:table-cell table:style-name="Tableau13.B2" office:value-type="string">
            <text:p text:style-name="P6">PRX-A2</text:p>
            <text:p text:style-name="Table_20_Contents">Nombre d’accueils effectués</text:p>
          </table:table-cell>
          <table:table-cell table:style-name="Tableau13.B2" office:value-type="string">
            <text:p text:style-name="P5">Nombre réel</text:p>
          </table:table-cell>
          <table:table-cell table:style-name="Tableau13.D3" office:value-type="string">
            <text:p text:style-name="Table_20_Contents">Mesures trimestrielles</text:p>
          </table:table-cell>
        </table:table-row>
        <table:table-row table:style-name="Tableau13.1">
          <table:table-cell table:style-name="Tableau13.B2" office:value-type="string">
            <text:p text:style-name="Table_20_Contents">Gestion des incidents de niveau 1</text:p>
          </table:table-cell>
          <table:table-cell table:style-name="Tableau13.B2" office:value-type="string">
            <text:p text:style-name="P6">PRX-A3</text:p>
            <text:p text:style-name="Table_20_Contents">Liste et durée des incidents de niveau 1</text:p>
          </table:table-cell>
          <table:table-cell table:style-name="Tableau13.B2" office:value-type="string">
            <text:p text:style-name="P5">Liste</text:p>
          </table:table-cell>
          <table:table-cell table:style-name="Tableau13.D3" office:value-type="string">
            <text:p text:style-name="Table_20_Contents">Mesures trimestrielles</text:p>
          </table:table-cell>
        </table:table-row>
      </table:table>
      <text:p text:style-name="Standard"/>
      <text:p text:style-name="Text_20_body"/>
      <text:h text:style-name="P15" text:outline-level="1">Service lié à l’évolution de l’infrastructure.</text:h>
      <text:h text:style-name="Heading_20_2" text:outline-level="2">Présentation du service.</text:h>
      <text:h text:style-name="Heading_20_3" text:outline-level="3">Définition du service.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Code Service</text:p>
          </table:table-cell>
          <table:table-cell table:style-name="Tableau7.B1" office:value-type="string">
            <text:p text:style-name="Table_20_Contents">INF</text:p>
          </table:table-cell>
        </table:table-row>
        <table:table-row>
          <table:table-cell table:style-name="Tableau7.A2" office:value-type="string">
            <text:p text:style-name="Table_20_Contents">Objectifs</text:p>
          </table:table-cell>
          <table:table-cell table:style-name="Tableau7.B2" office:value-type="string">
            <text:p text:style-name="Table_20_Contents">Étudier et mettre en œuvre les matériels nécessaires à l’évolution de l’infrastructure du SI Client</text:p>
          </table:table-cell>
        </table:table-row>
        <table:table-row>
          <table:table-cell table:style-name="Tableau7.A2" office:value-type="string">
            <text:p text:style-name="Table_20_Contents">Limites</text:p>
          </table:table-cell>
          <table:table-cell table:style-name="Tableau7.B2" office:value-type="string">
            <text:p text:style-name="Table_20_Contents">– Service offert sur une couverture jours ouvrés heures ouvrées (5J/7 8h00-18h00).</text:p>
          </table:table-cell>
        </table:table-row>
        <table:table-row>
          <table:table-cell table:style-name="Tableau7.A2" office:value-type="string">
            <text:p text:style-name="Table_20_Contents">Extensions possibles</text:p>
          </table:table-cell>
          <table:table-cell table:style-name="Tableau7.B2" office:value-type="string">
            <text:p text:style-name="Table_20_Contents">– Possibilité d’extension de couverture soir et week-end sur demande du client.</text:p>
          </table:table-cell>
        </table:table-row>
        <table:table-row>
          <table:table-cell table:style-name="Tableau7.A2" office:value-type="string">
            <text:p text:style-name="Table_20_Contents">Prestations associées</text:p>
          </table:table-cell>
          <table:table-cell table:style-name="Tableau7.B2" office:value-type="string">
            <text:p text:style-name="Table_20_Contents">– Étude électrique et calorique de l’évolution de l’infrastructure.</text:p>
            <text:p text:style-name="Table_20_Contents">– Mise en place ou retrait des câbles électriques.</text:p>
            <text:p text:style-name="Table_20_Contents">– Assistance à la mise en place du câblage réseau.</text:p>
            <text:p text:style-name="Table_20_Contents">– Mise à niveau de la documentation.</text:p>
            <text:p text:style-name="Table_20_Contents">– Accueil des livraisons et gestion des accès au plateau informatique.</text:p>
            <text:p text:style-name="Table_20_Contents">– Évolution du tableau des gestes de proximité.</text:p>
          </table:table-cell>
        </table:table-row>
      </table:table>
      <text:p text:style-name="Text_20_body"/>
      <text:h text:style-name="Heading_20_3" text:outline-level="3">Évaluation des risques.</text:h>
      <text:p text:style-name="Text_20_body"/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Risques identifiés</text:p>
            </table:table-cell>
            <table:table-cell table:style-name="Tableau8.B1" office:value-type="string">
              <text:p text:style-name="Table_20_Heading">Réponses mises en œuvre</text:p>
            </table:table-cell>
          </table:table-row>
        </table:table-header-rows>
        <table:table-row>
          <table:table-cell table:style-name="Tableau8.A2" office:value-type="string">
            <text:p text:style-name="Table_20_Contents">Manque de ressources électriques.</text:p>
          </table:table-cell>
          <table:table-cell table:style-name="Tableau8.B2" office:value-type="string">
            <text:p text:style-name="Table_20_Contents">– Étude du besoin en avance de phase.</text:p>
            <text:p text:style-name="Table_20_Contents">– Commande et mise en place de ressources électriques.</text:p>
            <text:p text:style-name="Table_20_Contents">– Optimisation de l’occupation des armoires électriques.</text:p>
          </table:table-cell>
        </table:table-row>
        <table:table-row>
          <table:table-cell table:style-name="Tableau8.A2" office:value-type="string">
            <text:p text:style-name="Table_20_Contents">Manque de ressources sur les accès Réseaux</text:p>
          </table:table-cell>
          <table:table-cell table:style-name="Tableau8.B2" office:value-type="string">
            <text:p text:style-name="Table_20_Contents">– Suivi et optimisation des accès Opérateurs.</text:p>
            <text:p text:style-name="Table_20_Contents">– Suivi et optimisation des rocades optiques.</text:p>
          </table:table-cell>
        </table:table-row>
        <table:table-row>
          <table:table-cell table:style-name="Tableau8.A2" office:value-type="string">
            <text:p text:style-name="Table_20_Contents">Manque d’informations ou de consignes au niveau d<text:span text:style-name="T2">e YYYYY</text:span>.</text:p>
          </table:table-cell>
          <table:table-cell table:style-name="Tableau8.B2" office:value-type="string">
            <text:p text:style-name="Table_20_Contents">– Suivi de la documentation mise à disposition.</text:p>
            <text:p text:style-name="Table_20_Contents">– Suivi des consignes et proposition de gestes de proximité.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Les niveaux de service proposés.</text:h>
      <text:p text:style-name="Text_20_body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 table:style-name="Tableau9.1">
            <table:table-cell table:style-name="Tableau9.A1" table:number-rows-spanned="2" office:value-type="string">
              <text:p text:style-name="Table_20_Heading">Description</text:p>
            </table:table-cell>
            <table:table-cell table:style-name="Tableau9.A1" table:number-columns-spanned="2" office:value-type="string">
              <text:p text:style-name="Table_20_Heading">Métriques</text:p>
            </table:table-cell>
            <table:covered-table-cell/>
            <table:table-cell table:style-name="Tableau9.D1" table:number-rows-spanned="2" office:value-type="string">
              <text:p text:style-name="Table_20_Heading">Règles de gestion</text:p>
            </table:table-cell>
          </table:table-row>
          <table:table-row table:style-name="Tableau9.1">
            <table:covered-table-cell/>
            <table:table-cell table:style-name="Tableau9.B2" office:value-type="string">
              <text:p text:style-name="P7">Indicateur</text:p>
            </table:table-cell>
            <table:table-cell table:style-name="Tableau9.B2" office:value-type="string">
              <text:p text:style-name="P7">Valeur</text:p>
            </table:table-cell>
            <table:covered-table-cell/>
          </table:table-row>
        </table:table-header-rows>
        <table:table-row table:style-name="Tableau9.1">
          <table:table-cell table:style-name="Tableau9.B2" office:value-type="string">
            <text:p text:style-name="Table_20_Contents">Respect du calendrier de l’évolution de l’infrastructure</text:p>
          </table:table-cell>
          <table:table-cell table:style-name="Tableau9.B2" office:value-type="string">
            <text:p text:style-name="P6">INF-1</text:p>
            <text:p text:style-name="Table_20_Contents">Taux de dépassement de délai</text:p>
          </table:table-cell>
          <table:table-cell table:style-name="Tableau9.B2" office:value-type="string">
            <text:p text:style-name="P5">Au maximum égale à 100%</text:p>
          </table:table-cell>
          <table:table-cell table:style-name="Tableau9.D3" office:value-type="string">
            <text:p text:style-name="Table_20_Contents">Valeur = T2/T1 en %</text:p>
            <text:p text:style-name="Table_20_Contents">T1 = Durée prévue</text:p>
            <text:p text:style-name="Table_20_Contents">T2 = Durée réalisée</text:p>
            <text:p text:style-name="Table_20_Contents"/>
            <text:p text:style-name="Table_20_Contents">La durée de réalisation est négociée entre l’hébergeur et le client pour chaque demande</text:p>
            <text:p text:style-name="Table_20_Contents"/>
            <text:p text:style-name="P9">Niveau 3 prestation en mode projet</text:p>
            <text:p text:style-name="Table_20_Contents">Durée estimée &gt; 1j</text:p>
          </table:table-cell>
        </table:table-row>
      </table:table>
      <text:p text:style-name="Text_20_body"/>
      <text:p text:style-name="Text_20_body"/>
      <text:h text:style-name="P15" text:outline-level="1">Le rapport de service.</text:h>
      <text:p text:style-name="Text_20_body">L'ensemble des indicateurs définis ci-dessus sont communiqués au client trimestriellement (janvier, avril, juillet, octobre) dans un document nommé « Rapport de service ».</text:p>
      <text:h text:style-name="Heading_20_1" text:outline-level="1">La procédure d'escalade.</text:h>
      <text:p text:style-name="Text_20_body">La procédure d'escalade permet de gérer une situation de blocage ou de crise sur le système d'information de <text:span text:style-name="T2">XXXXXXXXXX</text:span>.</text:p>
      <text:p text:style-name="Text_20_body">Cela concerne les cas suivants :</text:p>
      <text:list xml:id="list5501099662521811079" text:style-name="L1">
        <text:list-item>
          <text:p text:style-name="P13">une situation nécessitant un arbitrage ,</text:p>
        </text:list-item>
        <text:list-item>
          <text:p text:style-name="P13">une crise aiguë au sein du SI du preneur ou de l'hébergeur.</text:p>
        </text:list-item>
      </text:list>
      <text:p text:style-name="Text_20_body">L'organigramme de la procédure figure en annexe du présent document.</text:p>
      <text:h text:style-name="Heading_20_1" text:outline-level="1">Les gestes de proximité.</text:h>
      <text:p text:style-name="Text_20_body">Les gestes de proximité et leurs régimes de mise en œuvre sont listés en annexe du présent document.</text:p>
      <text:h text:style-name="Heading_20_1" text:outline-level="1">La vérification du plan de reprise d'activité du système d'information de <text:span text:style-name="T2">XXXXXX</text:span>.</text:h>
      <text:p text:style-name="Text_20_body">Dans le cadre de sa procédure de reprise d'activité, l<text:span text:style-name="T2">e XXXXX</text:span> effectuera au minimum deux tests grandeur réelle dans l'année.</text:p>
      <text:h text:style-name="Heading_20_1" text:outline-level="1">Le plan d'occupation de la salle.</text:h>
      <text:p text:style-name="Text_20_body">A l'issue de l'installation, le <text:span text:style-name="T2">YYYYY</text:span> fournira au client un plan d'implantation des baies du SI du client.</text:p>
      <text:h text:style-name="Heading_20_1" text:outline-level="1">Les contacts nécessaires au fonctionnement de la prestation.</text:h>
      <text:p text:style-name="Text_20_body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D"/>
        <table:table-column table:style-name="Tableau12.E"/>
        <table:table-header-rows>
          <table:table-row>
            <table:table-cell table:style-name="Tableau12.A1" office:value-type="string">
              <text:p text:style-name="Table_20_Heading">Nom</text:p>
            </table:table-cell>
            <table:table-cell table:style-name="Tableau12.A1" office:value-type="string">
              <text:p text:style-name="Table_20_Heading">Fonction</text:p>
            </table:table-cell>
            <table:table-cell table:style-name="Tableau12.A1" office:value-type="string">
              <text:p text:style-name="Table_20_Heading">Entité</text:p>
            </table:table-cell>
            <table:table-cell table:style-name="Tableau12.A1" office:value-type="string">
              <text:p text:style-name="Table_20_Heading">Numéro de téléphone</text:p>
            </table:table-cell>
            <table:table-cell table:style-name="Tableau12.E1" office:value-type="string">
              <text:p text:style-name="Table_20_Heading">Adresse mail</text:p>
            </table:table-cell>
          </table:table-row>
        </table:table-header-rows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E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nothing" fo:margin-left="0.75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page-number="auto" fo:padding="0cm" fo:border-left="none" fo:border-right="none" fo:border-top="none" fo:border-bottom="0.51pt solid #000000" style:shadow="none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026ae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QSC <text:span text:style-name="MT1">Hébergeur – Client</text:span></text:p>
      </style:header>
      <style:footer>
        <text:p text:style-name="MP2"><text:page-number text:select-page="current">8</text:page-number> / <text:page-count>8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6:29:27.01</meta:creation-date>
    <dc:date>2015-03-26T11:42:43.213000000</dc:date>
    <meta:editing-duration>P3DT8H30M43S</meta:editing-duration>
    <meta:editing-cycles>23</meta:editing-cycles>
    <meta:generator>LibreOffice/4.1.6.2.0$Windows_x86 LibreOffice_project/6b04c4a32621d4168ba839813042142f6b4ee13</meta:generator>
    <meta:print-date>2012-09-14T08:07:06.15</meta:print-date>
    <dc:creator>Laurent LE BLAY</dc:creator>
    <meta:document-statistic meta:table-count="13" meta:image-count="0" meta:object-count="0" meta:page-count="8" meta:paragraph-count="259" meta:word-count="1394" meta:character-count="9257" meta:non-whitespace-character-count="8046"/>
  </office:meta>
</office:document-meta>
</file>